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Výchozí">
        <draw:frame draw:style-name="gr1" draw:layer="layout" svg:width="15cm" svg:height="13cm" svg:x="1.5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5cm" fo:page-height="13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2$Build-9286</meta:generator>
    <meta:initial-creator>Jiri Slaby</meta:initial-creator>
    <meta:creation-date>2008-05-14T16:10:03</meta:creation-date>
    <dc:date>2008-05-19T02:38:03</dc:date>
    <meta:editing-cycles>7</meta:editing-cycles>
    <meta:editing-duration>PT37M15S</meta:editing-duration>
    <meta:user-defined meta:name="Informace 1!!"/>
    <meta:user-defined meta:name="Informace 2!!"/>
    <meta:user-defined meta:name="Informace 3!!"/>
    <meta:user-defined meta:name="Informace 4!!"/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12.8435878753662pt" style:font-size-asian="12.8435878753662pt" style:font-size-complex="12.8435878753662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000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001cm" svg:height="13.001cm" chart:class="chart:bar" chart:style-name="ch1">
        <chart:legend chart:legend-position="end" svg:x="11.225cm" svg:y="5.247cm" chart:style-name="ch2"/>
        <chart:plot-area chart:style-name="ch3" chart:data-source-has-labels="both" svg:x="0.294cm" svg:y="0.257cm" svg:width="10.623cm" svg:height="12.216cm">
          <chart:axis chart:dimension="x" chart:name="primary-x" chart:style-name="ch4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series chart:style-name="ch10" chart:values-cell-range-address="local-table.$E$2:.$E$4" chart:label-cell-address="local-table.$E$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l</text:p>
              </table:table-cell>
              <table:table-cell office:value-type="string">
                <text:p>szedata</text:p>
              </table:table-cell>
              <table:table-cell office:value-type="string">
                <text:p>szedata2</text:p>
              </table:table-cell>
              <table:table-cell office:value-type="string">
                <text:p>DAG</text:p>
              </table:table-cell>
            </table:table-row>
          </table:table-header-rows>
          <table:table-rows>
            <table:table-row>
              <table:table-cell office:value-type="string">
                <text:p>64</text:p>
              </table:table-cell>
              <table:table-cell office:value-type="float" office:value="348">
                <text:p>348</text:p>
              </table:table-cell>
              <table:table-cell office:value-type="float" office:value="96">
                <text:p>96</text:p>
              </table:table-cell>
              <table:table-cell office:value-type="float" office:value="759">
                <text:p>759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54">
                <text:p>954</text:p>
              </table:table-cell>
              <table:table-cell office:value-type="float" office:value="770">
                <text:p>770</text:p>
              </table:table-cell>
              <table:table-cell office:value-type="float" office:value="961">
                <text:p>961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983">
                <text:p>983</text:p>
              </table:table-cell>
              <table:table-cell office:value-type="float" office:value="987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987">
                <text:p>9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