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5cm" svg:height="13.284cm" svg:x="1.5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Jiri Slaby</meta:initial-creator>
    <meta:creation-date>2008-05-14T16:10:03</meta:creation-date>
    <dc:creator>Jiri Slaby</dc:creator>
    <dc:date>2008-05-14T16:36:56</dc:date>
    <meta:editing-cycles>4</meta:editing-cycles>
    <meta:editing-duration>PT22M53S</meta:editing-duration>
    <meta:user-defined meta:name="Informace 1!!"/>
    <meta:user-defined meta:name="Informace 2!!"/>
    <meta:user-defined meta:name="Informace 3!!"/>
    <meta:user-defined meta:name="Informace 4!!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.8571424484253pt" style:font-size-asian="14.8571424484253pt" style:font-size-complex="14.857142448425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285cm" chart:class="chart:bar" chart:style-name="ch1">
        <chart:legend chart:legend-position="end" svg:x="11.228cm" svg:y="5.365cm" chart:style-name="ch2"/>
        <chart:plot-area chart:style-name="ch3" chart:data-source-has-labels="both" svg:x="0.3cm" svg:y="0.265cm" svg:width="10.626cm" svg:height="12.485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0">
                <text:p>770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7">
                <text:p>987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