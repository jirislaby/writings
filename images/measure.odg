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Výchozí">
        <draw:frame draw:style-name="gr1" draw:layer="layout" svg:width="15cm" svg:height="13cm" svg:x="1.5cm" svg:y="0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cm" fo:page-height="1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initial-creator>Jiri Slaby</meta:initial-creator>
    <meta:creation-date>2008-05-14T16:10:03</meta:creation-date>
    <dc:date>2008-05-18T21:17:19</dc:date>
    <meta:editing-cycles>5</meta:editing-cycles>
    <meta:editing-duration>PT31M38S</meta:editing-duration>
    <meta:user-defined meta:name="Informace 1!!"/>
    <meta:user-defined meta:name="Informace 2!!"/>
    <meta:user-defined meta:name="Informace 3!!"/>
    <meta:user-defined meta:name="Informace 4!!"/>
    <meta:document-statistic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2.8467807769775pt" style:font-size-asian="12.8467807769775pt" style:font-size-complex="12.8467807769775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00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001cm" svg:height="13.001cm" chart:class="chart:bar" chart:style-name="ch1">
        <chart:legend chart:legend-position="end" svg:x="11.226cm" svg:y="5.249cm" chart:style-name="ch2"/>
        <chart:plot-area chart:style-name="ch3" chart:data-source-has-labels="both" svg:x="0.298cm" svg:y="0.258cm" svg:width="10.624cm" svg:height="12.218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series chart:style-name="ch10" chart:values-cell-range-address="local-table.$E$2:.$E$4" chart:label-cell-address="local-table.$E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zedata</text:p>
              </table:table-cell>
              <table:table-cell office:value-type="string">
                <text:p>Intel</text:p>
              </table:table-cell>
              <table:table-cell office:value-type="string">
                <text:p>szedata2</text:p>
              </table:table-cell>
              <table:table-cell office:value-type="string">
                <text:p>DAG</text:p>
              </table:table-cell>
            </table:table-row>
          </table:table-header-rows>
          <table:table-rows>
            <table:table-row>
              <table:table-cell office:value-type="string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777">
                <text:p>777</text:p>
              </table:table-cell>
              <table:table-cell office:value-type="float" office:value="991">
                <text:p>99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70">
                <text:p>770</text:p>
              </table:table-cell>
              <table:table-cell office:value-type="float" office:value="936">
                <text:p>936</text:p>
              </table:table-cell>
              <table:table-cell office:value-type="float" office:value="992">
                <text:p>99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987">
                <text:p>987</text:p>
              </table:table-cell>
              <table:table-cell office:value-type="float" office:value="936">
                <text:p>936</text:p>
              </table:table-cell>
              <table:table-cell office:value-type="float" office:value="991">
                <text:p>991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