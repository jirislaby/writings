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Szedata</text:p>
          </table:table-cell>
          <table:table-cell office:value-type="string">
            <text:p>Szedata2</text:p>
          </table:table-cell>
          <table:table-cell office:value-type="string">
            <text:p>DAG</text:p>
          </table:table-cell>
          <table:table-cell>
            <draw:frame table:end-cell-address="List1.H18" table:end-x="1.326cm" table:end-y="0.278cm" draw:z-index="0" draw:style-name="gr1" svg:width="7.999cm" svg:height="6.999cm" svg:x="0.101cm" svg:y="0.1cm">
              <draw:object draw:notify-on-update-of-ranges="List1.A1:List1.A1 List1.A2:List1.A4 List1.B1:List1.B1 List1.B2:List1.B4 List1.C1:List1.C1 List1.C2:List1.C4 List1.D1:List1.D1 List1.D2:List1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991">
            <text:p>991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770">
            <text:p>770</text:p>
          </table:table-cell>
          <table:table-cell office:value-type="float" office:value="992">
            <text:p>992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office:value-type="float" office:value="1518">
            <text:p>1518</text:p>
          </table:table-cell>
          <table:table-cell office:value-type="float" office:value="987">
            <text:p>987</text:p>
          </table:table-cell>
          <table:table-cell office:value-type="float" office:value="991">
            <text:p>991</text:p>
          </table:table-cell>
          <table:table-cell office:value-type="float" office:value="1000">
            <text:p>1000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14.05.2008</text:date>, <text:time>16:27:4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iri Slaby</meta:initial-creator>
    <meta:creation-date>2008-05-14T16:01:33</meta:creation-date>
    <dc:creator>Jiri Slaby</dc:creator>
    <dc:date>2008-05-14T16:27:47</dc:date>
    <meta:editing-cycles>3</meta:editing-cycles>
    <meta:editing-duration>PT26M16S</meta:editing-duration>
    <meta:user-defined meta:name="Informace 1!!"/>
    <meta:user-defined meta:name="Informace 2!!"/>
    <meta:user-defined meta:name="Informace 3!!"/>
    <meta:user-defined meta:name="Informace 4!!"/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5.988cm" svg:y="2.827cm" chart:style-name="ch2"/>
        <chart:plot-area chart:style-name="ch3" table:cell-range-address="List1.A1:List1.D4" chart:data-source-has-labels="both" svg:x="0.16cm" svg:y="0.14cm" svg:width="5.667cm" svg:height="6.579cm">
          <chart:axis chart:dimension="x" chart:name="primary-x" chart:style-name="ch4">
            <chart:categories table:cell-range-address="List1.A2:Lis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B4" chart:label-cell-address="List1.B1:List1.B1" chart:class="chart:bar">
            <chart:data-point chart:repeated="3"/>
          </chart:series>
          <chart:series chart:style-name="ch8" chart:values-cell-range-address="List1.C2:List1.C4" chart:label-cell-address="List1.C1:List1.C1" chart:class="chart:bar">
            <chart:data-point chart:repeated="3"/>
          </chart:series>
          <chart:series chart:style-name="ch9" chart:values-cell-range-address="List1.D2:List1.D4" chart:label-cell-address="List1.D1:List1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0">
                <text:p>770</text:p>
              </table:table-cell>
              <table:table-cell office:value-type="float" office:value="992">
                <text:p>9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7">
                <text:p>987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