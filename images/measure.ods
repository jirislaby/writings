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szedata</text:p>
          </table:table-cell>
          <table:table-cell office:value-type="string">
            <text:p>Intel</text:p>
          </table:table-cell>
          <table:table-cell office:value-type="string">
            <text:p>szedata2</text:p>
          </table:table-cell>
          <table:table-cell office:value-type="string">
            <text:p>DAG</text:p>
          </table:table-cell>
          <table:table-cell>
            <draw:frame table:end-cell-address="List1.I18" table:end-x="1.331cm" table:end-y="0.275cm" draw:z-index="0" draw:style-name="gr1" svg:width="7.996cm" svg:height="8.092cm" svg:x="0.11cm" svg:y="0.101cm">
              <draw:object draw:notify-on-update-of-ranges="List1.A1:List1.A1 List1.A2:List1.A4 List1.B1:List1.B1 List1.B2:List1.B4 List1.C1:List1.C1 List1.C2:List1.C4 List1.D1:List1.D1 List1.D2:List1.D4 List1.E1:List1.E1 List1.E2:List1.E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777">
            <text:p>777</text:p>
          </table:table-cell>
          <table:table-cell office:value-type="float" office:value="991">
            <text:p>991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770">
            <text:p>770</text:p>
          </table:table-cell>
          <table:table-cell office:value-type="float" office:value="936">
            <text:p>936</text:p>
          </table:table-cell>
          <table:table-cell office:value-type="float" office:value="992">
            <text:p>992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office:value-type="float" office:value="1518">
            <text:p>1518</text:p>
          </table:table-cell>
          <table:table-cell office:value-type="float" office:value="987">
            <text:p>987</text:p>
          </table:table-cell>
          <table:table-cell office:value-type="float" office:value="936">
            <text:p>936</text:p>
          </table:table-cell>
          <table:table-cell office:value-type="float" office:value="991">
            <text:p>991</text:p>
          </table:table-cell>
          <table:table-cell office:value-type="float" office:value="1000">
            <text:p>1000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8">18.05.2008</text:date>, <text:time>21:17:2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iri Slaby</meta:initial-creator>
    <meta:creation-date>2008-05-14T16:01:33</meta:creation-date>
    <dc:date>2008-05-18T21:17:22</dc:date>
    <meta:editing-cycles>4</meta:editing-cycles>
    <meta:editing-duration>PT35M3S</meta:editing-duration>
    <meta:user-defined meta:name="Informace 1!!"/>
    <meta:user-defined meta:name="Informace 2!!"/>
    <meta:user-defined meta:name="Informace 3!!"/>
    <meta:user-defined meta:name="Informace 4!!"/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700021743774pt" style:font-size-asian="7.99700021743774pt" style:font-size-complex="7.99700021743774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97cm" svg:height="8.093cm" chart:class="chart:bar" chart:style-name="ch1">
        <chart:legend chart:legend-position="end" svg:x="5.985cm" svg:y="3.268cm" chart:style-name="ch2"/>
        <chart:plot-area chart:style-name="ch3" table:cell-range-address="List1.A1:List1.E4" chart:data-source-has-labels="both" svg:x="0.159cm" svg:y="0.161cm" svg:width="5.664cm" svg:height="7.606cm">
          <chart:axis chart:dimension="x" chart:name="primary-x" chart:style-name="ch4">
            <chart:categories table:cell-range-address="List1.A2:Lis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B4" chart:label-cell-address="List1.B1:List1.B1" chart:class="chart:bar">
            <chart:data-point chart:repeated="3"/>
          </chart:series>
          <chart:series chart:style-name="ch8" chart:values-cell-range-address="List1.C2:List1.C4" chart:label-cell-address="List1.C1:List1.C1" chart:class="chart:bar">
            <chart:data-point chart:repeated="3"/>
          </chart:series>
          <chart:series chart:style-name="ch9" chart:values-cell-range-address="List1.D2:List1.D4" chart:label-cell-address="List1.D1:List1.D1" chart:class="chart:bar">
            <chart:data-point chart:repeated="3"/>
          </chart:series>
          <chart:series chart:style-name="ch10" chart:values-cell-range-address="List1.E2:List1.E4" chart:label-cell-address="List1.E1:List1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zedata</text:p>
              </table:table-cell>
              <table:table-cell office:value-type="string">
                <text:p>Intel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777">
                <text:p>777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0">
                <text:p>770</text:p>
              </table:table-cell>
              <table:table-cell office:value-type="float" office:value="936">
                <text:p>936</text:p>
              </table:table-cell>
              <table:table-cell office:value-type="float" office:value="992">
                <text:p>9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7">
                <text:p>987</text:p>
              </table:table-cell>
              <table:table-cell office:value-type="float" office:value="936">
                <text:p>936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