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9A00000295F7F05747.png"/>
  <manifest:file-entry manifest:media-type="" manifest:full-path="Pictures/"/>
  <manifest:file-entry manifest:media-type="text/xml" manifest:full-path="content.xml"/>
  <manifest:file-entry manifest:media-type="text/xml" manifest:full-path="Basic/Standard/ThisDocum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style:tab-stops>
          <style:tab-stop style:position="3cm"/>
        </style:tab-stops>
      </style:paragraph-properties>
    </style:style>
    <style:style style:name="P2" style:family="paragraph" style:parent-style-name="Standard">
      <style:text-properties fo:font-size="9pt" fo:font-weight="bold" style:font-size-asian="9pt" style:font-weight-asian="bold"/>
    </style:style>
    <style:style style:name="P3" style:family="paragraph" style:parent-style-name="Standard">
      <style:paragraph-properties>
        <style:tab-stops>
          <style:tab-stop style:position="3cm"/>
        </style:tab-stops>
      </style:paragraph-properties>
      <style:text-properties fo:font-size="9pt" fo:font-weight="bold" style:font-size-asian="9pt" style:font-weight-asian="bold"/>
    </style:style>
    <style:style style:name="P4" style:family="paragraph" style:parent-style-name="Standard">
      <style:paragraph-properties fo:text-align="center" style:justify-single-word="false"/>
      <style:text-properties fo:font-size="9pt" fo:font-weight="bold" style:font-size-asian="9pt" style:font-weight-asian="bold"/>
    </style:style>
    <style:style style:name="P5" style:family="paragraph" style:parent-style-name="Standard">
      <style:text-properties fo:font-size="9pt" fo:language="none" fo:country="none" fo:font-weight="bold" style:font-size-asian="9pt" style:language-asian="none" style:country-asian="none"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style:tab-stops>
          <style:tab-stop style:position="4.341cm"/>
        </style:tab-stops>
      </style:paragraph-properties>
    </style:style>
    <style:style style:name="P8" style:family="paragraph" style:parent-style-name="Standard">
      <style:paragraph-properties fo:margin-top="0.847cm" fo:margin-bottom="0cm" fo:text-align="end" style:justify-single-word="false"/>
    </style:style>
    <style:style style:name="P9" style:family="paragraph" style:parent-style-name="Standard">
      <style:paragraph-properties fo:margin-left="3cm" fo:margin-right="0cm" fo:text-indent="-3cm" style:auto-text-indent="false">
        <style:tab-stops>
          <style:tab-stop style:position="3cm"/>
        </style:tab-stops>
      </style:paragraph-properties>
    </style:style>
    <style:style style:name="P10" style:family="paragraph" style:parent-style-name="Standard">
      <style:paragraph-properties fo:margin-left="3cm" fo:margin-right="0cm" fo:text-indent="-3cm" style:auto-text-indent="false">
        <style:tab-stops>
          <style:tab-stop style:position="2cm"/>
        </style:tab-stops>
      </style:paragraph-properties>
    </style:style>
    <style:style style:name="P11" style:family="paragraph" style:parent-style-name="Standard" style:list-style-name="L1">
      <style:paragraph-properties fo:margin-left="0cm" fo:margin-right="0cm" fo:text-indent="0cm" style:auto-text-indent="false">
        <style:tab-stops>
          <style:tab-stop style:position="3cm"/>
        </style:tab-stops>
      </style:paragraph-properties>
    </style:style>
    <style:style style:name="P12" style:family="paragraph" style:parent-style-name="Standard" style:list-style-name="L1">
      <style:paragraph-properties fo:margin-left="0cm" fo:margin-right="0cm" fo:text-indent="0cm" style:auto-text-indent="false">
        <style:tab-stops>
          <style:tab-stop style:position="3cm"/>
        </style:tab-stops>
      </style:paragraph-properties>
    </style:style>
    <style:style style:name="P13" style:family="paragraph" style:parent-style-name="Standard" style:list-style-name="L1">
      <style:paragraph-properties fo:margin-left="0cm" fo:margin-right="0cm" fo:text-indent="0cm" style:auto-text-indent="false">
        <style:tab-stops>
          <style:tab-stop style:position="3cm"/>
        </style:tab-stops>
      </style:paragraph-properties>
    </style:style>
    <style:style style:name="P14" style:family="paragraph" style:parent-style-name="Standard" style:list-style-name="L1">
      <style:paragraph-properties fo:margin-left="0cm" fo:margin-right="0cm" fo:text-indent="0cm" style:auto-text-indent="false">
        <style:tab-stops>
          <style:tab-stop style:position="3cm"/>
        </style:tab-stops>
      </style:paragraph-properties>
    </style:style>
    <style:style style:name="P15" style:family="paragraph" style:parent-style-name="Heading_20_1">
      <style:paragraph-properties fo:line-height="0.776cm"/>
      <style:text-properties fo:font-size="16pt" style:font-size-asian="16pt"/>
    </style:style>
    <style:style style:name="P16" style:family="paragraph" style:parent-style-name="Title" style:master-page-name="Standard">
      <style:paragraph-properties fo:margin-top="0.635cm" fo:margin-bottom="0cm" style:page-number="auto" fo:padding-left="0cm" fo:padding-right="0cm" fo:padding-top="0.635cm" fo:padding-bottom="0cm" fo:border-left="none" fo:border-right="none" fo:border-top="0.018cm solid #000000" fo:border-bottom="none">
        <style:tab-stops>
          <style:tab-stop style:position="2cm"/>
        </style:tab-stops>
      </style:paragraph-properties>
    </style:style>
    <style:style style:name="P17" style:family="paragraph" style:parent-style-name="Titulek">
      <style:paragraph-properties fo:line-height="0.776cm"/>
      <style:text-properties fo:font-size="16pt" style:font-size-asian="16pt"/>
    </style:style>
    <style:style style:name="T1" style:family="text">
      <style:text-properties fo:font-size="10pt" fo:language="none" fo:country="none" style:font-size-asian="10pt" style:language-asian="none" style:country-asian="none"/>
    </style:style>
    <style:style style:name="T2" style:family="text">
      <style:text-properties fo:language="none" fo:country="none" style:language-asian="none"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9pt" fo:font-weight="bold" style:font-size-asian="9pt" style:font-weight-asian="bold"/>
    </style:style>
    <style:style style:name="T6" style:family="text">
      <style:text-properties fo:font-size="9pt" fo:font-weight="bold" style:font-size-asian="9pt" style:font-weight-asian="bold" style:font-size-complex="9pt" style:font-weight-complex="bold"/>
    </style:style>
    <style:style style:name="T7" style:family="text">
      <style:text-properties fo:font-size="9pt" style:font-size-asian="9pt" style:font-size-complex="9pt"/>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style>
    <style:style style:name="T11" style:family="text">
      <style:text-properties fo:font-size="18pt" fo:font-weight="bold" style:font-size-asian="9pt" style:font-weight-asian="bold"/>
    </style:style>
    <style:style style:name="fr1" style:family="graphic" style:parent-style-name="Frame">
      <style:graphic-properties style:wrap="none"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5cm" fo:margin-right="0.25cm" style:wrap="dynamic" style:number-wrapped-paragraphs="no-limit" style:vertical-pos="bottom" style:vertical-rel="page-content"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5cm" fo:margin-right="0.25cm"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13cm" text:min-label-width="0.635cm"/>
        <style:text-properties style:font-name="StarSymbol"/>
      </text:list-level-style-bullet>
      <text:list-level-style-bullet text:level="2" text:style-name="Bullet_20_Symbols" style:num-suffix="." text:bullet-char="○">
        <style:list-level-properties text:space-before="1.157cm" text:min-label-width="0.635cm"/>
        <style:text-properties style:font-name="StarSymbol"/>
      </text:list-level-style-bullet>
      <text:list-level-style-bullet text:level="3" text:style-name="Bullet_20_Symbols" style:num-suffix="." text:bullet-char="■">
        <style:list-level-properties text:space-before="2.427cm" text:min-label-width="0.635cm"/>
        <style:text-properties style:font-name="StarSymbol"/>
      </text:list-level-style-bullet>
      <text:list-level-style-bullet text:level="4" text:style-name="Bullet_20_Symbols" style:num-suffix="." text:bullet-char="●">
        <style:list-level-properties text:space-before="3.697cm" text:min-label-width="0.635cm"/>
        <style:text-properties style:font-name="StarSymbol"/>
      </text:list-level-style-bullet>
      <text:list-level-style-bullet text:level="5" text:style-name="Bullet_20_Symbols" style:num-suffix="." text:bullet-char="○">
        <style:list-level-properties text:space-before="4.967cm" text:min-label-width="0.635cm"/>
        <style:text-properties style:font-name="StarSymbol"/>
      </text:list-level-style-bullet>
      <text:list-level-style-bullet text:level="6" text:style-name="Bullet_20_Symbols" style:num-suffix="." text:bullet-char="■">
        <style:list-level-properties text:space-before="6.237cm" text:min-label-width="0.635cm"/>
        <style:text-properties style:font-name="StarSymbol"/>
      </text:list-level-style-bullet>
      <text:list-level-style-bullet text:level="7" text:style-name="Bullet_20_Symbols" style:num-suffix="." text:bullet-char="●">
        <style:list-level-properties text:space-before="7.507cm" text:min-label-width="0.635cm"/>
        <style:text-properties style:font-name="StarSymbol"/>
      </text:list-level-style-bullet>
      <text:list-level-style-bullet text:level="8" text:style-name="Bullet_20_Symbols" style:num-suffix="." text:bullet-char="○">
        <style:list-level-properties text:space-before="8.777cm" text:min-label-width="0.635cm"/>
        <style:text-properties style:font-name="StarSymbol"/>
      </text:list-level-style-bullet>
      <text:list-level-style-bullet text:level="9" text:style-name="Bullet_20_Symbols" style:num-suffix="." text:bullet-char="■">
        <style:list-level-properties text:space-before="10.047cm" text:min-label-width="0.635cm"/>
        <style:text-properties style:font-name="StarSymbol"/>
      </text:list-level-style-bullet>
      <text:list-level-style-bullet text:level="10" text:style-name="Bullet_20_Symbols" style:num-suffix="." text:bullet-char="●">
        <style:list-level-properties text:space-before="11.317cm" text:min-label-width="0.635cm"/>
        <style:text-properties style:font-name="StarSymbol"/>
      </text:list-level-style-bullet>
    </text:list-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Rámec1" text:anchor-type="paragraph" svg:x="8.904cm" svg:y="0.87cm" svg:width="7.089cm" draw:z-index="0"><draw:text-box fo:min-height="1.598cm"><text:h text:style-name="P15" text:outline-level="1">Masarykova univerzita </text:h><text:p text:style-name="P17">Fakulta informatiky</text:p></draw:text-box></draw:frame><draw:frame draw:style-name="fr5" draw:name="obrázky1" text:anchor-type="char" svg:x="0cm" svg:y="0.635cm" svg:width="2cm" svg:height="2cm" draw:z-index="5"><draw:image xlink:href="Pictures/100000000000029A00000295F7F05747.png" xlink:type="simple" xlink:show="embed" xlink:actuate="onLoad"/></draw:frame>Zadání diplomové práce </text:p>
      <text:p text:style-name="P8"><text:span text:style-name="T5">Datum:</text:span><text:span text:style-name="T3"> <text:s/></text:span><text:date style:data-style-name="N30" text:date-value="2008-04-14T21:55:01">14.4.2008</text:date></text:p>
      <text:p text:style-name="P3"/>
      <text:p text:style-name="P7"><text:span text:style-name="T6">Student:</text:span><text:tab/>Jiří Slabý</text:p>
      <text:p text:style-name="P7"/>
      <text:p text:style-name="P7"><text:span text:style-name="T6">Program: </text:span><text:tab/>Aplikovaná Informatika</text:p>
      <text:p text:style-name="P7"/>
      <text:p text:style-name="P7"><text:span text:style-name="T6">Specializace:</text:span><text:tab/>Počítačové systémy</text:p>
      <text:p text:style-name="P7"><field:fieldmark-start text:name="Unnamed" field:type="ecma.office-open-xml.field.FORMTEXT"><field:param field:name="Description" field:value=""/></field:fieldmark-start><field:fieldmark-end/></text:p>
      <text:p text:style-name="P7"><text:span text:style-name="T6">Garant specializace:</text:span><text:tab/>doc. Ing. Jan Staudek, CSc.</text:p>
      <text:p text:style-name="P7"><field:fieldmark-start text:name="Unnamed" field:type="ecma.office-open-xml.field.FORMTEXT"><field:param field:name="Description" field:value=""/></field:fieldmark-start><field:fieldmark-end/></text:p>
      <text:p text:style-name="P7"><text:span text:style-name="T6">Vedoucí práce:</text:span><text:tab/>Ing. Pavel Čeleda, Ph.D.</text:p>
      <text:p text:style-name="P7"/>
      <text:p text:style-name="P7"><text:span text:style-name="T6">Název práce:</text:span><text:tab/>Rychlé datové přenosy na platformě COMBO</text:p>
      <text:p text:style-name="P1"/>
      <text:p text:style-name="P9"><text:span text:style-name="T5">Zadání:</text:span><text:tab/></text:p>
      <text:list text:style-name="L1">
        <text:list-item>
          <text:p text:style-name="P11">Seznamte se s HW a SW architekturou akceleračních karet COMBO vyvíjených v rámci projektu Liberouter.</text:p>
        </text:list-item>
        <text:list-item>
          <text:p text:style-name="P11">Analyzujte možnosti a potřeby ovladačů jádra operačního systému Linux tak, aby umožňovaly rychlé datové přenosy pro síťové aplikace z HW do uživatelského prostoru.</text:p>
        </text:list-item>
        <text:list-item>
          <text:p text:style-name="P11">Navrhněte a zrealizujte programové vybavení umožňující provádět rychlé datové přenosy z HW do síťových aplikací v uživatelském prostoru.</text:p>
        </text:list-item>
        <text:list-item>
          <text:p text:style-name="P11">Proveďte integraci a ověřte funkčnost vytvořeného programového vybavení s ostatními celky vytvářenými v rámci projektu Liberouter. Srovnejte výsledky navrženého řešení s jinými dostupnými řešeními.</text:p>
        </text:list-item>
      </text:list>
      <text:p text:style-name="Standard"/>
      <text:p text:style-name="Standard"/>
      <text:p text:style-name="P10"><text:span text:style-name="T5">Základní literatura:</text:span></text:p>
      <text:p text:style-name="P10"><draw:frame draw:style-name="fr2" draw:name="Rámec2" text:anchor-type="paragraph" svg:x="0.002cm" svg:width="3cm" draw:z-index="1"><draw:text-box fo:min-height="1.199cm"><text:p text:style-name="P4">________________</text:p><text:p text:style-name="P4">student(ka)</text:p></draw:text-box></draw:frame></text:p>
      <text:p text:style-name="Standard"/>
      <text:p text:style-name="P5"><draw:frame draw:style-name="fr3" draw:name="Rámec3" text:anchor-type="paragraph" svg:x="8.721cm" svg:y="26.044cm" svg:width="3.401cm" draw:z-index="2"><draw:text-box fo:min-height="1.199cm"><text:p text:style-name="P4">____________________</text:p><text:p text:style-name="P4">vedoucí diplomové</text:p><text:p text:style-name="P4"><text:s/>práce</text:p></draw:text-box></draw:frame><draw:frame draw:style-name="fr3" draw:name="Rámec4" text:anchor-type="paragraph" svg:x="14.42cm" svg:y="26.044cm" svg:width="3.799cm" draw:z-index="3"><draw:text-box fo:min-height="1.199cm"><text:p text:style-name="P6"><text:span text:style-name="T5">______________________</text:span></text:p><text:p text:style-name="P4">garant specializace</text:p><text:p text:style-name="P4">(oboru)</text:p></draw:text-box></draw:frame></text:p>
      <text:p text:style-name="Standard"><draw:frame draw:style-name="fr4" draw:name="Rámec5" text:anchor-type="char" svg:x="0.042cm" svg:y="0.512cm" svg:width="6.884cm" svg:height="1.27cm" draw:z-index="4"><draw:text-box><text:p text:style-name="P2">Souhlas se zadáním (podpis, datu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fo:font-size="12pt" fo:language="cs" fo:country="CZ"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ab-stops>
          <style:tab-stop style:position="10.001cm"/>
        </style:tab-stops>
      </style:paragraph-properties>
      <style:text-properties fo:font-size="14pt" style:font-size-asian="14pt" style:font-size-complex="10pt"/>
    </style:style>
    <style:style style:name="Title" style:family="paragraph" style:parent-style-name="Standard" style:next-style-name="Subtitle" style:class="chapter">
      <style:paragraph-properties fo:text-align="center" style:justify-single-word="false"/>
      <style:text-properties fo:text-transform="uppercase" fo:font-size="18pt"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ulek" style:family="paragraph" style:parent-style-name="Standard" style:next-style-name="Standard">
      <style:paragraph-properties fo:line-height="150%"/>
      <style:text-properties fo:font-size="14pt" style:font-size-asian="14pt" style:font-size-complex="10pt"/>
    </style:style>
    <style:style style:name="Frame_20_contents" style:display-name="Frame contents" style:family="paragraph" style:parent-style-name="Text_20_body" style:class="extra"/>
    <style:style style:name="Standardní_20_písmo_20_odstavce" style:display-name="Standardní písmo odstavce"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Masarykova univerzita v Brně</dc:title>
    <meta:initial-creator>CVT FI</meta:initial-creator>
    <meta:creation-date>2005-04-19T15:39:00</meta:creation-date>
    <dc:date>2008-04-14T21:48:52</dc:date>
    <meta:editing-cycles>8</meta:editing-cycles>
    <meta:editing-duration>PT24M59S</meta:editing-duration>
    <meta:user-defined meta:name="Informace 1!!"/>
    <meta:user-defined meta:name="Informace 2!!"/>
    <meta:user-defined meta:name="Informace 3!!"/>
    <meta:user-defined meta:name="Informace 4!!"/>
    <meta:document-statistic meta:table-count="0" meta:image-count="1" meta:object-count="0" meta:page-count="1" meta:paragraph-count="27" meta:word-count="134" meta:character-count="1077"/>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Makro pro převod částí textu formátovaných HTML značkami na wordovské
Rem 'formátování. Potřeba vznikla tím, že se data o zadáních diplomek v ISu chtěla
Rem 'hrnout skrze hromadnou korespondenci do wordovské šablony. Makro se spouští z
Rem 'Document_Open na konci souboru.
Rem 
Rem 'Nezpracovávám samostatné &lt;LI&gt; mimo &lt;UL&gt;/&lt;OL&gt;, ignoruji &lt;/LI&gt; (tedy text mezi
Rem '&lt;/LI&gt; a nejbližším následujícím &lt;LI&gt; připojím k předchozí položce seznamu),
Rem '&lt;A HREF... nejsou klikací (předpokládal jsem, že je to pro tisk, ale v případě
Rem 'potřebyne viz dále), nezpracovávám tabulky. U tabulek by v případě potřeby asi
Rem 'nejsnazším řešením bylo mít HTML kód nějak ohraničený už na vstupu, vykousnout
Rem 'ho do souboru, zkonvertovat wordem do wordowského formátu a plácnout zpět. To
Rem 'by ostatně bylo výrazně jednodušší řešení i místo následujícího makra --- a
Rem 'kdybych věděl, kolik mi to zabere času (ano, protože Word je prostě stupidní),
Rem 'kašlal bych na čistotu, že je lepší věci dělat v paměti než si odskakovat na
Rem 'disk, zvlášť, když je to "pro cizí" (různá studijní s obtížněji předvídatelným
Rem 'prostředím) a udělal bych to tak hned. Příště. ;-)
Rem 
Rem 'Je trochu problém s případy, kdy se značka rozvine na něco obsahujícího konec
Rem 'řádku. V HTML (podle MSIE tedy) to funguje tak, že &lt;BR&gt;+ se zobrazí jako
Rem 'odpovídající počet nových řádků, &lt;P&gt;+ se zobrazí jako dva nové řádky. &lt;LI&gt; je
Rem 'obaleno jedním znakem nového řádku před i za, &lt;OL&gt; a &lt;UL&gt; dvěma, s případnými
Rem 'kolemstojícími &lt;BR&gt; a &lt;P&gt; se to ovšem nesčítá, ale bere se maximum. Tohle vše
Rem 'bych byl schopen realizovat i zde, ale bylo by to hrozně složité, takže to
Rem 'dělám tak, že před každý ^p si dávám značku &lt;px&gt; (abych poznal, které ^p jsem
Rem 'vložil já) a nakonec (&lt;px&gt;^p){3,} nahradím ^p^p (plus samozřejmě vyhážu zbylé
Rem '&lt;px&gt;).
Rem Sub Makro()
Rem     'Nahrazení některých triviálních značek
Rem     Selection.Start = ActiveDocument.Content.Start
Rem     Selection.End = Selection.Start
Rem     Selection.Find.ClearFormatting
Rem     Selection.Find.Replacement.ClearFormatting
Rem     With Selection.Find
Rem         .Text = "~"
Rem         .Replacement.Text = "^s"
Rem         .Forward = True
Rem         .Format = False
Rem         .MatchWholeWord = False
Rem         .MatchAllWordForms = False
Rem         .MatchSoundsLike = False
Rem         .MatchWildcards = True
Rem     End With
Rem     Selection.Find.Execute Replace:=wdReplaceAll
Rem     
Rem     'Lidi bohužel nedodržují pokyny o formátovacích značkách
Rem     Selection.Start = ActiveDocument.Content.Start
Rem     Selection.End = Selection.Start
Rem     Selection.Find.ClearFormatting
Rem     Selection.Find.Replacement.ClearFormatting
Rem     With Selection.Find
Rem         .Text = "&amp;nbsp;"
Rem         .Replacement.Text = "^s"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amp;apos;"
Rem         .Replacement.Text = "'"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bB][rR]/\&gt;"
Rem         .Replacement.Text = "&lt;px&gt;^p"
Rem         .Forward = True
Rem         .Format = False
Rem         .MatchWholeWord = False
Rem         .MatchAllWordForms = False
Rem         .MatchSoundsLike = False
Rem         .MatchWildcards = True
Rem     End With
Rem     Selection.Find.Execute Replace:=wdReplaceAll
Rem     
Rem     'Lidi bohužel nedodržují pokyny o formátovacích značkách
Rem     Selection.Start = ActiveDocument.Content.Start
Rem     Selection.End = Selection.Start
Rem     Selection.Find.ClearFormatting
Rem     Selection.Find.Replacement.ClearFormatting
Rem     With Selection.Find
Rem         .Text = "\&lt;[bB][rR]\&gt;"
Rem         .Replacement.Text = "&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pP]/\&gt;"
Rem         .Replacement.Text = "&lt;px&gt;^p&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pP]\&gt;(*)\&lt;/[pP]\&gt;"
Rem         .Replacement.Text = "&lt;px&gt;^p&lt;px&gt;^p\1&lt;px&gt;^p&lt;px&gt;^p"
Rem         .Forward = True
Rem         .Format = False
Rem         .MatchWholeWord = False
Rem         .MatchAllWordForms = False
Rem         .MatchSoundsLike = False
Rem         .MatchWildcards = True
Rem     End With
Rem     Selection.Find.Execute Replace:=wdReplaceAll
Rem     
Rem     'Lidi se neřídí návodem k prezentátoru ;-)
Rem     Selection.Start = ActiveDocument.Content.Start
Rem     Selection.End = Selection.Start
Rem     Selection.Find.ClearFormatting
Rem     Selection.Find.Replacement.ClearFormatting
Rem     With Selection.Find
Rem         .Text = "\&lt;[pP]\&gt;"
Rem         .Replacement.Text = "&lt;px&gt;^p&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bB]\&gt;(*)\&lt;/[bB]\&gt;"
Rem         .Replacement.Text = "\1"
Rem         .Replacement.Font.Bold = True
Rem         .Forward = True
Rem         .Format = Tru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iI]\&gt;(*)\&lt;/[iI]\&gt;"
Rem         With .Replacement
Rem             .Text = "\1"
Rem             .Font.Italic = True
Rem         End With
Rem         .Forward = True
Rem         .Wrap = wdFindContinue
Rem         .Format = Tru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tT][tT]\&gt;(*)\&lt;/[tT][tT]\&gt;"
Rem         With .Replacement
Rem             .Text = "\1"
Rem             .Font.Name = "Courier New"
Rem         End With
Rem         .Forward = True
Rem         .Format = True
Rem         .MatchWholeWord = False
Rem         .MatchAllWordForms = False
Rem         .MatchSoundsLike = False
Rem         .MatchWildcards = True
Rem     End With
Rem     Selection.Find.Execute Replace:=wdReplaceAll
Rem 
Rem     'Nahrazuje &lt;A HREF&gt; modrým podtrženým textem. Hyperlink se dělá takto:
Rem     'ActiveDocument.Hyperlinks.Add Anchor:=Selection.Range, Address:="www", _
Rem     '   SubAddress:="", ScreenTip:="", TextToDisplay:="www"
Rem     'takže by se to muselo procházet postupně a nějak získat \1 a \2 (v
Rem     'nejhorším prostě provést nahrazení a vykopírovat si to z textu)
Rem     Selection.Start = ActiveDocument.Content.Start
Rem     Selection.End = Selection.Start
Rem     Selection.Find.ClearFormatting
Rem     Selection.Find.Replacement.ClearFormatting
Rem     With Selection.Find
Rem         .Text = "\&lt;[aA] [hH][rR][eE][fF]=?(*)?\&gt;(*)\&lt;/[aA]\&gt;"
Rem         With .Replacement
Rem             .Text = "\2"
Rem             .Font.Underline = wdUnderlineSingle
Rem             .Font.ColorIndex = wdBlue
Rem         End With
Rem         .Forward = True
Rem         .Format = True
Rem         .MatchWholeWord = False
Rem         .MatchAllWordForms = False
Rem         .MatchSoundsLike = False
Rem         .MatchWildcards = True
Rem     End With
Rem     Selection.Find.Execute Replace:=wdReplaceAll
Rem 
Rem     'Pokud je za &lt;ul&gt; či &lt;ol&gt; &lt;li&gt;, musíme ho vyhodit, protože jinak bychom
Rem     'dostávali nadbytečnou prázdnou položku na začátku seznamu (&lt;li&gt; by se
Rem     'změnilo na nový řádek/odstavec a odstavce jsou pak konvertovány na
Rem     'položky). Je to načtyřikrát, protože VBA neumí alternaci v "regulárních
Rem     'výrazech" (vyhledávacích vzorech) a dokonce neumí ani "předcházející 0
Rem     'nebo vícekrát".
Rem     Selection.Find.Execute Replace:=wdReplaceAll
Rem     Selection.Start = ActiveDocument.Content.Start
Rem     Selection.End = Selection.Start
Rem     Selection.Find.ClearFormatting
Rem     Selection.Find.Replacement.ClearFormatting
Rem     With Selection.Find
Rem         .Text = "\&lt;[uU][lL]\&gt;\&lt;[lL][iI]\&gt;"
Rem         .Replacement.Text = "&lt;ul&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oO][lL]\&gt;\&lt;[lL][iI]\&gt;"
Rem         .Replacement.Text = "&lt;ol&gt;"
Rem         .Forward = True
Rem         .Format = False
Rem         .Wrap = wdFindContinue
Rem         .MatchWholeWord = False
Rem         .MatchAllWordForms = False
Rem         .MatchSoundsLike = False
Rem         .MatchWildcards = True
Rem     End With
Rem     Selection.Start = ActiveDocument.Content.Start
Rem     Selection.End = Selection.Start
Rem     Selection.Find.ClearFormatting
Rem     Selection.Find.Replacement.ClearFormatting
Rem     With Selection.Find
Rem         .Text = "\&lt;[uU][lL]\&gt; @\&lt;[lL][iI]\&gt;"
Rem         .Replacement.Text = "&lt;ul&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oO][lL]\&gt; @\&lt;[lL][iI]\&gt;"
Rem         .Replacement.Text = "&lt;ol&gt;"
Rem         .Forward = True
Rem         .Format = False
Rem         .Wrap = wdFindContinue
Rem         .MatchWholeWord = False
Rem         .MatchAllWordForms = False
Rem         .MatchSoundsLike = False
Rem         .MatchWildcards = True
Rem     End With
Rem     Selection.Find.Execute Replace:=wdReplaceAll
Rem     
Rem     'Položky seznamu nahradím novým řádkem/znakem konce odstavce, aby se z nich
Rem     'pak při aplikaci seznamové šablony staly položky wordovského seznamu
Rem     Selection.Start = ActiveDocument.Content.Start
Rem     Selection.End = Selection.Start
Rem     Selection.Find.ClearFormatting
Rem     Selection.Find.Replacement.ClearFormatting
Rem     With Selection.Find
Rem         .Text = "\&lt;[lL][iI]\&gt;"
Rem         .Replacement.Text = "&lt;px&gt;^p"
Rem         .Forward = True
Rem         .Format = False
Rem         .Wrap = wdFindContinue
Rem         .MatchWholeWord = False
Rem         .MatchAllWordForms = False
Rem         .MatchSoundsLike = False
Rem         .MatchWildcards = True
Rem     End With
Rem     Selection.Find.Execute Replace:=wdReplaceAll
Rem     
Rem     '&lt;/LI&gt; prostě vyhážu, pokud jsou redundantní s &lt;LI&gt;, je to jedno, pokud
Rem     '(že tedy mezi &lt;/LI&gt; a nejbližším následujícím &lt;LI&gt; je ještě nějaký text,
Rem     'stejně není jasné, jak to zpracovávat (prohlížeče to interpretují různě)
Rem     Selection.Start = ActiveDocument.Content.Start
Rem     Selection.End = Selection.Start
Rem     Selection.Find.ClearFormatting
Rem     Selection.Find.Replacement.ClearFormatting
Rem     With Selection.Find
Rem         .Text = "\&lt;/[lL][iI]\&gt;"
Rem         .Replacement.Text = ""
Rem         .Forward = True
Rem         .Format = False
Rem         .Wrap = wdFindContinue
Rem         .MatchWholeWord = False
Rem         .MatchAllWordForms = False
Rem         .MatchSoundsLike = False
Rem         .MatchWildcards = True
Rem     End With
Rem     Selection.Find.Execute Replace:=wdReplaceAll
Rem     
Rem     'Zpracování nečíslovaného seznamu
Rem     Selection.Start = ActiveDocument.Content.Start
Rem     Selection.End = Selection.Start
Rem     Selection.Find.ClearFormatting
Rem     Selection.Find.Replacement.ClearFormatting
Rem     With Selection.Find
Rem         .Text = "\&lt;[uU][lL]\&gt;(*)\&lt;/[uU][lL]\&gt;"
Rem         .Replacement.Text = "&lt;px&gt;^p&lt;px&gt;^p\1&lt;px&gt;^p&lt;px&gt;^p"
Rem         .Forward = True
Rem         .Format = True
Rem         .Wrap = wdFindContinue
Rem         .MatchWholeWord = False
Rem         .MatchAllWordForms = False
Rem         .MatchSoundsLike = False
Rem         .MatchWildcards = True
Rem     End With
Rem     'S každým chci udělat nějakou operaci složitější, než prosté nahrazení =&gt;
Rem     'musím je probírat v cyklu po jednom
Rem     While Selection.Find.Execute(Replace:=wdReplaceOne)
Rem         'Dva konce řádku před a po nechci zahrnout do seznamu, musím počítat i
Rem         'se značkami &lt;px&gt;, celkem deset znaků
Rem         Selection.Start = Selection.Start + 10
Rem         Selection.End = Selection.End - 10
Rem         Selection.Range.ListFormat.ApplyListTemplate ListTemplate:=ListGalleries( _
Rem             wdBulletGallery).ListTemplates(1), ContinuePreviousList:=False, ApplyTo:= _
Rem             wdListApplyToSelection, DefaultListBehavior:=wdWord10ListBehavior
Rem         'Nutnost tohoto mi trochu uniká.
Rem         Selection.Start = Selection.End
Rem     Wend
Rem 
Rem     'Zpracování číslovaného seznamu, viz nečíslovaný seznam výše
Rem     Selection.Start = ActiveDocument.Content.Start
Rem     Selection.End = Selection.Start
Rem     Selection.Find.ClearFormatting
Rem     Selection.Find.Replacement.ClearFormatting
Rem     With Selection.Find
Rem         .Text = "\&lt;[oO][lL]\&gt;(*)\&lt;/[oO][lL]\&gt;"
Rem         .Replacement.Text = "&lt;px&gt;^p&lt;px&gt;^p\1&lt;px&gt;^p&lt;px&gt;^p"
Rem         .Forward = True
Rem         .Format = True
Rem         .Wrap = wdFindContinue
Rem         .MatchWholeWord = False
Rem         .MatchAllWordForms = False
Rem         .MatchSoundsLike = False
Rem         .MatchWildcards = True
Rem     End With
Rem     While Selection.Find.Execute(Replace:=wdReplaceOne)
Rem         Selection.Start = Selection.Start + 10
Rem         Selection.End = Selection.End - 10
Rem         Selection.Range.ListFormat.ApplyListTemplate ListTemplate:=ListGalleries( _
Rem             wdNumberGallery).ListTemplates(1), ContinuePreviousList:=False, ApplyTo:= _
Rem             wdListApplyToSelection, DefaultListBehavior:=wdWord10ListBehavior
Rem         Selection.Start = Selection.End
Rem     Wend
Rem  
Rem     'Pro případ, že vkládané zadání (případně literatura) začínalo a nebo
Rem     'končilo &lt;p&gt; či &lt;/p&gt;
Rem     Selection.Start = ActiveDocument.Content.Start
Rem     Selection.End = Selection.Start
Rem     Selection.Find.ClearFormatting
Rem     Selection.Find.Replacement.ClearFormatting
Rem     With Selection.Find
Rem         .Text = "\&lt;pom\&gt;\&lt;px\&gt;?\&lt;px\&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om\&gt; @\&lt;px\&gt;?\&lt;px\&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x\&gt;?\&lt;px\&gt;?\&lt;/pom\&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x\&gt;?\&lt;px\&gt;? @\&lt;/pom\&gt;"
Rem         .Replacement.Text = "&lt;/pom&gt;"
Rem         .Forward = True
Rem         .Format = False
Rem         .Wrap = wdFindContinue
Rem         .MatchWholeWord = False
Rem         .MatchAllWordForms = False
Rem         .MatchSoundsLike = False
Rem         .MatchWildcards = True
Rem     End With
Rem     Selection.Find.Execute Replace:=wdReplaceAll
Rem     
Rem     'Náhrada tří a více makrem vložených konců odstavců po sobě dvěma
Rem     Selection.Start = ActiveDocument.Content.Start
Rem     Selection.End = Selection.Start
Rem     Selection.Find.ClearFormatting
Rem     Selection.Find.Replacement.ClearFormatting
Rem     With Selection.Find
Rem         .Text = "\&lt;px\&gt;?\&lt;px\&gt;?(\&lt;px\&gt;?)@"
Rem         .Replacement.Text = "^p^p"
Rem         .Forward = True
Rem         .Format = False
Rem         .Wrap = wdFindContinue
Rem         .MatchWholeWord = False
Rem         .MatchAllWordForms = False
Rem         .MatchSoundsLike = False
Rem         .MatchWildcards = True
Rem     End With
Rem     'Náhrada za ^p^p způsobuje problém, pokud je provedena za seznamem, kdy
Rem     'první znak konce řádku ukončuje poslední položku seznamu. Tehdy se druhý
Rem     'nový řádek také připojí k seznamu a dostane puntík/číslo. Je proto potřeba
Rem     'tyto případy řešit postupně (nikoli wdReplaceAll) a pokud k tomuto dojde,
Rem     'číslování zrušit.
Rem     While Selection.Find.Execute(Replace:=wdReplaceOne)
Rem         If Selection.Characters(2).ListFormat.ListType &lt;&gt; wdListNoNumbering Then _
Rem             Selection.Paragraphs(2).Range.ListFormat.RemoveNumbers
Rem         'Nutnost tohoto mi trochu uniká.
Rem         Selection.Start = Selection.End
Rem     Wend
Rem 
Rem     'Odstranění zbylých pomocných značek &lt;px&gt;
Rem     Selection.Start = ActiveDocument.Content.Start
Rem     Selection.End = Selection.Start
Rem     Selection.Find.ClearFormatting
Rem     Selection.Find.Replacement.ClearFormatting
Rem     With Selection.Find
Rem         .Text = "\&lt;px\&gt;"
Rem         .Replacement.Text = ""
Rem         .Forward = True
Rem         .Format = False
Rem         .Wrap = wdFindContinue
Rem         .MatchWholeWord = False
Rem         .MatchAllWordForms = False
Rem         .MatchSoundsLike = False
Rem         .MatchWildcards = True
Rem     End With
Rem     Selection.Find.Execute Replace:=wdReplaceAll
Rem 
Rem     'Do Zadání a Literatury vložím text, oba tyto odstavce mají nějaké
Rem     'formátování, text pak rozsekám na více odstavců, tyto nové odstavce
Rem     '"zdědí" formátování původního odstavce, ale to my nechceme, takže
Rem     'tady se mění vlastnosti případného druhého a dalšího odstavce (musíme
Rem     'to mít vyznačené značkami, abychom věděli, kde co měnit...
Rem     Selection.Start = ActiveDocument.Content.Start
Rem     Selection.End = Selection.Start
Rem     Selection.Find.ClearFormatting
Rem     Selection.Find.Replacement.ClearFormatting
Rem     With Selection.Find
Rem         .Text = "\&lt;pom\&gt;(*)\&lt;/pom\&gt;"
Rem         .Replacement.Text = "\1"
Rem         .Forward = True
Rem         .Format = False
Rem         .Wrap = wdFindContinue
Rem         .MatchWholeWord = False
Rem         .MatchAllWordForms = False
Rem         .MatchSoundsLike = False
Rem         .MatchWildcards = True
Rem     End With
Rem     While Selection.Find.Execute(Replace:=wdReplaceOne)
Rem         For i = 2 To Selection.Range.Paragraphs.Count
Rem             Selection.Range.Paragraphs(i).LeftIndent = 85.05
Rem             Selection.Range.Paragraphs(i).FirstLineIndent = 0
Rem         Next
Rem         'Nutnost tohoto mi trochu uniká.
Rem         Selection.Start = Selection.End
Rem     Wend
Rem End Sub
Rem 
Rem 'Aargh, je to nekonečně stupidní věc, tohle VBA! Nezvládám přidat čudlík na
Rem 'lištu, aby tam vydržel (navíc se to v různých verzích chová různě), nezvládám
Rem 'říct, že při otevírání dialogu se má začínat v konkrétním adresáři a s
Rem 'konkrétní maskou.
Rem Private Sub Document_Open()
Rem     retVal = MsgBox( _
Rem         "Pokud chcete vybrat data ke sloučení se šablonou, zvolte Yes a vyberte zdroj dat" &amp; vbCrLf &amp; _
Rem         "Pokud data ke sloučení máte již vybrána, zvolte No (proběhne sloučení)" &amp; vbCrLf &amp; _
Rem         "Pokud chcete editovat šablonu, zvolte Cancel", _
Rem         vbYesNoCancel, "Výběr slučovaných dat")
Rem     If retVal = vbCancel Then Exit Sub
Rem     If retVal = vbYes Then Dialogs(wdDialogMailMergeOpenDataSource).Show
Rem     
Rem     'Co je zase tohle za stupidní řešení --- to vytvoří nový dokument, ale
Rem     'nikde na něj není odkaz? (Že bych si měl pamatovat, které v kolekci byly,
Rem     'a dívat se, který přibyl?)
Rem     ActiveDocument.MailMerge.Destination = wdSendToNewDocument
Rem     ActiveDocument.MailMerge.Execute (True)
Rem     
Rem     'Tohle teda předpokládá, že nově vytvořený dokument se zařadí na začátek
Rem     'kolekce. Snad to platí...
Rem     Documents(1).Activate
Rem     Makro
Rem End Sub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