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, 'Times New Roman'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fo:font-style="italic" fo:background-color="#ffff00" style:font-size-asian="11pt" style:font-style-asian="italic" style:font-size-complex="11pt" style:font-style-complex="italic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background-color="#ffff00" style:font-size-asian="11pt" style:font-size-complex="11pt"/>
    </style:style>
    <style:style style:name="P5" style:family="paragraph" style:parent-style-name="Preformatted_20_Text">
      <style:text-properties style:use-window-font-color="true" fo:font-size="11pt" fo:font-style="italic" fo:background-color="#ff6633" style:font-size-asian="11pt" style:font-style-asian="italic" style:font-size-complex="11pt" style:font-style-complex="italic"/>
    </style:style>
    <style:style style:name="P6" style:family="paragraph" style:parent-style-name="Preformatted_20_Text" style:master-page-name="Standard">
      <style:paragraph-properties style:page-number="auto"/>
    </style:style>
    <style:style style:name="P7" style:family="paragraph" style:parent-style-name="Preformatted_20_Text">
      <style:text-properties fo:font-size="11pt" fo:font-style="italic" fo:background-color="#ffff00" style:font-size-asian="11pt" style:font-style-asian="italic" style:font-size-complex="11pt" style:font-style-complex="italic"/>
    </style:style>
    <style:style style:name="P8" style:family="paragraph" style:parent-style-name="Preformatted_20_Text">
      <style:text-properties fo:font-size="11pt" style:font-size-asian="11pt" style:font-size-complex="11pt"/>
    </style:style>
    <style:style style:name="P9" style:family="paragraph" style:parent-style-name="Preformatted_20_Text" style:list-style-name="L1">
      <style:text-properties fo:font-size="11pt" style:font-size-asian="11pt" style:font-size-complex="11pt"/>
    </style:style>
    <style:style style:name="P10" style:family="paragraph" style:parent-style-name="Preformatted_20_Text" style:list-style-name="L2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4" style:family="text">
      <style:text-properties fo:font-size="11pt" fo:background-color="transparen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background-color="#ffff00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tudent:</text:span><text:span text:style-name="T1"> Jiří Slabý</text:span></text:p>
      <text:p text:style-name="Preformatted_20_Text"><text:span text:style-name="T2">Školitel:</text:span><text:span text:style-name="T1"> prof. RNDr. Antonín Kučera, Ph.D.</text:span></text:p>
      <text:p text:style-name="Preformatted_20_Text"><text:span text:style-name="T2">Škola:</text:span><text:span text:style-name="T1"> FI MU</text:span></text:p>
      <text:p text:style-name="Preformatted_20_Text"><text:span text:style-name="T2">Ročník:</text:span><text:span text:style-name="T1"> 3.</text:span></text:p>
      <text:p text:style-name="Preformatted_20_Text"><text:span text:style-name="T2">Předpokládaný název disertační práce (</text:span><text:span text:style-name="T3">nebo Název disertační práce</text:span><text:span text:style-name="T2">):</text:span><text:span text:style-name="T1"> Automatic Bug-finding Techniques for Linux Kernel</text:span></text:p>
      <text:p text:style-name="P2"/>
      <text:p text:style-name="Preformatted_20_Text"><text:span text:style-name="T2">Stručná charakteristika studia v roce 2010:</text:span><text:span text:style-name="T1"> Student vedl jeden kurz na FI MUNI, účastnil se vybraných seminářů na FI MU (včetně 1~aktivního vystoupení), složil státní doktorskou zkoušku a obhájil teze své disertační práce. Ve výzkumu se zaměřil na oblast statické analýzy jádra operačního systému Linux a vytvořil prototyp \cite{Slaby10a}.</text:span></text:p>
      <text:p text:style-name="P2"/>
      <text:p text:style-name="P2"><text:s text:c="2"/>[[ Ve výše uvedeném prosím odstraňte oproti původní verzi zprávy číselnou vazbu na publikace, v systému </text:p>
      <text:p text:style-name="P2"><text:s text:c="7"/>GAČRu není rozumně realizovatelná, namísto toho uveďte alespoň zkratkou příslušné konference, časopisy, </text:p>
      <text:p text:style-name="P2"><text:s text:c="7"/>nástroje apod. ]]</text:p>
      <text:p text:style-name="P2"/>
      <text:p text:style-name="P1"><text:span text:style-name="T5">Uplatněné výsledky</text:span></text:p>
      <text:p text:style-name="P1"/>
      <text:p text:style-name="P1"><text:s text:c="3"/>1. Termín „uplatněný výsledek” znamená, že článek nebo kniha již vyšly, patent byl udělen.</text:p>
      <text:p text:style-name="P1"><text:s text:c="3"/>2. Podmínkou uznání výsledku je jeho explicitní dedikace na projekt. Odpověď NE ve sloupci „Dedikace na </text:p>
      <text:p text:style-name="P1"><text:s text:c="7"/>projekt”musí být podložena sdělením, že vydavatel (redakce) uvádění dedikací nepřipouští.</text:p>
      <text:p text:style-name="P1"/>
      <text:p text:style-name="P2"><text:s text:c="2"/>[[ Prosím upravte výsledky do níže uvedené podoby. <text:s/>]]</text:p>
      <text:p text:style-name="P1"/>
      <text:p text:style-name="P5"><text:s text:c="2"/>[[ Zvlášť si všimněte, že u každé publikace je nutno uvést, zda je či není s dedikací. Ověřte si to -- potvrzení </text:p>
      <text:p text:style-name="P5"><text:s text:c="6"/>nesprávné hodnoty může mít drastické dopady. Publikace bez dedikace nelze uvést (s výjimkou, kdy doložíte </text:p>
      <text:p text:style-name="P5"><text:s text:c="6"/>sdělení dle bodu 2 výše!!!! ]]</text:p>
      <text:p text:style-name="P1"/>
      <text:p text:style-name="P4"><text:s/><text:span text:style-name="T7"><text:s/>[[ Níže uvedené záznamy vytvořte pro každý výstup: ]]</text:span></text:p>
      <text:p text:style-name="P1"/>
      <text:p text:style-name="P3">A1. Výsledek J - Článek v odborném časopisu</text:p>
      <text:p text:style-name="P1"/>
      <text:p text:style-name="P3">A1a. Jimp (článek v odborném periodiku, který je obsažen v databázi Web of Science společností Thomson Reuters)</text:p>
      <text:p text:style-name="P1"/>
      <text:p text:style-name="P1">Autor, autoři:</text:p>
      <text:p text:style-name="P1">Název článku:</text:p>
      <text:p text:style-name="P1">Název časopisu, rok, volume, stránka od, stránka do:</text:p>
      <text:p text:style-name="P1">Dedikace na projekt: ANO x NE</text:p>
      <text:p text:style-name="P1"/>
      <text:p text:style-name="P3">A1b. Jneimp (článek v odborném periodiku, který je obsažen ve světově uznávané databázi ERIH nebo Scopus</text:p>
      <text:p text:style-name="P1"/>
      <text:p text:style-name="P1">Autor, autoři:</text:p>
      <text:p text:style-name="P1">Název článku:</text:p>
      <text:p text:style-name="P1">Název časopisu, rok, volume, stránka od, stránka do:</text:p>
      <text:p text:style-name="P1">Dedikace na projekt: ANO x NE</text:p>
      <text:p text:style-name="P1"/>
      <text:p text:style-name="P3">A1c. Jrec (článek v odborném periodiku,které je zařazeno v Seznamu neimpaktovaných recenzovaných periodik vydávaných v České republice)</text:p>
      <text:p text:style-name="P1"/>
      <text:p text:style-name="P1">Autor, autoři:</text:p>
      <text:p text:style-name="P1">Název článku:</text:p>
      <text:p text:style-name="P1"><text:soft-page-break/>Název časopisu, rok, volume, stránka od, stránka do:</text:p>
      <text:p text:style-name="P1">Dedikace na projekt: ANO x NE</text:p>
      <text:p text:style-name="P1"/>
      <text:p text:style-name="P3">A2. Výsledek D - Článek ve sborníku konference (pouze autorské, nikoliv editorské příspěvky ve sbornících evidovaných v Conference Proceedings Citation Index, Thomson Reuters)</text:p>
      <text:p text:style-name="P1"/>
      <text:p text:style-name="P1">Autor, autoři:<text:tab/> </text:p>
      <text:p text:style-name="P1">Název článku:<text:tab/> </text:p>
      <text:p text:style-name="P1">Název konference, rok, volume, stránka od, stránka do:<text:tab/> </text:p>
      <text:p text:style-name="P1">Dedikace na projekt: ANO x NE</text:p>
      <text:p text:style-name="P1"/>
      <text:p text:style-name="P3">A3. Výsledek B - Odborná kniha</text:p>
      <text:p text:style-name="P1"/>
      <text:p text:style-name="P1">Autor, autoři:<text:tab/> </text:p>
      <text:p text:style-name="P1">Název knihy:<text:tab/> </text:p>
      <text:p text:style-name="P1">Vydavatel, místo, rok:<text:tab/> </text:p>
      <text:p text:style-name="P1">Dedikace na projekt: ANO x NE</text:p>
      <text:p text:style-name="P1"/>
      <text:p text:style-name="P3">A4. Výsledek C - Kapitola v odborné knize</text:p>
      <text:p text:style-name="P1"/>
      <text:p text:style-name="P1">Autor, autoři:<text:tab/> </text:p>
      <text:p text:style-name="P1">Editoři a název knihy:<text:tab/> </text:p>
      <text:p text:style-name="P1">Název kapitoly:<text:tab/> </text:p>
      <text:p text:style-name="P1">Vydavatel, místo, rok:<text:tab/> </text:p>
      <text:p text:style-name="P1">Dedikace na projekt: ANO x NE</text:p>
      <text:p text:style-name="P1"/>
      <text:p text:style-name="P3">A5. Výsledek P - Patent</text:p>
      <text:p text:style-name="P1"/>
      <text:p text:style-name="P1">Původce:<text:tab/> </text:p>
      <text:p text:style-name="P1">Název patentu:<text:tab/> </text:p>
      <text:p text:style-name="P1">Číslo patentu:<text:tab/> </text:p>
      <text:p text:style-name="P1">Patentový úřad:<text:tab/> </text:p>
      <text:p text:style-name="P1">Vlastník patentu:</text:p>
      <text:p text:style-name="P1"/>
      <text:p text:style-name="P3">B. Výsledek nevstupující do RIV</text:p>
      <text:p text:style-name="P1"/>
      <text:p text:style-name="P1">Popis výsledku:<text:tab/> </text:p>
      <text:p text:style-name="P1">Autoři:<text:tab/> </text:p>
      <text:p text:style-name="P1">Název výsledku:<text:tab/> </text:p>
      <text:p text:style-name="P1">Bibliografické údaje:<text:tab/> </text:p>
      <text:p text:style-name="P1">Dedikace na projekt: ANO x NE</text:p>
      <text:p text:style-name="P1"/>
      <text:p text:style-name="P3">Dosud neuplatněné výsledky</text:p>
      <text:p text:style-name="P1"/>
      <text:p text:style-name="P3">A1. Článek v odborném časopise</text:p>
      <text:p text:style-name="P1"/>
      <text:p text:style-name="P1">Typ článku: Jimp/Jneimp/Jrec (viz výše)</text:p>
      <text:p text:style-name="P1">Autor, autoři:<text:tab/> </text:p>
      <text:p text:style-name="P1">Název článku:<text:tab/> </text:p>
      <text:p text:style-name="P1">Název časopisu, rok, volume, stránka od, stránka do:<text:tab/> </text:p>
      <text:p text:style-name="P1">Dedikace na projekt: ANO x NE</text:p>
      <text:p text:style-name="P1">Stav uplatnění - zasláno do redakce: </text:p>
      <text:p text:style-name="P1">Stav uplatnění - přijato dne:</text:p>
      <text:p text:style-name="P1"><text:soft-page-break/></text:p>
      <text:p text:style-name="P3">A2. Článek ve sborníku konference (pouze autorské, nikoliv editorské příspěvky ve sbornících evidovaných v Conference Proceedings Citation Index, Thomson Reuters)</text:p>
      <text:p text:style-name="P1"/>
      <text:p text:style-name="P1">Autor, autoři:<text:tab/> </text:p>
      <text:p text:style-name="P1">Název článku:<text:tab/> </text:p>
      <text:p text:style-name="P1">Název konference,rok:<text:tab/> </text:p>
      <text:p text:style-name="P1">Dedikace na projekt: ANO x NE</text:p>
      <text:p text:style-name="P1">Stav uplatnění - zasláno do redakce:</text:p>
      <text:p text:style-name="P1">Stav uplatnění - přijato dne:</text:p>
      <text:p text:style-name="P1"/>
      <text:p text:style-name="P3">A3. Odborná kniha</text:p>
      <text:p text:style-name="P1"/>
      <text:p text:style-name="P1">Autor, autoři:<text:tab/> </text:p>
      <text:p text:style-name="P1">Název knihy:<text:tab/> </text:p>
      <text:p text:style-name="P1">Vydavatel:<text:tab/> </text:p>
      <text:p text:style-name="P1">Dedikace na projekt:<text:tab/> </text:p>
      <text:p text:style-name="P1">Stav uplatnění - zasláno do redakce:</text:p>
      <text:p text:style-name="P1">Stav uplatnění - přijato dne:</text:p>
      <text:p text:style-name="P1"/>
      <text:p text:style-name="P3">A4. Kapitola v odborné knize</text:p>
      <text:p text:style-name="P1"/>
      <text:p text:style-name="P1">Autor, autoři kapitoly:<text:tab/> </text:p>
      <text:p text:style-name="P1">Editoři a název knihy:<text:tab/> </text:p>
      <text:p text:style-name="P1">Název kapitoly:<text:tab/> </text:p>
      <text:p text:style-name="P1">Vydavatel:<text:tab/> </text:p>
      <text:p text:style-name="P1">Dedikace na projekt:<text:tab/> </text:p>
      <text:p text:style-name="P1">Stav uplatnění - zasláno do redakce:</text:p>
      <text:p text:style-name="P1">Stav uplatnění - přijato dne:</text:p>
      <text:p text:style-name="P1"/>
      <text:p text:style-name="P3">A5. Přihláška patentu</text:p>
      <text:p text:style-name="P1"/>
      <text:p text:style-name="P1">Původci:<text:tab/> </text:p>
      <text:p text:style-name="P1">Název patentu:<text:tab/> </text:p>
      <text:p text:style-name="P1">Číslo patentové přihlášky:<text:tab/> </text:p>
      <text:p text:style-name="P1">Patentový úřad:<text:tab/> </text:p>
      <text:p text:style-name="P1">Vlastník patentu:<text:tab/> </text:p>
      <text:p text:style-name="P1">Datum přihlášení patentu:</text:p>
      <text:p text:style-name="P1"/>
      <text:p text:style-name="P3">B. Výsledky nevstupující do RIV</text:p>
      <text:p text:style-name="P1"/>
      <text:p text:style-name="P1">Popis:<text:tab/> </text:p>
      <text:p text:style-name="P1">Autoři:<text:tab/> </text:p>
      <text:p text:style-name="P1">Název výsledku:<text:tab/> </text:p>
      <text:p text:style-name="P1">Bibliografické údaje:<text:tab/> </text:p>
      <text:p text:style-name="P1">Dedikace na projekt : ANO x NE</text:p>
      <text:p text:style-name="P1">Stav uplatnění výsledku - zasláno dne:<text:tab/> </text:p>
      <text:p text:style-name="P1">Stav uplatnění výsledku - přijato dne:</text:p>
      <text:p text:style-name="P1"/>
      <text:p text:style-name="P3">Krátké zprávy ze zahraničních cest: </text:p>
      <text:p text:style-name="P1"/>
      <text:list xml:id="list963823074" text:style-name="L1">
        <text:list-item>
          <text:p text:style-name="P9">Ing. A. Vopršálek, Paphos, Kypr, 10.--20.3.2010: prezentace článku „Bflm Psvz“ (A. Vopršálek, B. Vopršálek, C. Vopršálek) na konferenci ETAPS'10.</text:p>
        </text:list-item>
      </text:list>
      <text:p text:style-name="P1"><text:soft-page-break/></text:p>
      <text:p text:style-name="P2"><text:s text:c="14"/>[[ Prosím upravte zprávu o účasti do výše uvedeného formátu -- v systému GA ČR nelze rozumně</text:p>
      <text:p text:style-name="P2"><text:s text:c="18"/>realizovat křížové odkazy. ]]</text:p>
      <text:p text:style-name="P1"/>
      <text:list xml:id="list1637950157" text:style-name="L2">
        <text:list-item>
          <text:p text:style-name="P10">Ing. A. Vopršálek, NATO Marktoberdorf Summer School, Marktoberdorf, Německo, 10.--20.3.2010: Na letní škole student získal podrobné informace o možnostech efektivní likvidace brouků, které využije při práci na další části své práce zaměřené na brouky. Navíc navázal kontakt s dr. Broukobijcem, který ho pozval k návštěvě svého ústavu, s možností přípravy společné publikace zaměřené na likvidaci brouků vysavači.</text:p>
        </text:list-item>
        <text:list-item>
          <text:p text:style-name="P10">Mgr. A. Strcprstskrzkrk, pracovní pobyt v laboratoři krční chirurgie, Guantanamo, Kuba, 10.--20.3.2010. Pobyt byl využit k intenzívnímu společnému výzkumu metod vyšetření krku, který směřuje ke společné publikaci na vybrané konferenci (pravděpodobně Butchers'10) a který bude přínosem k části disertační práce studenta věnované...</text:p>
        </text:list-item>
        <text:list-item>
          <text:p text:style-name="P10">Mgr. A. Strcprstskrzkrk, účast na konferenci Joke'10, South Pole, Antarctica, 10.--20.3.2010. Účast na prestižní konferenci zaměřené na zpracování polárních ježků, kde student získal nejnovější poznatky využitelné v rámci <text:s/>jeho výzkumu pokročilých metod sušení ježčích steaků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, 'Times New Roman'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font-name-asian="DejaVu Sans1" style:font-size-asian="12pt" style:language-asian="cs" style:country-asian="CZ" style:font-name-complex="DejaVu Sans1" style:font-size-complex="12pt" style:language-complex="cs" style:country-complex="CZ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11M11S</meta:editing-duration>
    <meta:generator>LibreOffice/3.3$Unix LibreOffice_project/330m17$Build-3</meta:generator>
    <meta:document-statistic meta:table-count="0" meta:image-count="0" meta:object-count="0" meta:page-count="4" meta:paragraph-count="115" meta:word-count="812" meta:character-count="5578"/>
    <dc:date>2010-12-09T23:35:03</dc:date>
    <dc:creator>Jiri Slaby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