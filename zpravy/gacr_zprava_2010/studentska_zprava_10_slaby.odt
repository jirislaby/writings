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, 'Times New Roman'"/>
    <style:font-face style:name="OpenSymbol" svg:font-family="Open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1pt" fo:font-style="italic" fo:background-color="#ffff00" style:font-size-asian="11pt" style:font-style-asian="italic" style:font-size-complex="11pt" style:font-style-complex="italic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style:use-window-font-color="true" fo:font-size="11pt" fo:font-style="italic" fo:background-color="#ff6633" style:font-size-asian="11pt" style:font-style-asian="italic" style:font-size-complex="11pt" style:font-style-complex="italic"/>
    </style:style>
    <style:style style:name="P5" style:family="paragraph" style:parent-style-name="Preformatted_20_Text" style:master-page-name="Standard">
      <style:paragraph-properties style:page-number="auto"/>
    </style:style>
    <style:style style:name="P6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style:font-size-asian="11pt" style:font-size-complex="11pt"/>
    </style:style>
    <style:style style:name="P8" style:family="paragraph" style:parent-style-name="Preformatted_20_Text" style:list-style-name="L2">
      <style:text-properties fo:font-size="11pt" style:font-size-asian="11pt" style:font-size-complex="11pt"/>
    </style:style>
    <style:style style:name="P9" style:family="paragraph" style:parent-style-name="Preformatted_20_Text">
      <style:text-properties fo:font-size="11pt" fo:font-style="italic" fo:background-color="#ffff00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tudent:</text:span><text:span text:style-name="T1"> Jiří Slabý</text:span></text:p>
      <text:p text:style-name="Preformatted_20_Text"><text:span text:style-name="T2">Školitel:</text:span><text:span text:style-name="T1"> prof. RNDr. Antonín Kučera, Ph.D.</text:span></text:p>
      <text:p text:style-name="Preformatted_20_Text"><text:span text:style-name="T2">Škola:</text:span><text:span text:style-name="T1"> FI MU</text:span></text:p>
      <text:p text:style-name="Preformatted_20_Text"><text:span text:style-name="T2">Ročník:</text:span><text:span text:style-name="T1"> 3.</text:span></text:p>
      <text:p text:style-name="Preformatted_20_Text"><text:span text:style-name="T2">Předpokládaný název disertační práce (</text:span><text:span text:style-name="T3">nebo Název disertační práce</text:span><text:span text:style-name="T2">):</text:span><text:span text:style-name="T1"> Automatic Bug-finding Techniques for Linux Kernel</text:span></text:p>
      <text:p text:style-name="P2"/>
      <text:p text:style-name="Preformatted_20_Text"><text:span text:style-name="T2">Stručná charakteristika studia v roce 2010:</text:span><text:span text:style-name="T1"> Student vedl jeden kurz na FI MUNI, účastnil se vybraných seminářů na FI MU (včetně 1 aktivního vystoupení), složil státní doktorskou zkoušku a obhájil teze své disertační práce. Ve výzkumu se zaměřil na oblast statické analýzy jádra operačního systému Linux a vytvořil prototyp Stanse.</text:span></text:p>
      <text:p text:style-name="P2"/>
      <text:p text:style-name="P3">Uplatněné výsledky</text:p>
      <text:p text:style-name="P1"/>
      <text:p text:style-name="P1"><text:s text:c="3"/>1. Termín „uplatněný výsledek” znamená, že článek nebo kniha již vyšly, patent byl udělen.</text:p>
      <text:p text:style-name="P1"><text:s text:c="3"/>2. Podmínkou uznání výsledku je jeho explicitní dedikace na projekt. Odpověď NE ve sloupci „Dedikace na </text:p>
      <text:p text:style-name="P1"><text:s text:c="7"/>projekt”musí být podložena sdělením, že vydavatel (redakce) uvádění dedikací nepřipouští.</text:p>
      <text:p text:style-name="P1"/>
      <text:p text:style-name="P1"><text:span text:style-name="T4">Krátké zprávy ze zahraničních cest: </text:span></text:p>
      <text:p text:style-name="P1"/>
      <text:list xml:id="list592626802" text:style-name="L2">
        <text:list-item>
          <text:p text:style-name="P8">J. Slabý, EmbeddedWorld 2010, Norimberk, Německo, 2.-3.3.2010, prezentace nástroje Stanse. Zvaná přednáška na téma statické kontroly kódu a předvedení nástroje Stan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, 'Times New Roman'"/>
    <style:font-face style:name="OpenSymbol" svg:font-family="Open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cs" fo:country="CZ" style:font-name-asian="DejaVu Sans1" style:font-size-asian="12pt" style:language-asian="cs" style:country-asian="CZ" style:font-name-complex="DejaVu Sans1" style:font-size-complex="12pt" style:language-complex="cs" style:country-complex="CZ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17M49S</meta:editing-duration>
    <meta:generator>LibreOffice/3.3$Unix LibreOffice_project/330m17$Build-3</meta:generator>
    <dc:date>2010-12-14T23:02:42</dc:date>
    <dc:creator>Jiri Slaby</dc:creator>
    <meta:editing-cycles>2</meta:editing-cycles>
    <meta:document-statistic meta:table-count="0" meta:image-count="0" meta:object-count="0" meta:page-count="1" meta:paragraph-count="12" meta:word-count="149" meta:character-count="1049"/>
    <meta:user-defined meta:name="Info 1"/>
    <meta:user-defined meta:name="Info 2"/>
    <meta:user-defined meta:name="Info 3"/>
    <meta:user-defined meta:name="Info 4"/>
  </office:meta>
</office:document-meta>
</file>