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E0000003BF8AB7B8A.png"/>
  <manifest:file-entry manifest:media-type="image/png" manifest:full-path="Pictures/10000000000000E7000000F2E4FE090F.png"/>
  <manifest:file-entry manifest:media-type="image/png" manifest:full-path="Pictures/10000000000001E0000001B80D33F7CA.png"/>
  <manifest:file-entry manifest:media-type="image/png" manifest:full-path="Pictures/100000000000030900000158F129C85C.png"/>
  <manifest:file-entry manifest:media-type="image/png" manifest:full-path="Pictures/10000000000002040000021FB2F1EF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9cm" draw:marker-start-width="0.46cm" draw:marker-end-width="0.46cm" draw:textarea-horizontal-align="center" draw:textarea-vertical-align="middle" fo:padding-top="0.045cm" fo:padding-bottom="0.045cm" fo:padding-left="0.045cm" fo:padding-right="0.04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ýchozí-subtitle">
      <style:graphic-properties draw:fill-color="#ffffff" fo:min-height="3.757cm"/>
    </style:style>
    <style:style style:name="pr2" style:family="presentation" style:parent-style-name="Výchozí-title">
      <style:graphic-properties draw:fill-color="#ffffff" fo:min-height="3.819cm"/>
    </style:style>
    <style:style style:name="pr3" style:family="presentation" style:parent-style-name="Výchozí-notes">
      <style:graphic-properties draw:fill-color="#ffffff" draw:auto-grow-height="true" fo:min-height="11.41cm"/>
    </style:style>
    <style:style style:name="pr4" style:family="presentation" style:parent-style-name="Výchozí-title">
      <style:graphic-properties draw:fill-color="#ffffff" draw:auto-grow-height="true" fo:min-height="2.643cm"/>
    </style:style>
    <style:style style:name="pr5" style:family="presentation" style:parent-style-name="Výchozí-outline1">
      <style:graphic-properties draw:fill-color="#ffffff" draw:auto-grow-height="true" fo:min-height="15.137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36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fo:text-indent="-0.9cm"/>
      <style:text-properties fo:font-size="28pt" fo:language="en" fo:country="GB" style:font-size-asian="32pt" style:font-size-complex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5cm" fo:margin-right="0cm" fo:margin-top="0.4cm" fo:margin-bottom="0cm" text:enable-numbering="false" fo:text-indent="-5cm">
        <style:tab-stops/>
      </style:paragraph-properties>
    </style:style>
    <style:style style:name="P13" style:family="paragraph">
      <style:paragraph-properties fo:margin-left="1.2cm" fo:margin-right="0cm" fo:text-align="start" text:enable-numbering="false" fo:text-indent="-0.9cm"/>
    </style:style>
    <style:style style:name="P14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family="Arial" style:font-family-generic="swiss" style:font-pitch="variable" fo:font-size="20pt"/>
    </style:style>
    <style:style style:name="T2" style:family="text">
      <style:text-properties fo:color="#000000" fo:font-family="'Courier New'" style:font-family-generic="modern" style:font-pitch="fixed" fo:font-size="16pt"/>
    </style:style>
    <style:style style:name="T3" style:family="text">
      <style:text-properties fo:font-size="36pt" fo:font-weight="bold"/>
    </style:style>
    <style:style style:name="T4" style:family="text">
      <style:text-properties fo:font-size="28pt" fo:language="en" fo:country="GB" style:font-size-asian="32pt" style:font-size-complex="32pt"/>
    </style:style>
    <style:style style:name="T5" style:family="text">
      <style:text-properties fo:font-family="Math1" style:font-style-name="Regular" style:font-pitch="variable" fo:font-size="28pt" fo:language="en" fo:country="GB" style:font-family-asian="Math1" style:font-style-name-asian="Regular" style:font-pitch-asian="variable" style:font-size-asian="32pt" style:font-family-complex="Math1" style:font-style-name-complex="Regular" style:font-pitch-complex="variable" style:font-size-complex="32pt"/>
    </style:style>
    <style:style style:name="T6" style:family="text">
      <style:text-properties fo:font-size="28pt" fo:language="en" fo:country="GB" fo:font-weight="bold" style:font-size-asian="32pt" style:font-weight-asian="bold" style:font-size-complex="32pt" style:font-weight-complex="bold"/>
    </style:style>
    <style:style style:name="T7" style:family="text">
      <style:text-properties fo:font-size="28pt" fo:language="en" fo:country="GB" fo:font-weight="normal" style:font-size-asian="32pt" style:font-weight-asian="normal" style:font-size-complex="32pt" style:font-weight-complex="normal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0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11" style:family="text">
      <style:text-properties fo:font-size="54pt" fo:language="en" fo:country="GB" style:font-size-asian="54pt" style:font-size-complex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21">
        <office:forms form:automatic-focus="false" form:apply-design-mode="false"/>
        <draw:line draw:style-name="gr1" draw:text-style-name="P1" draw:layer="layout" svg:x1="1.653cm" svg:y1="2.82cm" svg:x2="26.391cm" svg:y2="2.82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593cm" svg:y1="17.635cm" svg:x2="26.331cm" svg:y2="17.635cm">
          <text:p text:style-name="P3"/>
        </draw:line>
        <draw:frame presentation:style-name="pr1" draw:text-style-name="P3" draw:layer="layout" svg:width="23.911cm" svg:height="3.757cm" svg:x="2.097cm" svg:y="8.017cm">
          <draw:text-box>
            <text:list text:style-name="L1">
              <text:list-item>
                <text:list>
                  <text:list-item>
                    <text:p text:style-name="P2"><text:span text:style-name="T1">Jiri Slab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slaby@liberouter.or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3.911cm" svg:height="3.819cm" svg:x="2.022cm" svg:y="4.27cm" presentation:class="title" presentation:user-transformed="true">
          <draw:text-box>
            <text:p text:style-name="P4"><text:span text:style-name="T3">Szedata v. 2</text:span></text:p>
          </draw:text-box>
        </draw:frame>
        <draw:frame draw:style-name="gr2" draw:text-style-name="P1" draw:layer="layout" svg:width="9.259cm" svg:height="1.56cm" svg:x="9.695cm" svg:y="13.13cm">
          <draw:image xlink:href="Pictures/100000000000015E0000003BF8AB7B8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roductio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Fast transfers without copying data</text:span></text:p>
              </text:list-item>
            </text:list>
            <text:list text:style-name="L2">
              <text:list-item>
                <text:p text:style-name="P7"><text:span text:style-name="T4">Szedata is that, so why szedata2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ew platform (NetCOP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</text:span><text:span text:style-name="T4"> </text:span><text:span text:style-name="T4">new concept, new desi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Incompati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no PP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different data forma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imilar approach in conce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mmap, subscribe, lock, unlo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RX, TX spaces</text:span></text:p>
              </text:list-item>
            </text:list>
            <text:list text:style-name="L2">
              <text:list-item>
                <text:p text:style-name="P7"><text:span text:style-name="T4">N areas (interfaces)</text:span></text:p>
              </text:list-item>
            </text:list>
            <text:list text:style-name="L2">
              <text:list-item>
                <text:p text:style-name="P7"><text:span text:style-name="T4">2*N ring buffer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Wraps, tail=h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sees only 2 spa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Two approa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ll data to all apps</text:span><text:span text:style-name="T4"><text:line-break/></text:span><text:span text:style-name="T4">(different task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Data divided among</text:span><text:span text:style-name="T4"><text:line-break/></text:span><text:span text:style-name="T4">more apps (load balance)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549cm" svg:height="12.099cm" svg:x="14.705cm" svg:y="4.598cm">
          <draw:image xlink:href="Pictures/10000000000000E7000000F2E4FE090F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Data format</text:span></text:p>
              </text:list-item>
            </text:list>
            <text:list text:style-name="L2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4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6">Each application wants all data</text:span></text:p>
              </text:list-item>
            </text:list>
            <text:list text:style-name="L2">
              <text:list-item>
                <text:p text:style-name="P7"><text:span text:style-name="T4">We need keep these pointers (per ring buffer)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ail and head of H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RX: tail, h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TX: only locked s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Only one writer at a ti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4">The slowest application might block others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erface</text:p>
          </draw:text-box>
        </draw:frame>
        <draw:frame presentation:style-name="pr5" draw:text-style-name="P10" draw:layer="layout" svg:width="24.268cm" svg:height="15.311cm" svg:x="1.739cm" svg:y="3.553cm" presentation:class="outline" presentation:user-transformed="true">
          <draw:text-box>
            <text:list text:style-name="L2">
              <text:list-item>
                <text:p text:style-name="P7"><text:span text:style-name="T4">Open</text:span></text:p>
              </text:list-item>
            </text:list>
            <text:list text:style-name="L2">
              <text:list-item>
                <text:p text:style-name="P7"><text:span text:style-name="T4">M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atus_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pa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Subscribe</text:span></text:p>
              </text:list-item>
            </text:list>
            <text:list text:style-name="L2">
              <text:list-item>
                <text:p text:style-name="P7"><text:span text:style-name="T4">Start</text:span></text:p>
              </text:list-item>
            </text:list>
            <text:list text:style-name="L2">
              <text:list-item>
                <text:p text:style-name="P7"><text:span text:style-name="T4">Repeat { Wait</text:span></text:p>
              </text:list-item>
            </text:list>
            <text:list text:style-name="L2">
              <text:list-item>
                <text:p text:style-name="P7"><text:span text:style-name="T4">Lock</text:span></text:p>
              </text:list-item>
            </text:list>
            <text:list text:style-name="L2">
              <text:list-item>
                <text:p text:style-name="P7"><text:span text:style-name="T4">Unlock }</text:span></text:p>
              </text:list-item>
            </text:list>
            <text:list text:style-name="L2">
              <text:list-item>
                <text:p text:style-name="P7"><text:span text:style-name="T4">Close</text:span></text:p>
              </text:list-item>
            </text:list>
          </draw:text-box>
        </draw:frame>
        <draw:frame draw:style-name="gr4" draw:text-style-name="P1" draw:layer="layout" svg:width="17.293cm" svg:height="17.371cm" svg:x="10.415cm" svg:y="2.915cm">
          <draw:image xlink:href="Pictures/10000000000002040000021FB2F1EF73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erface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Up to 11 spac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RX, TX (area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ats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Everything in</text:span><text:span text:style-name="T4"><text:line-break/></text:span><text:span text:style-name="T4">status_page</text:span><text:span text:style-name="T4"><text:line-break/></text:span><text:span text:style-name="T4">(depicted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PAGE_SIZE</text:span><text:span text:style-name="T4"><text:line-break/></text:span><text:span text:style-name="T4">anyway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6.739cm" svg:height="16.989cm" svg:x="10.881cm" svg:y="2.953cm">
          <draw:image xlink:href="Pictures/10000000000001E0000001B80D33F7C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Status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Working non-HW dependant layer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ested only on simulator – a module which </text:span><text:span text:style-name="T6">tries </text:span><text:span text:style-name="T7">to behave as the card, no known bugs :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Libsze2 (see late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zetest2 – a testing applic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Design driver in few week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Fill in ring buffer descrip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etup DMA transf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tart/stop H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The rest is on the layer (counting pointers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Unlike szedata, szedata2 provides its library</text:span></text:p>
              </text:list-item>
            </text:list>
            <text:list text:style-name="L2">
              <text:list-item>
                <text:p text:style-name="P7"><text:span text:style-name="T4">Encapsulate init/deinit and processing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o more mmaps, ioctls – abstra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Easy to upgrade/change – dynamic librar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Code (SVN): software/trunk/libs/libsze2</text:span></text:p>
              </text:list-item>
            </text:list>
            <text:list text:style-name="L2">
              <text:list-item>
                <text:p text:style-name="P7"><text:span text:style-name="T4">Docco: </text:span><text:span text:style-name="T4"><text:a xlink:href="http://andre.liberouter.org/~slaby/libsze2_api/">http://andre.liberouter.org/~slaby/libsze2_api/</text:a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 cont.</text:p>
          </draw:text-box>
        </draw:frame>
        <draw:frame presentation:style-name="pr5" draw:text-style-name="P10" draw:layer="layout" svg:width="24.268cm" svg:height="16.60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Functions</text:span></text:p>
              </text:list-item>
            </text:list>
            <text:list text:style-name="L3">
              <text:list-item>
                <text:p text:style-name="P12"><text:span text:style-name="T8">struct szedata2 *</text:span><text:span text:style-name="T9">szedata2_open</text:span><text:span text:style-name="T8">(const char *node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subscribe</text:span><text:span text:style-name="T8">(struct szedata2 </text:span><text:span text:style-name="T10">sze2, /* */</text:span><text:span text:style-name="T8"><text:line-break/></text:span><text:span text:style-name="T8">__u32 *rx,</text:span><text:span text:style-name="T8"><text:line-break/></text:span><text:span text:style-name="T8">__u32 *tx,</text:span><text:span text:style-name="T8"><text:line-break/></text:span><text:span text:style-name="T8">__u32 rx_poll,</text:span><text:span text:style-name="T8"><text:line-break/></text:span><text:span text:style-name="T8">__u32 tx_poll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start</text:span><text:span text:style-name="T8">(struct szedata2 *sze2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poll</text:span><text:span text:style-name="T8">(struct szedata2 *sze2, short *events, int timeout);</text:span></text:p>
              </text:list-item>
            </text:list>
            <text:list text:style-name="L3">
              <text:list-item>
                <text:p text:style-name="P12"><text:span text:style-name="T8">struct szedata2_lock *</text:span><text:span text:style-name="T9">rx_lock_data</text:span><text:span text:style-name="T8">(struct szedata2 *sze2, __u32 areas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rx_unlock_data</text:span><text:span text:style-name="T8">(struct szedata2 *sze2, const struct szedata2_lock *lock);</text:span></text:p>
              </text:list-item>
            </text:list>
            <text:list text:style-name="L3">
              <text:list-item>
                <text:p text:style-name="P12"><text:span text:style-name="T8">struct szedata2_lock *</text:span><text:span text:style-name="T9">tx_lock_data</text:span><text:span text:style-name="T8">(struct szedata2 *sze2, __u32 size, __u8 area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tx_unlock_data</text:span><text:span text:style-name="T8">(struct szedata2 *sze2, const struct szedata2_lock *lock, __u32 size);</text:span></text:p>
              </text:list-item>
            </text:list>
            <text:list text:style-name="L3">
              <text:list-item>
                <text:p text:style-name="P12"><text:span text:style-name="T8">void </text:span><text:span text:style-name="T9">szedata2_close</text:span><text:span text:style-name="T8">(struct szedata2 *sze2);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End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13"><text:span text:style-name="T11">SZETEST.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1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End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Thanks for your attention.</text:span>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11">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2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•">
            <style:list-level-properties text:space-before="0.3cm" text:min-label-width="0.9cm"/>
            <style:text-properties fo:font-family="Aharoni" style:font-style-name="Bold" style:font-pitch="variable" style:use-window-font-color="true" fo:font-size="100%"/>
          </text:list-level-style-bullet>
          <text:list-level-style-bullet text:level="2" text:bullet-char="−">
            <style:list-level-properties text:space-before="1.6cm" text:min-label-width="0.8cm"/>
            <style:text-properties fo:font-family="'Times New Roman'" style:font-style-name="obyčejné" style:font-family-generic="roman" style:font-pitch="variable" style:use-window-font-color="true" fo:font-size="70%"/>
          </text:list-level-style-bullet>
          <text:list-level-style-bullet text:level="3" text:bullet-char="•">
            <style:list-level-properties text:space-before="3cm" text:min-label-width="0.6cm"/>
            <style:text-properties fo:font-family="Aharoni" style:font-style-name="Bold" style:font-pitch="variable" style:use-window-font-color="true" fo:font-size="65%"/>
          </text:list-level-style-bullet>
          <text:list-level-style-bullet text:level="4" text:bullet-char="•">
            <style:list-level-properties text:space-before="4.2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Aharoni" style:font-style-name="Bold" style:font-pitch="variable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3cm" draw:marker-start-width="0.51cm" draw:marker-end-width="0.51cm" draw:textarea-horizontal-align="center" draw:textarea-vertical-align="middle" fo:padding-top="0.065cm" fo:padding-bottom="0.065cm" fo:padding-left="0.065cm" fo:padding-right="0.06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04cm" draw:marker-start-width="0.38cm" draw:marker-end-width="0.38cm" draw:textarea-horizontal-align="center" draw:textarea-vertical-align="middle" fo:padding-top="0.02cm" fo:padding-bottom="0.02cm" fo:padding-left="0.02cm" fo:padding-right="0.02cm"/>
    </style:style>
    <style:style style:name="pr1" style:family="presentation" style:parent-style-name="Výchozí-title">
      <style:graphic-properties draw:fill-color="#ffffff" draw:auto-grow-height="false" fo:min-height="3.507cm"/>
    </style:style>
    <style:style style:name="pr2" style:family="presentation" style:parent-style-name="Výchozí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8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Výchozí" style:page-layout-name="PM1" draw:style-name="dp1">
      <office:forms form:automatic-focus="false" form:apply-design-mode="false"/>
      <draw:frame presentation:style-name="pr1" draw:text-style-name="P1" draw:layer="backgroundobjects" svg:width="19.692cm" svg:height="2.642cm" svg:x="1.588cm" svg:y="0.567cm" presentation:class="title">
        <draw:text-box>
          <text:p text:style-name="P1">Titulek slajdu</text:p>
        </draw:text-box>
      </draw:frame>
      <draw:frame presentation:style-name="pr2" draw:text-style-name="P2" draw:layer="backgroundobjects" svg:width="24.268cm" svg:height="15.136cm" svg:x="1.739cm" svg:y="3.552cm" presentation:class="outline">
        <draw:text-box>
          <text:list text:style-name="L2">
            <text:list-item>
              <text:p text:style-name="P2">Klikněte pro úpravu formátu textu osnovy</text:p>
            </text:list-item>
          </text:list>
          <text:list text:style-name="L2">
            <text:list-item>
              <text:list>
                <text:list-item>
                  <text:p text:style-name="P3">Druhá úroveň osnovy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řetí úroveň osnovy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Čtvrtá úroveň osno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Pátá úroveň osnov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Šestá úroveň osno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dmá úroveň osnov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smá úroveň osnovy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Devátá úroveň osnovy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1" draw:text-style-name="P11" draw:layer="backgroundobjects" svg:x1="1.6cm" svg:y1="2.753cm" svg:x2="26.338cm" svg:y2="2.753cm">
        <text:p text:style-name="P1"/>
      </draw:line>
      <draw:frame draw:style-name="gr2" draw:text-style-name="P11" draw:layer="backgroundobjects" svg:width="4.987cm" svg:height="2.208cm" svg:x="21.316cm" svg:y="0.363cm">
        <draw:image xlink:href="Pictures/100000000000030900000158F129C85C.png" xlink:type="simple" xlink:show="embed" xlink:actuate="onLoad">
          <text:p text:style-name="P1"/>
        </draw:image>
      </draw:frame>
      <draw:line draw:style-name="gr3" draw:text-style-name="P11" draw:layer="backgroundobjects" svg:x1="1.6cm" svg:y1="2.565cm" svg:x2="21.417cm" svg:y2="2.565cm">
        <text:p text:style-name="P1"/>
      </draw:line>
      <presentation:notes style:page-layout-name="PM2">
        <office:forms form:automatic-focus="false" form:apply-design-mode="false"/>
        <draw:page-thumbnail presentation:style-name="Výchozí-title" draw:layer="backgroundobjects" svg:width="13.705cm" svg:height="10.279cm" svg:x="3.647cm" svg:y="2.853cm" presentation:class="page"/>
        <draw:frame presentation:style-name="Výchozí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5-06-20T17:53:41</meta:creation-date>
    <dc:creator>Jiri Slaby</dc:creator>
    <dc:date>2008-02-25T16:57:34</dc:date>
    <meta:editing-cycles>61</meta:editing-cycles>
    <meta:editing-duration>PT13H12M38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