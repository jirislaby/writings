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5.003cm" svg:height="13cm" svg:x="1.5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cs" fo:country="CZ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1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05-19T01:26:58</meta:creation-date>
    <dc:date>2008-05-19T02:38:35</dc:date>
    <meta:editing-cycles>3</meta:editing-cycles>
    <meta:editing-duration>PT1M28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.3309640884399pt" style:font-size-asian="13.3309640884399pt" style:font-size-complex="13.3309640884399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004cm" svg:height="13.001cm" chart:class="chart:bar" chart:style-name="ch1">
        <chart:legend chart:legend-position="end" svg:x="11.556cm" svg:y="5.383cm" chart:style-name="ch2"/>
        <chart:plot-area chart:style-name="ch3" chart:data-source-has-labels="both" svg:x="0.299cm" svg:y="0.259cm" svg:width="10.956cm" svg:height="12.22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</text:p>
              </table:table-cell>
              <table:table-cell office:value-type="string">
                <text:p>szedata</text:p>
              </table:table-cell>
              <table:table-cell office:value-type="string">
                <text:p>szedata2</text:p>
              </table:table-cell>
              <table:table-cell office:value-type="string">
                <text:p>DAG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</table:table-cell>
              <table:table-cell office:value-type="float" office:value="725">
                <text:p>725</text:p>
              </table:table-cell>
              <table:table-cell office:value-type="float" office:value="187.5">
                <text:p>187.5</text:p>
              </table:table-cell>
              <table:table-cell office:value-type="float" office:value="1482.4">
                <text:p>1482.4</text:p>
              </table:table-cell>
              <table:table-cell office:value-type="float" office:value="1488.1">
                <text:p>1488.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34.9">
                <text:p>234.9</text:p>
              </table:table-cell>
              <table:table-cell office:value-type="float" office:value="188">
                <text:p>188</text:p>
              </table:table-cell>
              <table:table-cell office:value-type="float" office:value="234.6">
                <text:p>234.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81.2">
                <text:p>81.2</text:p>
              </table:table-cell>
              <table:table-cell office:value-type="float" office:value="81.2">
                <text:p>81.2</text:p>
              </table:table-cell>
              <table:table-cell office:value-type="float" office:value="81.2">
                <text:p>81.2</text:p>
              </table:table-cell>
              <table:table-cell office:value-type="float" office:value="81.2">
                <text:p>8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