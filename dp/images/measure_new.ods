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0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List1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/>
          <table:table-cell office:value-type="string">
            <text:p>Intel</text:p>
          </table:table-cell>
          <table:table-cell office:value-type="string">
            <text:p>szedata</text:p>
          </table:table-cell>
          <table:table-cell office:value-type="string">
            <text:p>szedata2</text:p>
          </table:table-cell>
          <table:table-cell office:value-type="string">
            <text:p>DAG</text:p>
          </table:table-cell>
          <table:table-cell>
            <draw:frame table:end-cell-address="List1.I18" table:end-x="1.328cm" table:end-y="0.272cm" draw:z-index="0" draw:style-name="gr1" svg:width="7.993cm" svg:height="6.982cm" svg:x="0.11cm" svg:y="0.101cm">
              <draw:object draw:notify-on-update-of-ranges="List1.A2:List1.A4 List1.B1:List1.B1 List1.B2:List1.B4 List1.C1:List1.C1 List1.C2:List1.C4 List1.D1:List1.D1 List1.D2:List1.D4 List1.E1:List1.E1 List1.E2:List1.E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48">
            <text:p>348</text:p>
          </table:table-cell>
          <table:table-cell office:value-type="float" office:value="96">
            <text:p>96</text:p>
          </table:table-cell>
          <table:table-cell table:number-columns-repeated="2" office:value-type="float" office:value="761">
            <text:p>761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954">
            <text:p>954</text:p>
          </table:table-cell>
          <table:table-cell office:value-type="float" office:value="770">
            <text:p>770</text:p>
          </table:table-cell>
          <table:table-cell table:number-columns-repeated="2" office:value-type="float" office:value="962">
            <text:p>962</text:p>
          </table:table-cell>
          <table:table-cell/>
        </table:table-row>
        <table:table-row table:style-name="ro1">
          <table:table-cell office:value-type="float" office:value="1518">
            <text:p>1518</text:p>
          </table:table-cell>
          <table:table-cell office:value-type="float" office:value="983">
            <text:p>983</text:p>
          </table:table-cell>
          <table:table-cell table:number-columns-repeated="3" office:value-type="float" office:value="987">
            <text:p>987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Intel</text:p>
          </table:table-cell>
          <table:table-cell office:value-type="string">
            <text:p>szedata</text:p>
          </table:table-cell>
          <table:table-cell office:value-type="string">
            <text:p>szedata2</text:p>
          </table:table-cell>
          <table:table-cell office:value-type="string">
            <text:p>DAG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25">
            <text:p>725</text:p>
          </table:table-cell>
          <table:table-cell office:value-type="float" office:value="187.5">
            <text:p>187,5</text:p>
          </table:table-cell>
          <table:table-cell office:value-type="float" office:value="1482.4">
            <text:p>1482,4</text:p>
          </table:table-cell>
          <table:table-cell office:value-type="float" office:value="1488.1">
            <text:p>1488,1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234.9">
            <text:p>234,9</text:p>
          </table:table-cell>
          <table:table-cell office:value-type="float" office:value="188">
            <text:p>188</text:p>
          </table:table-cell>
          <table:table-cell office:value-type="float" office:value="234.6">
            <text:p>234,6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1518">
            <text:p>1518</text:p>
          </table:table-cell>
          <table:table-cell table:number-columns-repeated="4" office:value-type="float" office:value="81.2">
            <text:p>81,2</text:p>
          </table:table-cell>
          <table:table-cell/>
        </table:table-row>
        <table:table-row table:style-name="ro1" table:number-rows-repeated="9">
          <table:table-cell table:number-columns-repeated="6"/>
        </table:table-row>
        <table:table-row table:style-name="ro1">
          <table:table-cell table:number-columns-repeated="4"/>
          <table:table-cell>
            <draw:frame table:end-cell-address="List1.I35" table:end-x="1.347cm" table:end-y="0.4cm" draw:z-index="1" draw:style-name="gr1" svg:width="9.002cm" svg:height="6.72cm" svg:x="1.378cm" svg:y="0.091cm">
              <draw:object draw:notify-on-update-of-ranges="List1.A7:List1.A9 List1.B6:List1.B6 List1.B7:List1.B9 List1.C6:List1.C6 List1.C7:List1.C9 List1.D6:List1.D6 List1.D7:List1.D9 List1.E6:List1.E6 List1.E7:List1.E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LGC Sans" style:language-asian="zxx" style:country-asian="none" style:font-name-complex="DejaVu LGC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27">27.06.2008</text:date>, <text:time>15:53:58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Jiri Slaby</meta:initial-creator>
    <meta:creation-date>2008-05-14T16:01:33</meta:creation-date>
    <dc:creator>Jiri Slaby</dc:creator>
    <dc:date>2008-06-27T15:53:58</dc:date>
    <meta:editing-cycles>9</meta:editing-cycles>
    <meta:editing-duration>PT1H12M11S</meta:editing-duration>
    <meta:user-defined meta:name="Informace 1!!"/>
    <meta:user-defined meta:name="Informace 2!!"/>
    <meta:user-defined meta:name="Informace 3!!"/>
    <meta:user-defined meta:name="Informace 4!!"/>
    <meta:document-statistic meta:table-count="3" meta:cell-count="3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7.99303674697876pt" style:font-size-asian="7.99303674697876pt" style:font-size-complex="7.99303674697876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aximum="10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7.995cm" svg:height="8.091cm" chart:class="chart:bar" chart:style-name="ch1">
        <chart:legend chart:legend-position="end" svg:x="5.983cm" svg:y="3.266cm" chart:style-name="ch2"/>
        <chart:plot-area chart:style-name="ch3" table:cell-range-address="List1.A2:List1.E4 List1.B1:List1.E4 List1.A1:List1.A1" chart:data-source-has-labels="both" svg:x="0.157cm" svg:y="0.16cm" svg:width="5.662cm" svg:height="7.603cm">
          <chart:axis chart:dimension="x" chart:name="primary-x" chart:style-name="ch4">
            <chart:categories table:cell-range-address="List1.A2:List1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1.B2:List1.B4" chart:label-cell-address="List1.B1:List1.B1" chart:class="chart:bar">
            <chart:data-point chart:repeated="3"/>
          </chart:series>
          <chart:series chart:style-name="ch8" chart:values-cell-range-address="List1.C2:List1.C4" chart:label-cell-address="List1.C1:List1.C1" chart:class="chart:bar">
            <chart:data-point chart:repeated="3"/>
          </chart:series>
          <chart:series chart:style-name="ch9" chart:values-cell-range-address="List1.D2:List1.D4" chart:label-cell-address="List1.D1:List1.D1" chart:class="chart:bar">
            <chart:data-point chart:repeated="3"/>
          </chart:series>
          <chart:series chart:style-name="ch10" chart:values-cell-range-address="List1.E2:List1.E4" chart:label-cell-address="List1.E1:List1.E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l</text:p>
              </table:table-cell>
              <table:table-cell office:value-type="string">
                <text:p>szedata</text:p>
              </table:table-cell>
              <table:table-cell office:value-type="string">
                <text:p>szedata2</text:p>
              </table:table-cell>
              <table:table-cell office:value-type="string">
                <text:p>DAG</text:p>
              </table:table-cell>
            </table:table-row>
          </table:table-header-rows>
          <table:table-rows>
            <table:table-row>
              <table:table-cell office:value-type="string">
                <text:p>64</text:p>
              </table:table-cell>
              <table:table-cell office:value-type="float" office:value="348">
                <text:p>348</text:p>
              </table:table-cell>
              <table:table-cell office:value-type="float" office:value="96">
                <text:p>96</text:p>
              </table:table-cell>
              <table:table-cell office:value-type="float" office:value="761">
                <text:p>761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954">
                <text:p>954</text:p>
              </table:table-cell>
              <table:table-cell office:value-type="float" office:value="770">
                <text:p>770</text:p>
              </table:table-cell>
              <table:table-cell office:value-type="float" office:value="962">
                <text:p>962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983">
                <text:p>983</text:p>
              </table:table-cell>
              <table:table-cell office:value-type="float" office:value="987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987">
                <text:p>9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9.004cm" svg:height="7.762cm" chart:class="chart:bar" chart:style-name="ch1">
        <chart:legend chart:legend-position="end" svg:x="6.935cm" svg:y="3.214cm" chart:style-name="ch2"/>
        <chart:plot-area chart:style-name="ch3" table:cell-range-address="List1.A6:List1.E9" chart:data-source-has-labels="both" svg:x="0.18cm" svg:y="0.155cm" svg:width="6.575cm" svg:height="7.296cm">
          <chart:axis chart:dimension="x" chart:name="primary-x" chart:style-name="ch4">
            <chart:categories table:cell-range-address="List1.A7:List1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1.B7:List1.B9" chart:label-cell-address="List1.B6:List1.B6" chart:class="chart:bar">
            <chart:data-point chart:repeated="3"/>
          </chart:series>
          <chart:series chart:style-name="ch8" chart:values-cell-range-address="List1.C7:List1.C9" chart:label-cell-address="List1.C6:List1.C6" chart:class="chart:bar">
            <chart:data-point chart:repeated="3"/>
          </chart:series>
          <chart:series chart:style-name="ch9" chart:values-cell-range-address="List1.D7:List1.D9" chart:label-cell-address="List1.D6:List1.D6" chart:class="chart:bar">
            <chart:data-point chart:repeated="3"/>
          </chart:series>
          <chart:series chart:style-name="ch10" chart:values-cell-range-address="List1.E7:List1.E9" chart:label-cell-address="List1.E6:List1.E6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l</text:p>
              </table:table-cell>
              <table:table-cell office:value-type="string">
                <text:p>szedata</text:p>
              </table:table-cell>
              <table:table-cell office:value-type="string">
                <text:p>szedata2</text:p>
              </table:table-cell>
              <table:table-cell office:value-type="string">
                <text:p>DAG</text:p>
              </table:table-cell>
            </table:table-row>
          </table:table-header-rows>
          <table:table-rows>
            <table:table-row>
              <table:table-cell office:value-type="string">
                <text:p>64</text:p>
              </table:table-cell>
              <table:table-cell office:value-type="float" office:value="725">
                <text:p>725</text:p>
              </table:table-cell>
              <table:table-cell office:value-type="float" office:value="187.5">
                <text:p>187.5</text:p>
              </table:table-cell>
              <table:table-cell office:value-type="float" office:value="1482.4">
                <text:p>1482.4</text:p>
              </table:table-cell>
              <table:table-cell office:value-type="float" office:value="1488.1">
                <text:p>1488.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34.9">
                <text:p>234.9</text:p>
              </table:table-cell>
              <table:table-cell office:value-type="float" office:value="188">
                <text:p>188</text:p>
              </table:table-cell>
              <table:table-cell office:value-type="float" office:value="234.6">
                <text:p>234.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81.2">
                <text:p>81.2</text:p>
              </table:table-cell>
              <table:table-cell office:value-type="float" office:value="81.2">
                <text:p>81.2</text:p>
              </table:table-cell>
              <table:table-cell office:value-type="float" office:value="81.2">
                <text:p>81.2</text:p>
              </table:table-cell>
              <table:table-cell office:value-type="float" office:value="81.2">
                <text:p>81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