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auto-grow-width="false" fo:min-height="3.84cm" fo:min-width="7.44cm"/>
    </style:style>
    <style:style style:name="gr3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4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189cm" fo:min-width="1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000000" fo:min-height="2.539cm" fo:min-width="7.11cm"/>
    </style:style>
    <style:style style:name="gr10" style:family="graphic" style:parent-style-name="standard">
      <style:graphic-properties draw:stroke="none" draw:fill="solid" draw:fill-color="#000000" fo:min-height="4.429cm" fo:min-width="4.4cm"/>
    </style:style>
    <style:style style:name="gr11" style:family="graphic" style:parent-style-name="standard">
      <style:graphic-properties draw:stroke="none" draw:fill="none" fo:min-height="1.54cm" fo:min-width="0.003cm"/>
    </style:style>
    <style:style style:name="gr1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66pt" style:font-size-asian="66pt" style:font-size-complex="66pt"/>
    </style:style>
    <style:style style:name="P5" style:family="paragraph">
      <style:paragraph-properties style:text-autospace="none"/>
      <style:text-properties fo:font-size="16pt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7" style:family="paragraph">
      <style:paragraph-properties style:text-autospace="none"/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8" style:family="paragraph">
      <style:paragraph-properties fo:margin-top="0.42cm" fo:margin-bottom="0.35cm" fo:text-align="start"/>
    </style:style>
    <style:style style:name="P19" style:family="paragraph">
      <style:text-properties fo:color="#339933" fo:font-family="Courier, 'Courier New'" style:font-family-generic="modern" style:font-pitch="fixed" fo:font-size="18pt"/>
    </style:style>
    <style:style style:name="P20" style:family="paragraph">
      <style:paragraph-properties fo:margin-top="0cm" fo:margin-bottom="0cm" fo:line-height="93%" fo:text-align="start"/>
    </style:style>
    <style:style style:name="P21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6pt" fo:font-weight="normal" style:font-size-asian="66pt" style:font-weight-asian="normal" style:font-size-complex="66pt" style:font-weight-complex="normal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style:text-line-through-style="solid" style:text-line-through-text="X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ff" style:text-line-through-style="solid" style:text-line-through-width="bold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solid" style:text-line-through-width="bold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8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9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0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3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4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5" style:family="text">
      <style:text-properties fo:color="#4c4c4c" fo:font-size="32pt" style:font-size-asian="32pt" style:font-size-complex="32pt"/>
    </style:style>
    <style:style style:name="T26" style:family="text">
      <style:text-properties fo:color="#4c4c4c" fo:font-size="20pt" style:font-size-asian="20pt" style:font-size-complex="20pt"/>
    </style:style>
    <style:style style:name="T27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2" style:family="text">
      <style:text-properties fo:color="#ffffff" style:text-line-through-style="solid" style:text-line-through-width="bold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/>
    </style:style>
    <style:style style:name="T35" style:family="text">
      <style:text-properties fo:color="#339933" fo:font-family="Courier, 'Courier New'" style:font-family-generic="modern" style:font-pitch="fixed" fo:font-size="18pt"/>
    </style:style>
    <style:style style:name="T36" style:family="text">
      <style:text-properties fo:font-size="18pt" style:font-size-asian="10pt" style:font-size-complex="10pt"/>
    </style:style>
    <style:style style:name="T37" style:family="text">
      <style:text-properties fo:color="#0000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38" style:family="text">
      <style:text-properties fo:color="#b26818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39" style:family="text">
      <style:text-properties fo:color="#0000ff" style:text-line-through-style="solid" style:text-line-through-width="bold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40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2.623cm" svg:x="2.286cm" svg:y="8.198cm" presentation:class="title" presentation:user-transformed="true">
          <draw:text-box>
            <text:p text:style-name="P1">Hledání chyb<text:line-break/><text:span text:style-name="T1">Ne falešných hlášení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2">Jiří Slabý</text:span><text:span text:style-name="T3">, </text:span><text:span text:style-name="T4">Jan Strejček, Marek Trtík</text:span></text:p>
            <text:p text:style-name="P2"><text:span text:style-name="T4">Fakulta informatiky</text:span></text:p>
            <text:p text:style-name="P2"><text:span text:style-name="T4">Masarykova Univerzita</text:span>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ruktura prezentac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Úvod a trocha teorie</text:p>
                <text:list>
                  <text:list-item>
                    <text:p>Klasická statická analýza</text:p>
                  </text:list-item>
                </text:list>
              </text:list-item>
              <text:list-item>
                <text:p>Nevýhody</text:p>
              </text:list-item>
              <text:list-item>
                <text:p>Eliminace falešných hlášení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Motivace</text:p>
          </draw:text-box>
        </draw:frame>
        <draw:frame presentation:style-name="pr8" draw:text-style-name="P4" draw:layer="layout" svg:width="20.93cm" svg:height="10.115cm" svg:x="2.286cm" svg:y="5.255cm" presentation:class="outline" presentation:user-transformed="true">
          <draw:text-box>
            <text:list text:style-name="L2">
              <text:list-header>
                <text:p text:style-name="P4"><text:span text:style-name="T5">59 miliard dolarů ročně</text:span><text:span text:style-name="T5"><text:line-break/></text:span><text:span text:style-name="T6">tj.</text:span></text:p>
                <text:p text:style-name="P4"><text:span text:style-name="T5">0,6 % hrubého domácího produktu</text:span></text:p>
                <text:p text:style-name="P4"><text:span text:style-name="T7">(v USA, 2002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Jak hledat chyby v kódu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Dynamicky</text:p>
              </text:list-item>
              <text:list-item>
                <text:p>Staticky</text:p>
                <text:list>
                  <text:list-item>
                    <text:p>Data-flow analýza</text:p>
                  </text:list-item>
                  <text:list-item>
                    <text:p><text:span text:style-name="T2">Klasická statická analýza</text:span></text:p>
                  </text:list-item>
                  <text:list-item>
                    <text:p><text:span text:style-name="T2">Symbolická exeku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Klasická statická analýz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gnorování nezajímavého kódu</text:p>
                <text:list>
                  <text:list-item>
                    <text:p>Abstrakce</text:p>
                  </text:list-item>
                </text:list>
              </text:list-item>
              <text:list-item>
                <text:p>Formalizována</text:p>
                <text:list>
                  <text:list-item>
                    <text:p>Cousot&amp;Cousot v 70. letech</text:p>
                  </text:list-item>
                </text:list>
              </text:list-item>
              <text:list-item>
                <text:p>Použita v mnoha nástrojích</text:p>
                <text:list>
                  <text:list-item>
                    <text:p>Coverity, Stanse…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cm" svg:height="4.09cm" svg:x="7.535cm" svg:y="12.493cm">
          <draw:text-box>
            <text:p text:style-name="P5"><text:span text:style-name="T8">void</text:span><text:span text:style-name="T9"> </text:span><text:span text:style-name="T10">double_lock() {</text:span></text:p>
            <text:p text:style-name="P5"><text:span text:style-name="T9"><text:s text:c="2"/></text:span><text:span text:style-name="T10">lock();</text:span></text:p>
            <text:p text:style-name="P5"><text:span text:style-name="T9"><text:s text:c="2"/></text:span><text:span text:style-name="T10">stuff();</text:span></text:p>
            <text:p text:style-name="P5"><text:span text:style-name="T9"><text:s text:c="2"/></text:span><text:span text:style-name="T10">more_stuff();</text:span></text:p>
            <text:p text:style-name="P5"><text:span text:style-name="T9"><text:s text:c="2"/></text:span><text:span text:style-name="T10">lock();</text:span></text:p>
            <text:p text:style-name="P5"><text:span text:style-name="T10">}</text:span></text:p>
          </draw:text-box>
        </draw:frame>
        <draw:frame draw:style-name="gr3" draw:text-style-name="P6" xml:id="id4" draw:id="id4" draw:layer="layout" svg:width="8cm" svg:height="4.09cm" svg:x="7.535cm" svg:y="12.494cm">
          <draw:text-box>
            <text:p text:style-name="P5"><text:span text:style-name="T8">void</text:span><text:span text:style-name="T9"> </text:span><text:span text:style-name="T10">double_lock() {</text:span></text:p>
            <text:p text:style-name="P5"><text:span text:style-name="T9"><text:s text:c="2"/></text:span><text:span text:style-name="T10">lock();</text:span><text:span text:style-name="T11"> </text:span><text:span text:style-name="T12">// U → L</text:span></text:p>
            <text:p text:style-name="P5"><text:span text:style-name="T13"><text:s text:c="2"/></text:span><text:span text:style-name="T14">stuff();</text:span></text:p>
            <text:p text:style-name="P5"><text:span text:style-name="T15"><text:s text:c="2"/></text:span><text:span text:style-name="T14">more_stuff();</text:span></text:p>
            <text:p text:style-name="P5"><text:span text:style-name="T9"><text:s text:c="2"/></text:span><text:span text:style-name="T10">lock(); </text:span><text:span text:style-name="T12">// L → ERROR</text:span></text:p>
            <text:p text:style-name="P5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Klasická statická analýz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Výhody</text:p>
                <text:list>
                  <text:list-item>
                    <text:p>Konfigurovatelnost</text:p>
                  </text:list-item>
                  <text:list-item>
                    <text:p>Rychlost</text:p>
                  </text:list-item>
                  <text:list-item>
                    <text:p>Důkaz korektnosti analýzy</text:p>
                  </text:list-item>
                </text:list>
              </text:list-item>
              <text:list-item>
                <text:p xml:id="id5" text:id="id5">Nevýhody</text:p>
                <text:list>
                  <text:list-item>
                    <text:p xml:id="id6" text:id="id6">Falešná hlášen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Zamykací chyby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v je dobře popsatelný konečnými automaty</text:p>
              </text:list-item>
              <text:list-item>
                <text:p>Syntaktické konstrukce mění stavy</text:p>
                <text:list>
                  <text:list-item>
                    <text:p>Konfigurace říká které a jak</text:p>
                  </text:list-item>
                </text:list>
              </text:list-item>
            </text:list>
          </draw:text-box>
        </draw:frame>
        <draw:g xml:id="id8" draw:id="id8">
          <draw:custom-shape draw:style-name="gr4" draw:text-style-name="P8" xml:id="id2" draw:id="id2" draw:layer="layout" svg:width="3.622cm" svg:height="1.469cm" svg:x="1.822cm" svg:y="10.368cm">
            <draw:glue-point draw:id="4" svg:x="5.024cm" svg:y="-2.45cm" draw:escape-direction="right"/>
            <draw:glue-point draw:id="5" svg:x="1.802cm" svg:y="0.306cm" draw:align="center"/>
            <text:p text:style-name="P7"><text:span text:style-name="T16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xml:id="id1" draw:id="id1" draw:layer="layout" svg:width="3.622cm" svg:height="1.469cm" svg:x="9.726cm" svg:y="10.368cm">
            <draw:glue-point draw:id="4" svg:x="-4.958cm" svg:y="-2.328cm"/>
            <draw:glue-point draw:id="5" svg:x="-1.811cm" svg:y="0.332cm" draw:align="center" draw:escape-direction="left"/>
            <text:p text:style-name="P7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draw:type="line" svg:x1="9.726cm" svg:y1="11.434cm" svg:x2="5.435cm" svg:y2="11.408cm" draw:start-shape="id1" draw:start-glue-point="5" draw:end-shape="id2" draw:end-glue-point="5" svg:d="m9726 11434-4291-26">
            <text:p/>
          </draw:connector>
          <draw:custom-shape draw:style-name="gr6" draw:text-style-name="P9" xml:id="id3" draw:id="id3" draw:layer="layout" svg:width="3.622cm" svg:height="1.469cm" svg:x="5.769cm" svg:y="13.263cm">
            <draw:glue-point draw:id="4" svg:x="5.024cm" svg:y="-2.45cm" draw:escape-direction="right"/>
            <draw:glue-point draw:id="5" svg:x="-1.821cm" svg:y="-0.347cm" draw:align="center"/>
            <text:p text:style-name="P9"><text:span text:style-name="T2">Err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draw:type="line" svg:x1="5.444cm" svg:y1="10.743cm" svg:x2="9.742cm" svg:y2="10.761cm" draw:start-shape="id2" draw:start-glue-point="4" draw:end-shape="id1" draw:end-glue-point="4" svg:d="m5444 10743 4298 18">
            <text:p/>
          </draw:connector>
          <draw:frame draw:style-name="gr7" draw:text-style-name="P11" draw:layer="layout" svg:width="2.28cm" svg:height="0.818cm" svg:x="6.453cm" svg:y="9.928cm">
            <draw:text-box>
              <text:p text:style-name="P10"><text:span text:style-name="T17">lock()</text:span></text:p>
            </draw:text-box>
          </draw:frame>
          <draw:frame draw:style-name="gr8" draw:text-style-name="P12" draw:layer="layout" svg:width="2.873cm" svg:height="0.818cm" svg:x="6.144cm" svg:y="11.511cm">
            <draw:text-box>
              <text:p text:style-name="P10"><text:span text:style-name="T17">unlock()</text:span></text:p>
            </draw:text-box>
          </draw:frame>
          <draw:frame draw:style-name="gr8" draw:text-style-name="P12" draw:layer="layout" svg:width="2.873cm" svg:height="0.818cm" svg:x="2.008cm" svg:y="12.545cm">
            <draw:text-box>
              <text:p text:style-name="P10"><text:span text:style-name="T17">unlock()</text:span></text:p>
            </draw:text-box>
          </draw:frame>
          <draw:frame draw:style-name="gr8" draw:text-style-name="P12" draw:layer="layout" svg:width="2.28cm" svg:height="0.818cm" svg:x="10.361cm" svg:y="12.545cm">
            <draw:text-box>
              <text:p text:style-name="P10"><text:span text:style-name="T17">lock()</text:span></text:p>
            </draw:text-box>
          </draw:frame>
          <draw:connector draw:style-name="gr5" draw:text-style-name="P7" draw:layer="layout" draw:type="line" svg:x1="11.537cm" svg:y1="11.837cm" svg:x2="9.391cm" svg:y2="13.638cm" draw:start-shape="id1" draw:start-glue-point="2" draw:end-shape="id3" draw:end-glue-point="4" svg:d="m11537 11837-2146 1801">
            <text:p/>
          </draw:connector>
          <draw:connector draw:style-name="gr5" draw:text-style-name="P7" draw:layer="layout" draw:type="line" svg:x1="3.633cm" svg:y1="11.837cm" svg:x2="5.769cm" svg:y2="13.65cm" draw:start-shape="id2" draw:start-glue-point="2" draw:end-shape="id3" draw:end-glue-point="5" svg:d="m3633 11837 2136 1813">
            <text:p/>
          </draw:connector>
        </draw:g>
        <draw:frame draw:style-name="gr3" draw:text-style-name="P6" xml:id="id7" draw:id="id7" draw:layer="layout" svg:width="8cm" svg:height="4.09cm" svg:x="15.478cm" svg:y="10.625cm">
          <draw:text-box>
            <text:p text:style-name="P13"><text:span text:style-name="T8">void</text:span><text:span text:style-name="T9"> </text:span><text:span text:style-name="T10">double_lock() {</text:span></text:p>
            <text:p text:style-name="P13"><text:span text:style-name="T9"><text:s text:c="2"/></text:span><text:span text:style-name="T10">lock();</text:span><text:span text:style-name="T11"> </text:span><text:span text:style-name="T12">// U → L</text:span></text:p>
            <text:p text:style-name="P13"><text:span text:style-name="T18"><text:s text:c="2"/></text:span><text:span text:style-name="T19">stuff();</text:span></text:p>
            <text:p text:style-name="P13"><text:span text:style-name="T18"><text:s text:c="2"/></text:span><text:span text:style-name="T19">more_stuff();</text:span></text:p>
            <text:p text:style-name="P13"><text:span text:style-name="T9"><text:s text:c="2"/></text:span><text:span text:style-name="T10">lock(); </text:span><text:span text:style-name="T12">// L → ERROR</text:span></text:p>
            <text:p text:style-name="P13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Zamykací chyby ve Stanse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očáteční funkce</text:p>
                <text:list>
                  <text:list-item>
                    <text:p>Ty, které nejsou volány uvnitř modulu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Příklad</text:p>
          </draw:text-box>
        </draw:frame>
        <draw:frame draw:style-name="gr9" draw:text-style-name="P14" draw:layer="layout" svg:width="17.268cm" svg:height="6.383cm" svg:x="4.129cm" svg:y="5.376cm">
          <draw:text-box>
            <text:p text:style-name="P13"><text:span text:style-name="T20">void</text:span><text:span text:style-name="T21"> </text:span><text:span text:style-name="T22">fun(</text:span><text:span text:style-name="T20">int</text:span><text:span text:style-name="T21"> </text:span><text:span text:style-name="T22">x) {</text:span><text:span text:style-name="T21"> </text:span><text:span text:style-name="T23">// AUTOMATON STATE</text:span></text:p>
            <text:p text:style-name="P13"><text:span text:style-name="T21"><text:s text:c="2"/></text:span><text:span text:style-name="T24">if</text:span><text:span text:style-name="T21"> </text:span><text:span text:style-name="T22">(x)</text:span><text:span text:style-name="T21"> <text:s text:c="9"/></text:span><text:span text:style-name="T23">// U</text:span></text:p>
            <text:p text:style-name="P13"><text:span text:style-name="T21"><text:s text:c="4"/></text:span><text:span text:style-name="T22">lock();</text:span><text:span text:style-name="T21"> <text:s text:c="6"/></text:span><text:span text:style-name="T23">// L</text:span></text:p>
            <text:p text:style-name="P13"><text:span text:style-name="T21"><text:s text:c="2"/></text:span><text:span text:style-name="T22">stuff();</text:span><text:span text:style-name="T21"> <text:s text:c="7"/></text:span><text:span text:style-name="T23">// U or L</text:span></text:p>
            <text:p text:style-name="P13"><text:span text:style-name="T21"><text:s text:c="2"/></text:span><text:span text:style-name="T24">if</text:span><text:span text:style-name="T21"> </text:span><text:span text:style-name="T22">(x)</text:span><text:span text:style-name="T21"> <text:s text:c="9"/></text:span><text:span text:style-name="T23">// U or L</text:span></text:p>
            <text:p text:style-name="P13"><text:span text:style-name="T21"><text:s text:c="4"/></text:span><text:span text:style-name="T22">unlock();</text:span><text:span text:style-name="T21"> <text:s text:c="4"/></text:span><text:span text:style-name="T23">// ERROR or U</text:span></text:p>
            <text:p text:style-name="P13"><text:span text:style-name="T22">}</text:span></text:p>
          </draw:text-box>
        </draw:frame>
        <draw:frame presentation:style-name="pr7" draw:text-style-name="P15" draw:layer="layout" svg:width="20.93cm" svg:height="2.743cm" svg:x="2.235cm" svg:y="13.701cm" presentation:class="title" presentation:user-transformed="true">
          <draw:text-box>
            <text:p xml:id="id9" text:id="id9" text:style-name="P15"><text:span text:style-name="T25">61 % zamykacích hlášení je falešných</text:span><text:span text:style-name="T25"><text:line-break/></text:span><text:span text:style-name="T26">(bez použití eliminačních techni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eak" presentation:presentation-page-layout-name="AL3T19">
        <office:forms form:automatic-focus="false" form:apply-design-mode="false"/>
        <draw:frame presentation:style-name="pr10" draw:layer="layout" svg:width="20.884cm" svg:height="3.18cm" svg:x="2.286cm" svg:y="7.62cm" presentation:class="title" presentation:user-transformed="true">
          <draw:text-box>
            <text:p>Eliminace falešných hlášení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Nová technik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Nad LLVM</text:p>
                <text:list>
                  <text:list-item>
                    <text:p>Vyvíjený a udržovaný</text:p>
                  </text:list-item>
                </text:list>
              </text:list-item>
              <text:list-item>
                <text:p>Automaty</text:p>
                <text:list>
                  <text:list-item>
                    <text:p>Sémanticky x syntakticky – priklady</text:p>
                  </text:list-item>
                </text:list>
              </text:list-item>
              <text:list-item>
                <text:p>Slicing</text:p>
              </text:list-item>
              <text:list-item>
                <text:p>Symbolická exeku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oužití techni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Ověřování výstupu statické analýzy</text:p>
                <text:list>
                  <text:list-item>
                    <text:p>Odhalí falešná hlášení</text:p>
                  </text:list-item>
                  <text:list-item>
                    <text:p>Nemusí procházet celý projekt</text:p>
                  </text:list-item>
                </text:list>
              </text:list-item>
              <text:list-item>
                <text:p>Samostatný nástroj na hledání chyb</text:p>
                <text:list>
                  <text:list-item>
                    <text:p>Přesnější</text:p>
                  </text:list-item>
                  <text:list-item>
                    <text:p>„Neztratí“ chyby</text:p>
                  </text:list-item>
                  <text:list-item>
                    <text:p>Nemusí najít chyby</text:p>
                    <text:list>
                      <text:list-item>
                        <text:p>Dlouhý výpoč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Technika ze 70. let (Weiser)</text:p>
              </text:list-item>
              <text:list-item>
                <text:p>Odstranit z kódu nepodstatné</text:p>
                <text:list>
                  <text:list-item>
                    <text:p>Nezměnit význam podstatného</text:p>
                  </text:list-item>
                </text:list>
              </text:list-item>
              <text:list-item>
                <text:p>Interprocedurální rozšíření</text:p>
              </text:list-item>
            </text:list>
          </draw:text-box>
        </draw:frame>
        <draw:frame draw:style-name="gr10" draw:text-style-name="P16" draw:layer="layout" svg:width="8.63cm" svg:height="6.641cm" svg:x="8.388cm" svg:y="10.071cm">
          <draw:text-box>
            <text:p text:style-name="P16"><text:span text:style-name="T27">void</text:span><text:span text:style-name="T28"> </text:span><text:span text:style-name="T29">fun(</text:span><text:span text:style-name="T27">int</text:span><text:span text:style-name="T28"> </text:span><text:span text:style-name="T29">x) {</text:span></text:p>
            <text:p text:style-name="P16"><text:span text:style-name="T28"><text:s text:c="2"/></text:span><text:span text:style-name="T30">if</text:span><text:span text:style-name="T28"> </text:span><text:span text:style-name="T29">(x) {</text:span></text:p>
            <text:p text:style-name="P16"><text:span text:style-name="T29"><text:s text:c="4"/></text:span><text:span text:style-name="T29">print(“locking...“);</text:span></text:p>
            <text:p text:style-name="P16"><text:span text:style-name="T28"><text:s text:c="4"/></text:span><text:span text:style-name="T29">lock();</text:span></text:p>
            <text:p text:style-name="P16"><text:span text:style-name="T29"><text:s text:c="4"/></text:span><text:span text:style-name="T29">locked</text:span><text:span text:style-name="T28"> </text:span><text:span text:style-name="T29">=</text:span><text:span text:style-name="T28"> </text:span><text:span text:style-name="T31">1</text:span><text:span text:style-name="T29">;</text:span></text:p>
            <text:p text:style-name="P16"><text:span text:style-name="T28"><text:s text:c="2"/></text:span><text:span text:style-name="T29">}</text:span></text:p>
            <text:p text:style-name="P16"><text:span text:style-name="T28"><text:s text:c="2"/></text:span><text:span text:style-name="T29">stuff();</text:span></text:p>
            <text:p text:style-name="P16"><text:span text:style-name="T28"><text:s text:c="2"/></text:span><text:span text:style-name="T30">if</text:span><text:span text:style-name="T28"> </text:span><text:span text:style-name="T29">(locked)</text:span></text:p>
            <text:p text:style-name="P16"><text:span text:style-name="T28"><text:s text:c="4"/></text:span><text:span text:style-name="T29">unlock();</text:span></text:p>
            <text:p text:style-name="P17"><text:span text:style-name="T28">}</text:span></text:p>
          </draw:text-box>
        </draw:frame>
        <draw:frame draw:style-name="gr10" draw:text-style-name="P16" xml:id="id10" draw:id="id10" draw:layer="layout" svg:width="8.63cm" svg:height="6.641cm" svg:x="8.388cm" svg:y="10.072cm">
          <draw:text-box>
            <text:p text:style-name="P16"><text:span text:style-name="T27">void</text:span><text:span text:style-name="T28"> </text:span><text:span text:style-name="T29">fun(</text:span><text:span text:style-name="T27">int</text:span><text:span text:style-name="T28"> </text:span><text:span text:style-name="T29">x) {</text:span></text:p>
            <text:p text:style-name="P16"><text:span text:style-name="T28"><text:s text:c="2"/></text:span><text:span text:style-name="T30">if</text:span><text:span text:style-name="T28"> </text:span><text:span text:style-name="T29">(x) {</text:span></text:p>
            <text:p text:style-name="P16"><text:span text:style-name="T29"><text:s text:c="4"/></text:span><text:span text:style-name="T32">print(“locking...“);</text:span></text:p>
            <text:p text:style-name="P16"><text:span text:style-name="T28"><text:s text:c="4"/></text:span><text:span text:style-name="T29">lock();</text:span></text:p>
            <text:p text:style-name="P16"><text:span text:style-name="T29"><text:s text:c="4"/></text:span><text:span text:style-name="T29">locked</text:span><text:span text:style-name="T28"> </text:span><text:span text:style-name="T29">=</text:span><text:span text:style-name="T28"> </text:span><text:span text:style-name="T31">1</text:span><text:span text:style-name="T29">;</text:span></text:p>
            <text:p text:style-name="P16"><text:span text:style-name="T28"><text:s text:c="2"/></text:span><text:span text:style-name="T29">}</text:span></text:p>
            <text:p text:style-name="P16"><text:span text:style-name="T28"><text:s text:c="2"/></text:span><text:span text:style-name="T32">stuff();</text:span></text:p>
            <text:p text:style-name="P16"><text:span text:style-name="T28"><text:s text:c="2"/></text:span><text:span text:style-name="T30">if</text:span><text:span text:style-name="T28"> </text:span><text:span text:style-name="T29">(locked)</text:span></text:p>
            <text:p text:style-name="P16"><text:span text:style-name="T28"><text:s text:c="4"/></text:span><text:span text:style-name="T29">unlock();</text:span></text:p>
            <text:p text:style-name="P17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draw:style-name="standard" draw:layer="layout" svg:width="20.914cm" svg:height="5.831cm" svg:x="2.243cm" svg:y="6.2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3">Počet funkcí</text:span></text:p>
              </table:table-cell>
              <table:table-cell>
                <text:p><text:span text:style-name="T33">Před slicováním</text:span></text:p>
              </table:table-cell>
              <table:table-cell>
                <text:p><text:span text:style-name="T33">Po slicování</text:span></text:p>
              </table:table-cell>
            </table:table-row>
            <table:table-row table:style-name="ro1" table:default-cell-style-name="ce2">
              <table:table-cell>
                <text:p><text:span text:style-name="T34">S assemblerem</text:span></text:p>
              </table:table-cell>
              <table:table-cell/>
              <table:table-cell>
                <text:p><text:span text:style-name="T34">0 (ignoruje se)</text:span></text:p>
              </table:table-cell>
            </table:table-row>
            <table:table-row table:style-name="ro1" table:default-cell-style-name="ce2">
              <table:table-cell>
                <text:p><text:span text:style-name="T34">S externím voláním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34">S cyklem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34">Bez ASM a volání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34">Bez ASM, volání a cyklů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0.93cm" svg:height="2.743cm" svg:x="2.286cm" svg:y="0.711cm" presentation:class="title">
          <draw:text-box>
            <text:p>Účinek slicování</text:p>
          </draw:text-box>
        </draw:frame>
        <draw:frame draw:style-name="gr11" draw:text-style-name="P19" draw:layer="layout" svg:width="0.503cm" svg:height="2.106cm" svg:x="11.054cm" svg:y="9.1cm">
          <draw:text-box>
            <text:p><text:span text:style-name="T35"/></text:p>
            <text:p text:style-name="P18"><text:span text:style-name="T36"/></text:p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ymbolická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Program se zpracovává symbolicky</text:p>
                <text:list>
                  <text:list-item>
                    <text:p>Uchovávání stavu proměnných (symbolů)</text:p>
                  </text:list-item>
                  <text:list-item>
                    <text:p>A vztahů mezi nimi („path condition“)</text:p>
                  </text:list-item>
                  <text:list-item>
                    <text:p>Použití (SMT) solveru</text:p>
                  </text:list-item>
                  <text:list-item>
                    <text:p>King (70. léta)</text:p>
                  </text:list-item>
                </text:list>
              </text:list-item>
            </text:list>
          </draw:text-box>
        </draw:frame>
        <draw:frame draw:style-name="gr9" draw:text-style-name="P14" xml:id="id11" draw:id="id11" draw:layer="layout" svg:width="20.06cm" svg:height="6.383cm" svg:x="2.735cm" svg:y="10.477cm">
          <draw:text-box>
            <text:p text:style-name="P13"><text:span text:style-name="T20">void</text:span><text:span text:style-name="T21"> </text:span><text:span text:style-name="T22">fun(</text:span><text:span text:style-name="T20">int</text:span><text:span text:style-name="T21"> </text:span><text:span text:style-name="T22">x) {</text:span><text:span text:style-name="T21"> </text:span><text:span text:style-name="T37">// AUTOMATON STATE</text:span></text:p>
            <text:p text:style-name="P13"><text:span text:style-name="T21"><text:s text:c="2"/></text:span><text:span text:style-name="T38">if</text:span><text:span text:style-name="T21"> </text:span><text:span text:style-name="T22">(x)</text:span><text:span text:style-name="T21"> <text:s text:c="9"/></text:span><text:span text:style-name="T37">// U</text:span></text:p>
            <text:p text:style-name="P13"><text:span text:style-name="T21"><text:s text:c="4"/></text:span><text:span text:style-name="T22">lock();</text:span><text:span text:style-name="T21"> <text:s text:c="6"/></text:span><text:span text:style-name="T37">// x &amp;&amp; L</text:span></text:p>
            <text:p text:style-name="P13"><text:span text:style-name="T21"><text:s text:c="2"/></text:span><text:span text:style-name="T22">stuff();</text:span><text:span text:style-name="T21"> <text:s text:c="7"/></text:span><text:span text:style-name="T37">// (!x &amp;&amp; U) || (x &amp;&amp; L)</text:span></text:p>
            <text:p text:style-name="P13"><text:span text:style-name="T21"><text:s text:c="2"/></text:span><text:span text:style-name="T38">if</text:span><text:span text:style-name="T21"> </text:span><text:span text:style-name="T22">(x)</text:span><text:span text:style-name="T21"> <text:s text:c="9"/></text:span><text:span text:style-name="T37">// (!x &amp;&amp; U) || (x &amp;&amp; L)</text:span></text:p>
            <text:p text:style-name="P13"><text:span text:style-name="T21"><text:s text:c="4"/></text:span><text:span text:style-name="T22">unlock();</text:span><text:span text:style-name="T21"> <text:s text:c="4"/></text:span><text:span text:style-name="T37">// </text:span><text:span text:style-name="T39">(!x &amp;&amp; U)</text:span><text:span text:style-name="T37"> || (x &amp;&amp; U)</text:span></text:p>
            <text:p text:style-name="P13"><text:span text:style-name="T22">} <text:s text:c="16"/></text:span><text:span text:style-name="T37">// 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ymbolická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Klee</text:p>
                <text:list>
                  <text:list-item>
                    <text:p>Existující a udržovaný kód</text:p>
                  </text:list-item>
                  <text:list-item>
                    <text:p>Funguje nad LLVM</text:p>
                  </text:list-item>
                  <text:list-item>
                    <text:p>Open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Úskalí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ssembler</text:p>
                <text:list>
                  <text:list-item>
                    <text:p>Většinu lze nahradit C/LLVM kódem</text:p>
                  </text:list-item>
                </text:list>
              </text:list-item>
              <text:list-item>
                <text:p>Externí volání</text:p>
                <text:list>
                  <text:list-item>
                    <text:p>Celý projekt i se závislotmi</text:p>
                  </text:list-item>
                </text:list>
              </text:list-item>
              <text:list-item>
                <text:p>Cykly</text:p>
                <text:list>
                  <text:list-item>
                    <text:p>Řešením jsou Markovy techni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Výsled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Kolik to čeho našlo</text:p>
              </text:list-item>
              <text:list-item>
                <text:p>Porovnání se stansem</text:p>
              </text:list-item>
              <text:list-item>
                <text:p>Čas běhu</text:p>
              </text:list-item>
              <text:list-item>
                <text:p/>
              </text:list-item>
              <text:list-item>
                <text:p>Jadro – mame oznackovane</text:p>
                <text:list>
                  <text:list-item>
                    <text:p>Ale je v nem asm</text:p>
                  </text:list-item>
                  <text:list-item>
                    <text:p>rozsahle</text:p>
                  </text:list-item>
                  <text:list-item>
                    <text:p>Externi volani (mame vsechen kod, ale ne v 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all_20_to_20_Action" presentation:presentation-page-layout-name="AL3T19">
        <office:forms form:automatic-focus="false" form:apply-design-mode="false"/>
        <draw:custom-shape draw:name="TextBox 1" draw:style-name="gr12" draw:text-style-name="P21" draw:layer="layout" svg:width="18.188cm" svg:height="4.502cm" svg:x="4.386cm" svg:y="3.616cm">
          <text:p text:style-name="P20"><text:span text:style-name="T40">Dotaz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0.542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3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Děkuji za pozornost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1-12-11T23:52:34</dc:date>
    <meta:editing-duration>P1DT4H32M45S</meta:editing-duration>
    <meta:editing-cycles>93</meta:editing-cycles>
    <meta:generator>LibreOffice/3.4$Unix LibreOffice_project/340m1$Build-1206</meta:generator>
    <dc:title>SUSE Template v17: 8/12/11</dc:title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