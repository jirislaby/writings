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9400000148C5631F9C.png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auto-grow-width="false" fo:min-height="3.84cm" fo:min-width="7.44cm"/>
    </style:style>
    <style:style style:name="gr4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5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189cm" fo:min-width="1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solid" draw:fill-color="#000000" fo:min-height="2.539cm" fo:min-width="7.11cm"/>
    </style:style>
    <style:style style:name="gr11" style:family="graphic" style:parent-style-name="standard">
      <style:graphic-properties draw:stroke="none" draw:fill="none" fo:min-height="1.54cm" fo:min-width="0.003cm"/>
    </style:style>
    <style:style style:name="gr1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6" style:family="paragraph">
      <style:paragraph-properties style:text-autospace="none"/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4pt" style:font-size-asian="14pt" style:font-size-complex="14pt"/>
    </style:style>
    <style:style style:name="P10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1" style:family="paragraph">
      <style:paragraph-properties style:text-autospace="none"/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style:text-properties fo:color="#339933" fo:font-family="Courier, 'Courier New'" style:font-family-generic="modern" style:font-pitch="fixed" fo:font-size="18pt"/>
    </style:style>
    <style:style style:name="P15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16" style:family="paragraph">
      <style:paragraph-properties fo:margin-top="0cm" fo:margin-bottom="0cm" fo:line-height="93%" fo:text-align="start"/>
    </style:style>
    <style:style style:name="P17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8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style:text-line-through-style="solid" style:text-line-through-text="X" fo:font-size="16pt" fo:text-shadow="none" style:font-size-asian="16pt" style:font-size-complex="16pt"/>
    </style:style>
    <style:style style:name="T10" style:family="text">
      <style:text-properties fo:color="#ffffff" style:text-line-through-style="solid" style:text-line-through-width="bold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style:text-line-through-style="solid" style:text-line-through-width="bold" fo:font-size="16pt" fo:text-shadow="none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family="Courier" style:font-family-generic="modern" style:font-pitch="fixed" fo:font-size="14pt" style:font-size-asian="14pt" style:font-size-complex="14pt"/>
    </style:style>
    <style:style style:name="T14" style:family="text">
      <style:text-properties fo:font-family="Courier" style:font-family-generic="modern" style:font-pitch="fixed" fo:font-size="14pt" style:font-size-asian="14pt" style:font-size-complex="14pt"/>
    </style:style>
    <style:style style:name="T15" style:family="text">
      <style:text-properties style:text-line-through-style="none" fo:font-size="16pt" fo:text-shadow="none" style:font-size-asian="16pt" style:font-size-complex="16pt"/>
    </style:style>
    <style:style style:name="T16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7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color="#0000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color="#b26818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0000ff" style:text-line-through-style="solid" style:text-line-through-width="bold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3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2.623cm" svg:x="2.286cm" svg:y="8.198cm" presentation:class="title" presentation:user-transformed="true">
          <draw:text-box>
            <text:p text:style-name="P1">Hledání chyb<text:line-break/><text:span text:style-name="T1">Ne falešných hlášení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2">Jiří Slabý</text:span><text:span text:style-name="T3">, </text:span><text:span text:style-name="T4">Jan Strejček, Marek Trtík</text:span></text:p>
            <text:p text:style-name="P2"><text:span text:style-name="T4">Fakulta informatiky</text:span></text:p>
            <text:p text:style-name="P2"><text:span text:style-name="T4">Masarykova Univerzita</text:span>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ruktura prezentac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Úvod a trocha teorie</text:p>
                <text:list>
                  <text:list-item>
                    <text:p>Stanse</text:p>
                  </text:list-item>
                </text:list>
              </text:list-item>
              <text:list-item>
                <text:p>Nevýhody</text:p>
              </text:list-item>
              <text:list-item>
                <text:p>Nová techni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ans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Nástroj pro statickou analýzu</text:p>
              </text:list-item>
              <text:list-item>
                <text:p>Čtyři analýzy</text:p>
                <text:list>
                  <text:list-item>
                    <text:p>Hledání nedosažitelného kódu</text:p>
                  </text:list-item>
                  <text:list-item>
                    <text:p>Analýza vláken a zámků</text:p>
                  </text:list-item>
                  <text:list-item>
                    <text:p>Statistická analýza zámků</text:p>
                  </text:list-item>
                  <text:list-item>
                    <text:p><text:span text:style-name="T2">Abstraktní interpretac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76cm" svg:height="5.554cm" svg:x="13.954cm" svg:y="0.295cm">
          <draw:image xlink:href="Pictures/100002010000029400000148C5631F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draw:style-name="gr3" draw:text-style-name="P5" draw:layer="layout" svg:width="8cm" svg:height="4.09cm" svg:x="7.535cm" svg:y="10.492cm">
          <draw:text-box>
            <text:p text:style-name="P5"><text:span text:style-name="T5">void</text:span><text:span text:style-name="T6"> </text:span><text:span text:style-name="T7">double_lock() {</text:span></text:p>
            <text:p text:style-name="P5"><text:span text:style-name="T6"><text:s text:c="2"/></text:span><text:span text:style-name="T7">lock();</text:span></text:p>
            <text:p text:style-name="P5"><text:span text:style-name="T6"><text:s text:c="2"/></text:span><text:span text:style-name="T7">stuff();</text:span></text:p>
            <text:p text:style-name="P5"><text:span text:style-name="T6"><text:s text:c="2"/></text:span><text:span text:style-name="T7">more_stuff();</text:span></text:p>
            <text:p text:style-name="P5"><text:span text:style-name="T6"><text:s text:c="2"/></text:span><text:span text:style-name="T7">lock();</text:span></text:p>
            <text:p text:style-name="P6"><text:span text:style-name="T6">}</text:span></text:p>
          </draw:text-box>
        </draw:frame>
        <draw:frame draw:style-name="gr4" draw:text-style-name="P5" xml:id="id7" draw:id="id7" draw:layer="layout" svg:width="8cm" svg:height="4.09cm" svg:x="7.535cm" svg:y="10.493cm">
          <draw:text-box>
            <text:p text:style-name="P5"><text:span text:style-name="T5">void</text:span><text:span text:style-name="T6"> </text:span><text:span text:style-name="T7">double_lock() {</text:span></text:p>
            <text:p text:style-name="P5"><text:span text:style-name="T6"><text:s text:c="2"/></text:span><text:span text:style-name="T7">lock();</text:span><text:span text:style-name="T8"> // U → L </text:span>L</text:p>
            <text:p text:style-name="P5"><text:span text:style-name="T9"><text:s text:c="2"/></text:span><text:span text:style-name="T10">stuff();</text:span></text:p>
            <text:p text:style-name="P5"><text:span text:style-name="T11"><text:s text:c="2"/></text:span><text:span text:style-name="T10">more_stuff();</text:span></text:p>
            <text:p text:style-name="P5"><text:span text:style-name="T6"><text:s text:c="2"/></text:span><text:span text:style-name="T7">lock(); </text:span><text:span text:style-name="T8">// L → ERROR</text:span></text:p>
            <text:p text:style-name="P6"><text:span text:style-name="T6">}</text:span></text:p>
          </draw:text-box>
        </draw:frame>
        <draw:frame presentation:style-name="pr7" draw:layer="layout" svg:width="20.93cm" svg:height="2.743cm" svg:x="2.286cm" svg:y="0.711cm" presentation:class="title" presentation:user-transformed="true">
          <draw:text-box>
            <text:p>Abstraktní interpreta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gnorování nezajímavého kódu</text:p>
                <text:list>
                  <text:list-item>
                    <text:p>Cousot&amp;Cousot</text:p>
                  </text:list-item>
                </text:list>
              </text:list-item>
              <text:list-item>
                <text:p>Např. sledování stavu zámku</text:p>
                <text:list>
                  <text:list-item>
                    <text:p>A ničeho jinéh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AI ve Stanse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v je popsán konečnými automaty</text:p>
              </text:list-item>
              <text:list-item>
                <text:p>Syntaktické konstrukty mění stavy</text:p>
                <text:list>
                  <text:list-item>
                    <text:p>Konfigurace říká které a jak</text:p>
                  </text:list-item>
                </text:list>
              </text:list-item>
            </text:list>
          </draw:text-box>
        </draw:frame>
        <draw:g>
          <draw:custom-shape draw:style-name="gr5" draw:text-style-name="P7" xml:id="id2" draw:id="id2" draw:layer="layout" svg:width="3.622cm" svg:height="1.469cm" svg:x="13.655cm" svg:y="0.711cm">
            <draw:glue-point draw:id="4" svg:x="5.024cm" svg:y="-2.45cm" draw:escape-direction="right"/>
            <draw:glue-point draw:id="5" svg:x="1.802cm" svg:y="0.306cm" draw:align="center"/>
            <text:p text:style-name="P7"><text:span text:style-name="T12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1" draw:id="id1" draw:layer="layout" svg:width="3.622cm" svg:height="1.469cm" svg:x="21.559cm" svg:y="0.711cm">
            <draw:glue-point draw:id="4" svg:x="-4.958cm" svg:y="-2.328cm"/>
            <draw:glue-point draw:id="5" svg:x="-1.811cm" svg:y="0.332cm" draw:align="center" draw:escape-direction="left"/>
            <text:p text:style-name="P4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4" draw:layer="layout" draw:type="line" svg:x1="21.559cm" svg:y1="1.777cm" svg:x2="17.268cm" svg:y2="1.751cm" draw:start-shape="id1" draw:start-glue-point="5" draw:end-shape="id2" draw:end-glue-point="5" svg:d="m21559 1777-4291-26">
            <text:p/>
          </draw:connector>
          <draw:custom-shape draw:style-name="gr7" draw:text-style-name="P4" xml:id="id3" draw:id="id3" draw:layer="layout" svg:width="3.622cm" svg:height="1.469cm" svg:x="17.602cm" svg:y="3.606cm">
            <draw:glue-point draw:id="4" svg:x="5.024cm" svg:y="-2.45cm" draw:escape-direction="right"/>
            <draw:glue-point draw:id="5" svg:x="-1.821cm" svg:y="-0.347cm" draw:align="center"/>
            <text:p text:style-name="P4">Err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4" draw:layer="layout" draw:type="line" svg:x1="17.277cm" svg:y1="1.086cm" svg:x2="21.575cm" svg:y2="1.104cm" draw:start-shape="id2" draw:start-glue-point="4" draw:end-shape="id1" draw:end-glue-point="4" svg:d="m17277 1086 4298 18">
            <text:p/>
          </draw:connector>
          <draw:frame draw:style-name="gr8" draw:text-style-name="P8" draw:layer="layout" svg:width="2.28cm" svg:height="0.814cm" svg:x="18.286cm" svg:y="0.271cm">
            <draw:text-box>
              <text:p text:style-name="P8"><text:span text:style-name="T13">lock()</text:span></text:p>
            </draw:text-box>
          </draw:frame>
          <draw:frame draw:style-name="gr9" draw:text-style-name="P9" draw:layer="layout" svg:width="2.873cm" svg:height="0.814cm" svg:x="17.977cm" svg:y="1.854cm">
            <draw:text-box>
              <text:p><text:span text:style-name="T14">unlock()</text:span></text:p>
            </draw:text-box>
          </draw:frame>
          <draw:frame draw:style-name="gr9" draw:text-style-name="P9" draw:layer="layout" svg:width="2.873cm" svg:height="0.814cm" svg:x="13.841cm" svg:y="2.888cm">
            <draw:text-box>
              <text:p><text:span text:style-name="T14">unlock()</text:span></text:p>
            </draw:text-box>
          </draw:frame>
          <draw:frame draw:style-name="gr9" draw:text-style-name="P9" draw:layer="layout" svg:width="2.28cm" svg:height="0.814cm" svg:x="22.194cm" svg:y="2.888cm">
            <draw:text-box>
              <text:p><text:span text:style-name="T14">lock()</text:span></text:p>
            </draw:text-box>
          </draw:frame>
          <draw:connector draw:style-name="gr6" draw:text-style-name="P4" draw:layer="layout" draw:type="line" svg:x1="23.37cm" svg:y1="2.18cm" svg:x2="21.224cm" svg:y2="3.981cm" draw:start-shape="id1" draw:start-glue-point="2" draw:end-shape="id3" draw:end-glue-point="4" svg:d="m23370 2180-2146 1801">
            <text:p/>
          </draw:connector>
          <draw:connector draw:style-name="gr6" draw:text-style-name="P4" draw:layer="layout" draw:type="line" svg:x1="15.466cm" svg:y1="2.18cm" svg:x2="17.602cm" svg:y2="3.993cm" draw:start-shape="id2" draw:start-glue-point="2" draw:end-shape="id3" draw:end-glue-point="5" svg:d="m15466 2180 2136 1813">
            <text:p/>
          </draw:connector>
        </draw:g>
        <draw:frame draw:style-name="gr4" draw:text-style-name="P5" xml:id="id8" draw:id="id8" draw:layer="layout" svg:width="8cm" svg:height="4.09cm" svg:x="7.535cm" svg:y="10.493cm">
          <draw:text-box>
            <text:p text:style-name="P5"><text:span text:style-name="T5">void</text:span><text:span text:style-name="T6"> </text:span><text:span text:style-name="T7">double_lock() {</text:span></text:p>
            <text:p text:style-name="P5"><text:span text:style-name="T6"><text:s text:c="2"/></text:span><text:span text:style-name="T7">lock();</text:span><text:span text:style-name="T8"> // U → L </text:span>L</text:p>
            <text:p text:style-name="P5"><text:span text:style-name="T15"><text:s text:c="2"/></text:span><text:span text:style-name="T16">stuff();</text:span></text:p>
            <text:p text:style-name="P5"><text:span text:style-name="T15"><text:s text:c="2"/></text:span><text:span text:style-name="T16">more_stuff();</text:span></text:p>
            <text:p text:style-name="P5"><text:span text:style-name="T6"><text:s text:c="2"/></text:span><text:span text:style-name="T7">lock(); </text:span><text:span text:style-name="T8">// L → ERROR</text:span></text:p>
            <text:p text:style-name="P6"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AI nad zámky</text:p>
          </draw:text-box>
        </draw:frame>
        <draw:frame presentation:style-name="pr8" draw:layer="layout" svg:width="20.93cm" svg:height="12.573cm" svg:x="2.286cm" svg:y="4.039cm" presentation:class="outline" presentation:placeholder="true" presentation:user-transformed="true">
          <draw:text-box/>
        </draw:frame>
        <draw:g>
          <draw:custom-shape draw:style-name="gr5" draw:text-style-name="P7" xml:id="id5" draw:id="id5" draw:layer="layout" svg:width="3.622cm" svg:height="1.469cm" svg:x="13.655cm" svg:y="0.711cm">
            <draw:glue-point draw:id="4" svg:x="5.024cm" svg:y="-2.45cm" draw:escape-direction="right"/>
            <draw:glue-point draw:id="5" svg:x="1.802cm" svg:y="0.306cm" draw:align="center"/>
            <text:p text:style-name="P7"><text:span text:style-name="T12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4" draw:id="id4" draw:layer="layout" svg:width="3.622cm" svg:height="1.469cm" svg:x="21.559cm" svg:y="0.711cm">
            <draw:glue-point draw:id="4" svg:x="-4.958cm" svg:y="-2.328cm"/>
            <draw:glue-point draw:id="5" svg:x="-1.811cm" svg:y="0.332cm" draw:align="center" draw:escape-direction="left"/>
            <text:p text:style-name="P4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4" draw:layer="layout" draw:type="line" svg:x1="21.559cm" svg:y1="1.777cm" svg:x2="17.268cm" svg:y2="1.751cm" draw:start-shape="id4" draw:start-glue-point="5" draw:end-shape="id5" draw:end-glue-point="5" svg:d="m21559 1777-4291-26">
            <text:p/>
          </draw:connector>
          <draw:custom-shape draw:style-name="gr7" draw:text-style-name="P4" xml:id="id6" draw:id="id6" draw:layer="layout" svg:width="3.622cm" svg:height="1.469cm" svg:x="17.602cm" svg:y="3.606cm">
            <draw:glue-point draw:id="4" svg:x="5.024cm" svg:y="-2.45cm" draw:escape-direction="right"/>
            <draw:glue-point draw:id="5" svg:x="-1.821cm" svg:y="-0.347cm" draw:align="center"/>
            <text:p text:style-name="P4">Err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4" draw:layer="layout" draw:type="line" svg:x1="17.277cm" svg:y1="1.086cm" svg:x2="21.575cm" svg:y2="1.104cm" draw:start-shape="id5" draw:start-glue-point="4" draw:end-shape="id4" draw:end-glue-point="4" svg:d="m17277 1086 4298 18">
            <text:p/>
          </draw:connector>
          <draw:frame draw:style-name="gr8" draw:text-style-name="P8" draw:layer="layout" svg:width="2.28cm" svg:height="0.814cm" svg:x="18.286cm" svg:y="0.271cm">
            <draw:text-box>
              <text:p text:style-name="P8"><text:span text:style-name="T13">lock()</text:span></text:p>
            </draw:text-box>
          </draw:frame>
          <draw:frame draw:style-name="gr9" draw:text-style-name="P9" draw:layer="layout" svg:width="2.873cm" svg:height="0.814cm" svg:x="17.977cm" svg:y="1.854cm">
            <draw:text-box>
              <text:p><text:span text:style-name="T14">unlock()</text:span></text:p>
            </draw:text-box>
          </draw:frame>
          <draw:frame draw:style-name="gr9" draw:text-style-name="P9" draw:layer="layout" svg:width="2.873cm" svg:height="0.814cm" svg:x="13.841cm" svg:y="2.888cm">
            <draw:text-box>
              <text:p><text:span text:style-name="T14">unlock()</text:span></text:p>
            </draw:text-box>
          </draw:frame>
          <draw:frame draw:style-name="gr9" draw:text-style-name="P9" draw:layer="layout" svg:width="2.28cm" svg:height="0.814cm" svg:x="22.194cm" svg:y="2.888cm">
            <draw:text-box>
              <text:p><text:span text:style-name="T14">lock()</text:span></text:p>
            </draw:text-box>
          </draw:frame>
          <draw:connector draw:style-name="gr6" draw:text-style-name="P4" draw:layer="layout" draw:type="line" svg:x1="23.37cm" svg:y1="2.18cm" svg:x2="21.224cm" svg:y2="3.981cm" draw:start-shape="id4" draw:start-glue-point="2" draw:end-shape="id6" draw:end-glue-point="4" svg:d="m23370 2180-2146 1801">
            <text:p/>
          </draw:connector>
          <draw:connector draw:style-name="gr6" draw:text-style-name="P4" draw:layer="layout" draw:type="line" svg:x1="15.466cm" svg:y1="2.18cm" svg:x2="17.602cm" svg:y2="3.993cm" draw:start-shape="id5" draw:start-glue-point="2" draw:end-shape="id6" draw:end-glue-point="5" svg:d="m15466 2180 2136 1813">
            <text:p/>
          </draw:connector>
        </draw:g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Příklad</text:p>
          </draw:text-box>
        </draw:frame>
        <draw:frame presentation:style-name="pr8" draw:layer="layout" svg:width="20.93cm" svg:height="12.573cm" svg:x="2.286cm" svg:y="4.039cm" presentation:class="outline" presentation:placeholder="true" presentation:user-transformed="true">
          <draw:text-box/>
        </draw:frame>
        <draw:frame draw:style-name="gr10" draw:text-style-name="P10" draw:layer="layout" svg:width="17.268cm" svg:height="6.383cm" svg:x="4.129cm" svg:y="8.076cm">
          <draw:text-box>
            <text:p text:style-name="P10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/text:span><text:span text:style-name="T20">// AUTOMATON STATE</text:span></text:p>
            <text:p text:style-name="P10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</text:span></text:p>
            <text:p text:style-name="P10"><text:span text:style-name="T18"><text:s text:c="4"/></text:span><text:span text:style-name="T19">lock();</text:span><text:span text:style-name="T18"> <text:s text:c="6"/></text:span><text:span text:style-name="T20">// L</text:span></text:p>
            <text:p text:style-name="P10"><text:span text:style-name="T18"><text:s text:c="2"/></text:span><text:span text:style-name="T19">stuff();</text:span><text:span text:style-name="T18"> <text:s text:c="7"/></text:span><text:span text:style-name="T20">// U or L</text:span></text:p>
            <text:p text:style-name="P10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 or L</text:span></text:p>
            <text:p text:style-name="P10"><text:span text:style-name="T18"><text:s text:c="4"/></text:span><text:span text:style-name="T19">unlock();</text:span><text:span text:style-name="T18"> <text:s text:c="4"/></text:span><text:span text:style-name="T20">// ERROR or U</text:span></text:p>
            <text:p text:style-name="P11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eak" presentation:presentation-page-layout-name="AL3T19">
        <office:forms form:automatic-focus="false" form:apply-design-mode="false"/>
        <draw:frame presentation:style-name="pr10" draw:layer="layout" svg:width="20.884cm" svg:height="3.18cm" svg:x="2.286cm" svg:y="7.62cm" presentation:class="title" presentation:user-transformed="true">
          <draw:text-box>
            <text:p>Nová technik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Nová technik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Nad LLVM</text:p>
                <text:list>
                  <text:list-item>
                    <text:p>Vyvíjený a udržovaný</text:p>
                  </text:list-item>
                </text:list>
              </text:list-item>
              <text:list-item>
                <text:p>Slicing</text:p>
              </text:list-item>
              <text:list-item>
                <text:p>Abstraktní interpretace</text:p>
              </text:list-item>
              <text:list-item>
                <text:p>Symbolická exekuce</text:p>
              </text:list-item>
              <text:list-item>
                <text:p>Sémanticky x syntaktick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oužití techni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Ověřování výstupu statické analýzy</text:p>
                <text:list>
                  <text:list-item>
                    <text:p>Odhalí falešná hlášení</text:p>
                  </text:list-item>
                  <text:list-item>
                    <text:p>Nemusí procházet celý projekt</text:p>
                  </text:list-item>
                </text:list>
              </text:list-item>
              <text:list-item>
                <text:p>Samostatný nástroj na hledání chyb</text:p>
                <text:list>
                  <text:list-item>
                    <text:p>Přesnější</text:p>
                  </text:list-item>
                  <text:list-item>
                    <text:p>„Neztratí“ chyb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Technika ze 70. let (Weiser)</text:p>
              </text:list-item>
              <text:list-item>
                <text:p>Odstranit z kódu nepodstatné</text:p>
              </text:list-item>
              <text:list-item>
                <text:p>Potřeba interprocedurálního rozšíření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draw:style-name="standard" draw:layer="layout" svg:width="20.914cm" svg:height="5.831cm" svg:x="2.243cm" svg:y="6.2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2">Počet funkcí</text:span></text:p>
              </table:table-cell>
              <table:table-cell>
                <text:p text:style-name="P12"><text:span text:style-name="T2">Před slicováním</text:span></text:p>
              </table:table-cell>
              <table:table-cell>
                <text:p text:style-name="P12"><text:span text:style-name="T2">Po slicování</text:span></text:p>
              </table:table-cell>
            </table:table-row>
            <table:table-row table:style-name="ro1" table:default-cell-style-name="ce2">
              <table:table-cell>
                <text:p text:style-name="P13">S assemblerem</text:p>
              </table:table-cell>
              <table:table-cell/>
              <table:table-cell>
                <text:p text:style-name="P13">0 (ignoruje se)</text:p>
              </table:table-cell>
            </table:table-row>
            <table:table-row table:style-name="ro1" table:default-cell-style-name="ce2">
              <table:table-cell>
                <text:p text:style-name="P13">S externím voláním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13">S cyklem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13">Bez ASM a volání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13">Bez ASM, volání a cyklů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0.93cm" svg:height="2.743cm" svg:x="2.286cm" svg:y="0.711cm" presentation:class="title">
          <draw:text-box>
            <text:p>Účinek slicování</text:p>
          </draw:text-box>
        </draw:frame>
        <draw:frame draw:style-name="gr11" draw:text-style-name="P14" draw:layer="layout" svg:width="0.503cm" svg:height="2.106cm" svg:x="11.054cm" svg:y="9.1cm">
          <draw:text-box>
            <text:p text:style-name="P14"/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ymbolická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Program se zpracovává symbolicky</text:p>
                <text:list>
                  <text:list-item>
                    <text:p>Uchovávání stavu proměnných (symbolů)</text:p>
                  </text:list-item>
                  <text:list-item>
                    <text:p>A vztahů mezi nimi („path condition“)</text:p>
                  </text:list-item>
                  <text:list-item>
                    <text:p>Použití (SAT) solveru</text:p>
                  </text:list-item>
                  <text:list-item>
                    <text:p>King (70. léta)</text:p>
                  </text:list-item>
                </text:list>
              </text:list-item>
            </text:list>
          </draw:text-box>
        </draw:frame>
        <draw:frame draw:style-name="gr10" draw:text-style-name="P10" xml:id="id9" draw:id="id9" draw:layer="layout" svg:width="20.06cm" svg:height="6.383cm" svg:x="2.735cm" svg:y="10.477cm">
          <draw:text-box>
            <text:p text:style-name="P10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/text:span><text:span text:style-name="T20">// AUTOMATON STATE</text:span></text:p>
            <text:p text:style-name="P10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</text:span></text:p>
            <text:p text:style-name="P10"><text:span text:style-name="T18"><text:s text:c="4"/></text:span><text:span text:style-name="T19">lock();</text:span><text:span text:style-name="T18"> <text:s text:c="6"/></text:span><text:span text:style-name="T20">// x &amp;&amp; L</text:span></text:p>
            <text:p text:style-name="P10"><text:span text:style-name="T18"><text:s text:c="2"/></text:span><text:span text:style-name="T19">stuff();</text:span><text:span text:style-name="T18"> <text:s text:c="7"/></text:span><text:span text:style-name="T20">// (!x &amp;&amp; U) || (x &amp;&amp; L)</text:span></text:p>
            <text:p text:style-name="P10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(!x &amp;&amp; U) || (x &amp;&amp; L)</text:span></text:p>
            <text:p text:style-name="P10"><text:span text:style-name="T18"><text:s text:c="4"/></text:span><text:span text:style-name="T19">unlock();</text:span><text:span text:style-name="T18"> <text:s text:c="4"/></text:span><text:span text:style-name="T20">// </text:span><text:span text:style-name="T22">(!x &amp;&amp; U)</text:span><text:span text:style-name="T20"> || (x &amp;&amp; U)</text:span></text:p>
            <text:p text:style-name="P11"><text:span text:style-name="T18">} <text:s text:c="16"/></text:span><text:span text:style-name="T20">// 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ymbolická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Klee</text:p>
                <text:list>
                  <text:list-item>
                    <text:p>Existující a udržovaný kód</text:p>
                  </text:list-item>
                  <text:list-item>
                    <text:p>Funguje nad LLVM</text:p>
                  </text:list-item>
                  <text:list-item>
                    <text:p>Open 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Úskalí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ssembler</text:p>
                <text:list>
                  <text:list-item>
                    <text:p>Většinu lze nahradit C/LLVM kódem</text:p>
                  </text:list-item>
                </text:list>
              </text:list-item>
              <text:list-item>
                <text:p>Externí volání</text:p>
                <text:list>
                  <text:list-item>
                    <text:p>Celý projekt i se závislotmi</text:p>
                  </text:list-item>
                </text:list>
              </text:list-item>
              <text:list-item>
                <text:p>Cykly</text:p>
                <text:list>
                  <text:list-item>
                    <text:p>Řešením jsou Markovy technik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Výsled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Kolik to čeho našlo</text:p>
              </text:list-item>
              <text:list-item>
                <text:p>Porovnání se stansem</text:p>
              </text:list-item>
              <text:list-item>
                <text:p>Čas běhu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all_20_to_20_Action" presentation:presentation-page-layout-name="AL3T19">
        <office:forms form:automatic-focus="false" form:apply-design-mode="false"/>
        <draw:custom-shape draw:name="TextBox 1" draw:style-name="gr12" draw:text-style-name="P17" draw:layer="layout" svg:width="18.188cm" svg:height="4.502cm" svg:x="4.386cm" svg:y="3.616cm">
          <text:p text:style-name="P16"><text:span text:style-name="T23">Dotaz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0.542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39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Děkuji za pozornost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1-12-08T23:43:11</dc:date>
    <meta:editing-duration>PT20H39M53S</meta:editing-duration>
    <meta:editing-cycles>76</meta:editing-cycles>
    <meta:generator>LibreOffice/3.4$Unix LibreOffice_project/340m1$Build-1206</meta:generator>
    <dc:title>SUSE Template v17: 8/12/11</dc:titl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