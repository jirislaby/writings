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TablePreview1.svm"/>
  <manifest:file-entry manifest:media-type="" manifest:full-path="Pictures/TablePreview2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000000" draw:auto-grow-width="false" fo:min-height="3.84cm" fo:min-width="7.44cm"/>
    </style:style>
    <style:style style:name="gr3" style:family="graphic" style:parent-style-name="standard">
      <style:graphic-properties draw:stroke="none" draw:fill="solid" draw:fill-color="#000000" draw:auto-grow-width="false" fo:min-height="3.84cm" fo:min-width="5.074cm"/>
    </style:style>
    <style:style style:name="gr4" style:family="graphic" style:parent-style-name="standard">
      <style:graphic-properties draw:fill="solid" draw:fill-color="#629e1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="solid" draw:fill-color="#e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189cm" fo:min-width="1.2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solid" draw:fill-color="#000000" fo:min-height="4.134cm" fo:min-width="3.321cm"/>
    </style:style>
    <style:style style:name="gr10" style:family="graphic" style:parent-style-name="standard">
      <style:graphic-properties draw:stroke="none" draw:fill="solid" draw:fill-color="#000000" fo:min-height="2.539cm" fo:min-width="7.11cm"/>
    </style:style>
    <style:style style:name="gr11" style:family="graphic" style:parent-style-name="standard">
      <style:graphic-properties draw:stroke="none" draw:fill="solid" draw:fill-color="#000000" fo:min-height="2.934cm" fo:min-width="4.374cm"/>
    </style:style>
    <style:style style:name="gr12" style:family="graphic" style:parent-style-name="standard">
      <style:graphic-properties draw:stroke="none" draw:fill="solid" draw:fill-color="#000000" fo:min-height="4.429cm" fo:min-width="4.4cm"/>
    </style:style>
    <style:style style:name="gr13" style:family="graphic" style:parent-style-name="standard">
      <style:graphic-properties draw:stroke="none" draw:fill="solid" draw:fill-color="#000000" fo:min-height="2.542cm" fo:min-width="8.392cm"/>
    </style:style>
    <style:style style:name="gr14" style:family="graphic" style:parent-style-name="standard">
      <style:graphic-properties draw:stroke="none" draw:fill="solid" draw:fill-color="#000000" fo:min-height="9.303cm" fo:min-width="15.594cm"/>
    </style:style>
    <style:style style:name="gr15" style:family="graphic" style:parent-style-name="standard">
      <style:graphic-properties draw:stroke="none" draw:fill="solid" draw:fill-color="#000000" fo:min-height="8.103cm" fo:min-width="11.773cm"/>
    </style:style>
    <style:style style:name="gr16" style:family="graphic" style:parent-style-name="standard">
      <style:graphic-properties draw:stroke="none" draw:fill="solid" draw:fill-color="#000000" fo:min-height="8.495cm" fo:min-width="10.303cm"/>
    </style:style>
    <style:style style:name="gr17" style:family="graphic" style:parent-style-name="standard">
      <style:graphic-properties draw:stroke="none" draw:fill="solid" draw:fill-color="#000000" fo:min-height="8.911cm" fo:min-width="12.826cm"/>
    </style:style>
    <style:style style:name="gr18" style:family="graphic" style:parent-style-name="standard">
      <style:graphic-properties draw:stroke="none" draw:fill="solid" draw:fill-color="#000000" fo:min-height="2.542cm" fo:min-width="9.249cm"/>
    </style:style>
    <style:style style:name="gr19" style:family="graphic" style:parent-style-name="standard">
      <style:graphic-properties draw:stroke="none" draw:fill="none" draw:textarea-vertical-align="top" draw:auto-grow-height="true" fo:min-height="4.252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auto-grow-height="true" fo:min-height="2.623cm" fo:min-width="21.058cm"/>
    </style:style>
    <style:style style:name="pr2" style:family="presentation" style:parent-style-name="Title-subtitle">
      <style:graphic-properties draw:fill-color="#ffffff" fo:min-height="5.08cm" fo:min-width="10.066cm"/>
    </style:style>
    <style:style style:name="pr3" style:family="presentation" style:parent-style-name="Title-notes">
      <style:graphic-properties draw:fill-color="#ffffff" draw:auto-grow-height="true" fo:min-height="12.572cm" fo:min-width="16.771cm"/>
    </style:style>
    <style:style style:name="pr4" style:family="presentation" style:parent-style-name="No-Logo_20_Content-title">
      <style:graphic-properties draw:auto-grow-height="true" fo:min-height="2.743cm" fo:min-width="21.058cm"/>
    </style:style>
    <style:style style:name="pr5" style:family="presentation" style:parent-style-name="No-Logo_20_Content-outline1">
      <style:graphic-properties fo:min-height="4.83cm" fo:min-width="10.066cm"/>
    </style:style>
    <style:style style:name="pr6" style:family="presentation" style:parent-style-name="No-Logo_20_Content-notes">
      <style:graphic-properties draw:fill-color="#ffffff" draw:auto-grow-height="true" fo:min-height="12.572cm" fo:min-width="16.771cm"/>
    </style:style>
    <style:style style:name="pr7" style:family="presentation" style:parent-style-name="No-Logo_20_Content-title">
      <style:graphic-properties fo:min-height="2.743cm" fo:min-width="20.43cm"/>
    </style:style>
    <style:style style:name="pr8" style:family="presentation" style:parent-style-name="No-Logo_20_Content-outline1">
      <style:graphic-properties fo:min-height="12.323cm" fo:min-width="20.43cm"/>
    </style:style>
    <style:style style:name="pr9" style:family="presentation" style:parent-style-name="No-Logo_20_Content-notes">
      <style:graphic-properties draw:fill-color="#ffffff" fo:min-height="12.572cm" fo:min-width="16.771cm"/>
    </style:style>
    <style:style style:name="pr10" style:family="presentation" style:parent-style-name="Break-title">
      <style:graphic-properties fo:min-height="3.18cm" fo:min-width="20.384cm"/>
    </style:style>
    <style:style style:name="pr11" style:family="presentation" style:parent-style-name="Break-notes">
      <style:graphic-properties draw:fill-color="#ffffff" draw:auto-grow-height="true" fo:min-height="12.572cm" fo:min-width="16.771cm"/>
    </style:style>
    <style:style style:name="pr12" style:family="presentation" style:parent-style-name="Logo_20_Content-title">
      <style:graphic-properties fo:min-height="2.743cm" fo:min-width="20.43cm"/>
    </style:style>
    <style:style style:name="pr13" style:family="presentation" style:parent-style-name="Logo_20_Content-outline1">
      <style:graphic-properties fo:min-height="12.323cm" fo:min-width="20.43cm"/>
    </style:style>
    <style:style style:name="pr14" style:family="presentation" style:parent-style-name="Logo_20_Content-notes">
      <style:graphic-properties draw:fill-color="#ffffff" fo:min-height="12.572cm" fo:min-width="16.771cm"/>
    </style:style>
    <style:style style:name="pr15" style:family="presentation" style:parent-style-name="Call_20_to_20_Action-notes">
      <style:graphic-properties draw:fill-color="#ffffff" draw:auto-grow-height="true" fo:min-height="12.572cm" fo:min-width="16.771cm"/>
    </style:style>
    <style:style style:name="co1" style:family="table-column">
      <style:table-column-properties style:column-width="7.602cm" style:use-optimal-column-width="false"/>
    </style:style>
    <style:style style:name="co2" style:family="table-column">
      <style:table-column-properties style:column-width="2.709cm" style:use-optimal-column-width="false"/>
    </style:style>
    <style:style style:name="co3" style:family="table-column">
      <style:table-column-properties style:column-width="2.708cm" style:use-optimal-column-width="false"/>
    </style:style>
    <style:style style:name="co4" style:family="table-column">
      <style:table-column-properties style:column-width="2.316cm" style:use-optimal-column-width="false"/>
    </style:style>
    <style:style style:name="co5" style:family="table-column">
      <style:table-column-properties style:column-width="2.315cm" style:use-optimal-column-width="false"/>
    </style:style>
    <style:style style:name="co6" style:family="table-column">
      <style:table-column-properties style:column-width="5.538cm" style:use-optimal-column-width="false"/>
    </style:style>
    <style:style style:name="co7" style:family="table-column">
      <style:table-column-properties style:column-width="5.3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 draw:textarea-vertical-align="middle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 draw:textarea-vertical-align="middle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  <style:paragraph-properties fo:text-align="end"/>
    </style:style>
    <style:style style:name="ce7" style:family="table-cell">
      <style:graphic-properties style:repeat="repeat"/>
      <style:paragraph-properties fo:text-align="end"/>
      <style:text-properties fo:color="#e00000"/>
    </style:style>
    <style:style style:name="ce8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paragraph-properties fo:margin-top="0cm" fo:margin-bottom="0.152cm" fo:text-align="star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66pt" style:font-size-asian="66pt" style:font-size-complex="66pt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P8" style:family="paragraph"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text-properties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style:text-autospace="none"/>
      <style:text-properties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P13" style:family="paragraph">
      <style:paragraph-properties style:text-autospace="none"/>
      <style:text-properties fo:color="#ffff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P14" style:family="paragraph">
      <style:paragraph-properties style:text-autospace="none"/>
      <style:text-properties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color="#e00000"/>
    </style:style>
    <style:style style:name="P18" style:family="paragraph">
      <style:text-properties fo:color="#333333" fo:font-size="14pt" style:font-size-asian="14pt" style:font-size-complex="14pt"/>
    </style:style>
    <style:style style:name="P19" style:family="paragraph">
      <style:paragraph-properties style:text-autospace="none"/>
      <style:text-properties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margin-top="0cm" fo:margin-bottom="0cm" fo:line-height="93%" fo:text-align="start"/>
    </style:style>
    <style:style style:name="P22" style:family="paragraph">
      <style:paragraph-properties fo:margin-top="0cm" fo:margin-bottom="0cm" fo:line-height="93%" fo:text-align="start"/>
      <style:text-properties fo:font-size="18pt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66pt" fo:font-weight="bold" style:font-size-asian="66pt" style:font-weight-asian="bold" style:font-size-complex="66pt" style:font-weight-complex="bold"/>
    </style:style>
    <style:style style:name="T6" style:family="text">
      <style:text-properties fo:font-size="66pt" fo:font-weight="normal" style:font-size-asian="66pt" style:font-weight-asian="normal" style:font-size-complex="66pt" style:font-weight-complex="normal"/>
    </style:style>
    <style:style style:name="T7" style:family="text">
      <style:text-properties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00ff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9" style:family="text">
      <style:text-properties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0" style:family="text">
      <style:text-properties fo:color="#ffff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1" style:family="text">
      <style:text-properties fo:color="#0000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2" style:family="text">
      <style:text-properties fo:color="#ffff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3" style:family="text">
      <style:text-properties style:text-line-through-style="solid" style:text-line-through-text="X" fo:font-family="'Courier New'" style:font-family-generic="modern" style:font-pitch="fixed" fo:font-size="16pt" fo:text-shadow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4" style:family="text">
      <style:text-properties fo:color="#ffffff" style:text-line-through-style="solid" style:text-line-through-width="bold" fo:font-family="'Courier New'" style:font-family-generic="modern" style:font-pitch="fixed" fo:font-size="16pt" fo:text-shadow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5" style:family="text">
      <style:text-properties style:text-line-through-style="solid" style:text-line-through-width="bold" fo:font-family="'Courier New'" style:font-family-generic="modern" style:font-pitch="fixed" fo:font-size="16pt" fo:text-shadow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8" style:family="text">
      <style:text-properties style:text-line-through-style="none" fo:font-family="'Courier New'" style:font-family-generic="modern" style:font-pitch="fixed" fo:font-size="16pt" fo:text-shadow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9" style:family="text">
      <style:text-properties fo:color="#ffffff" style:text-line-through-style="none" fo:font-family="'Courier New'" style:font-family-generic="modern" style:font-pitch="fixed" fo:font-size="16pt" fo:text-shadow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0" style:family="text">
      <style:text-properties fo:color="#00ff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color="#ffff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3" style:family="text">
      <style:text-properties fo:color="#ffff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4" style:family="text">
      <style:text-properties fo:color="#00ff00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5" style:family="text">
      <style:text-properties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6" style:family="text">
      <style:text-properties fo:color="#ffffff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7" style:family="text">
      <style:text-properties fo:color="#ffff00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8" style:family="text">
      <style:text-properties fo:color="#ff3366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9" style:family="text">
      <style:text-properties fo:color="#4c4c4c" fo:font-size="32pt" style:font-size-asian="32pt" style:font-size-complex="32pt"/>
    </style:style>
    <style:style style:name="T30" style:family="text">
      <style:text-properties fo:color="#4c4c4c" fo:font-size="20pt" style:font-size-asian="20pt" style:font-size-complex="20pt"/>
    </style:style>
    <style:style style:name="T31" style:family="text">
      <style:text-properties fo:color="#ff3366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2" style:family="text">
      <style:text-properties fo:color="#ff3366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3" style:family="text">
      <style:text-properties fo:color="#ff00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4" style:family="text">
      <style:text-properties fo:color="#ffffff" style:text-line-through-style="solid" style:text-line-through-width="bold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5" style:family="text">
      <style:text-properties fo:color="#3c3c41" fo:font-size="22pt" style:font-size-asian="22pt" style:font-size-complex="22pt"/>
    </style:style>
    <style:style style:name="T36" style:family="text">
      <style:text-properties fo:color="#3c3c41" fo:font-size="22pt" fo:font-weight="bold" style:font-size-asian="22pt" style:font-weight-asian="bold" style:font-size-complex="22pt" style:font-weight-complex="bold"/>
    </style:style>
    <style:style style:name="T37" style:family="text">
      <style:text-properties fo:font-size="18pt" fo:font-weight="bold" style:font-weight-asian="bold" style:font-weight-complex="bold"/>
    </style:style>
    <style:style style:name="T38" style:family="text">
      <style:text-properties fo:font-size="18pt"/>
    </style:style>
    <style:style style:name="T39" style:family="text">
      <style:text-properties style:text-position="super 58%" fo:font-size="18pt" style:font-size-asian="18pt" style:font-size-complex="18pt"/>
    </style:style>
    <style:style style:name="T40" style:family="text">
      <style:text-properties fo:color="#e00000"/>
    </style:style>
    <style:style style:name="T41" style:family="text">
      <style:text-properties fo:color="#333333" fo:font-size="14pt" style:font-size-asian="14pt" style:font-size-complex="14pt"/>
    </style:style>
    <style:style style:name="T42" style:family="text">
      <style:text-properties fo:color="#00ff00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43" style:family="text">
      <style:text-properties fo:font-size="22pt" style:font-size-asian="22pt" style:font-size-complex="22pt"/>
    </style:style>
    <style:style style:name="T44" style:family="text">
      <style:text-properties fo:color="#ffffff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45" style:family="text">
      <style:text-properties fo:color="#ffff00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46" style:family="text">
      <style:text-properties fo:color="#ff3366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47" style:family="text">
      <style:text-properties fo:color="#ff00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8" style:family="text">
      <style:text-properties fo:color="#ff22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9" style:family="text">
      <style:text-properties fo:color="#ffffff" fo:font-size="16pt" style:font-size-asian="16pt" style:font-size-complex="16pt"/>
    </style:style>
    <style:style style:name="T50" style:family="text">
      <style:text-properties fo:color="#7ac142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'Lucida Sans Unicode'" style:font-family-generic-complex="swiss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7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9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1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cm" text:min-label-width="0.6cm"/>
        <style:text-properties fo:font-family="Arial" style:font-style-name="Regular" style:font-family-generic="swiss" fo:color="#454c51" fo:font-size="65%"/>
      </text:list-level-style-bullet>
    </text:list-style>
    <text:list-style style:name="L3">
      <text:list-level-style-bullet text:level="1" text:bullet-char="•">
        <style:list-level-properties text:space-before="0.737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24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1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8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27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05cm" text:min-label-width="0.483cm"/>
        <style:text-properties fo:font-family="Arial" style:font-style-name="Regular" style:font-family-generic="swiss" fo:color="#454c51" fo:font-size="6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1.558cm" svg:height="2.623cm" svg:x="2.286cm" svg:y="8.198cm" presentation:class="title" presentation:user-transformed="true">
          <draw:text-box>
            <text:p text:style-name="P1">Hledání chyb<text:line-break/><text:span text:style-name="T1">Ne falešných hlášení</text:span></text:p>
          </draw:text-box>
        </draw:frame>
        <draw:frame presentation:style-name="pr2" draw:text-style-name="P2" draw:layer="layout" svg:width="10.566cm" svg:height="5.08cm" svg:x="2.261cm" svg:y="13.081cm" presentation:class="subtitle" presentation:user-transformed="true">
          <draw:text-box>
            <text:p text:style-name="P2"><text:span text:style-name="T2">Jiří Slabý</text:span><text:span text:style-name="T3">, </text:span><text:span text:style-name="T4">Jan Strejček, Marek Trtík</text:span></text:p>
            <text:p text:style-name="P2"><text:span text:style-name="T4">Fakulta informatiky</text:span></text:p>
            <text:p text:style-name="P2"><text:span text:style-name="T4">Masarykova Univerzita</text:span></text:p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Struktura prezentace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Úvod a trocha teorie</text:p>
                <text:list>
                  <text:list-item>
                    <text:p>Klasická statická analýza</text:p>
                  </text:list-item>
                </text:list>
              </text:list-item>
              <text:list-item>
                <text:p>Nevýhody</text:p>
              </text:list-item>
              <text:list-item>
                <text:p>Eliminace falešných hlášení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Motivace</text:p>
          </draw:text-box>
        </draw:frame>
        <draw:frame presentation:style-name="pr8" draw:text-style-name="P5" draw:layer="layout" svg:width="20.93cm" svg:height="10.115cm" svg:x="2.286cm" svg:y="5.255cm" presentation:class="outline" presentation:user-transformed="true">
          <draw:text-box>
            <text:list text:style-name="L2">
              <text:list-header>
                <text:p text:style-name="P4"><text:span text:style-name="T5">59 miliard dolarů ročně</text:span><text:span text:style-name="T5"><text:line-break/></text:span><text:span text:style-name="T6">tj.</text:span></text:p>
                <text:p text:style-name="P4"><text:span text:style-name="T5">0,6 % hrubého domácího produktu</text:span></text:p>
                <text:p text:style-name="P4"><text:span text:style-name="T7">(vládní studie v USA, 2002)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Jak hledat chyby v kódu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Dynamicky</text:p>
              </text:list-item>
              <text:list-item>
                <text:p>Staticky</text:p>
                <text:list>
                  <text:list-item>
                    <text:p>Data-flow analýza</text:p>
                  </text:list-item>
                  <text:list-item>
                    <text:p><text:span text:style-name="T2">Klasická statická analýza</text:span></text:p>
                  </text:list-item>
                  <text:list-item>
                    <text:p><text:span text:style-name="T2">Symbolická exekuce</text:span></text:p>
                  </text:list-item>
                  <text:list-item>
                    <text:p><text:span text:style-name="T3">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Klasická statická analýza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Ignorování nezajímavého kódu</text:p>
                <text:list>
                  <text:list-item>
                    <text:p>Abstrakce</text:p>
                  </text:list-item>
                </text:list>
              </text:list-item>
              <text:list-item>
                <text:p xml:id="id5" text:id="id5">Formalizována</text:p>
                <text:list>
                  <text:list-item>
                    <text:p xml:id="id6" text:id="id6">Cousot&amp;Cousot v 70. letech</text:p>
                  </text:list-item>
                </text:list>
              </text:list-item>
              <text:list-item>
                <text:p xml:id="id7" text:id="id7">Použita v mnoha nástrojích</text:p>
                <text:list>
                  <text:list-item>
                    <text:p xml:id="id8" text:id="id8">Coverity, Stanse…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8cm" svg:height="4.09cm" svg:x="7.535cm" svg:y="12.493cm">
          <draw:text-box>
            <text:p text:style-name="P6"><text:span text:style-name="T8">void</text:span><text:span text:style-name="T9"> </text:span><text:span text:style-name="T10">double_lock() {</text:span></text:p>
            <text:p text:style-name="P6"><text:span text:style-name="T9"><text:s text:c="2"/></text:span><text:span text:style-name="T10">lock();</text:span></text:p>
            <text:p text:style-name="P6"><text:span text:style-name="T9"><text:s text:c="2"/></text:span><text:span text:style-name="T10">stuff();</text:span></text:p>
            <text:p text:style-name="P6"><text:span text:style-name="T9"><text:s text:c="2"/></text:span><text:span text:style-name="T10">more_stuff();</text:span></text:p>
            <text:p text:style-name="P6"><text:span text:style-name="T9"><text:s text:c="2"/></text:span><text:span text:style-name="T10">lock();</text:span></text:p>
            <text:p text:style-name="P6"><text:span text:style-name="T10">}</text:span></text:p>
          </draw:text-box>
        </draw:frame>
        <draw:frame draw:style-name="gr3" draw:text-style-name="P7" xml:id="id4" draw:id="id4" draw:layer="layout" svg:width="8cm" svg:height="4.09cm" svg:x="7.535cm" svg:y="12.494cm">
          <draw:text-box>
            <text:p text:style-name="P6"><text:span text:style-name="T8">void</text:span><text:span text:style-name="T9"> </text:span><text:span text:style-name="T10">double_lock() {</text:span></text:p>
            <text:p text:style-name="P6"><text:span text:style-name="T9"><text:s text:c="2"/></text:span><text:span text:style-name="T10">lock();</text:span><text:span text:style-name="T11"> </text:span><text:span text:style-name="T12">// U → L</text:span></text:p>
            <text:p text:style-name="P6"><text:span text:style-name="T13"><text:s text:c="2"/></text:span><text:span text:style-name="T14">stuff();</text:span></text:p>
            <text:p text:style-name="P6"><text:span text:style-name="T15"><text:s text:c="2"/></text:span><text:span text:style-name="T14">more_stuff();</text:span></text:p>
            <text:p text:style-name="P6"><text:span text:style-name="T9"><text:s text:c="2"/></text:span><text:span text:style-name="T10">lock(); </text:span><text:span text:style-name="T12">// L → ERROR</text:span></text:p>
            <text:p text:style-name="P6"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Klasická statická analýza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Výhody</text:p>
                <text:list>
                  <text:list-item>
                    <text:p>Konfigurovatelnost</text:p>
                  </text:list-item>
                  <text:list-item>
                    <text:p>Rychlost</text:p>
                  </text:list-item>
                  <text:list-item>
                    <text:p>Důkaz korektnosti programu</text:p>
                  </text:list-item>
                </text:list>
              </text:list-item>
              <text:list-item>
                <text:p xml:id="id9" text:id="id9">Nevýhody</text:p>
                <text:list>
                  <text:list-item>
                    <text:p xml:id="id10" text:id="id10">Falešná hlášení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Zamykací chyby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Dobře popsatelné konečnými automaty</text:p>
              </text:list-item>
              <text:list-item>
                <text:p>Syntaktické konstrukce mění stavy</text:p>
                <text:list>
                  <text:list-item>
                    <text:p>Konfigurace říká které a jak</text:p>
                  </text:list-item>
                </text:list>
              </text:list-item>
            </text:list>
          </draw:text-box>
        </draw:frame>
        <draw:g xml:id="id12" draw:id="id12">
          <draw:custom-shape draw:style-name="gr4" draw:text-style-name="P8" xml:id="id2" draw:id="id2" draw:layer="layout" svg:width="3.622cm" svg:height="1.469cm" svg:x="2.022cm" svg:y="10.368cm">
            <draw:glue-point draw:id="4" svg:x="5.024cm" svg:y="-2.45cm" draw:escape-direction="right"/>
            <draw:glue-point draw:id="5" svg:x="1.802cm" svg:y="0.306cm" draw:align="center"/>
            <text:p text:style-name="P4"><text:span text:style-name="T16">Unlock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1" draw:id="id1" draw:layer="layout" svg:width="3.622cm" svg:height="1.469cm" svg:x="9.926cm" svg:y="10.368cm">
            <draw:glue-point draw:id="4" svg:x="-4.958cm" svg:y="-2.328cm"/>
            <draw:glue-point draw:id="5" svg:x="-1.811cm" svg:y="0.332cm" draw:align="center" draw:escape-direction="left"/>
            <text:p text:style-name="P4">Lock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4" draw:layer="layout" draw:type="line" svg:x1="9.926cm" svg:y1="11.434cm" svg:x2="5.635cm" svg:y2="11.408cm" draw:start-shape="id1" draw:start-glue-point="5" draw:end-shape="id2" draw:end-glue-point="5" svg:d="m9926 11434-4291-26">
            <text:p/>
          </draw:connector>
          <draw:custom-shape draw:style-name="gr6" draw:text-style-name="P9" xml:id="id3" draw:id="id3" draw:layer="layout" svg:width="3.622cm" svg:height="1.469cm" svg:x="5.969cm" svg:y="13.263cm">
            <draw:glue-point draw:id="4" svg:x="5.024cm" svg:y="-2.45cm" draw:escape-direction="right"/>
            <draw:glue-point draw:id="5" svg:x="-1.821cm" svg:y="-0.347cm" draw:align="center"/>
            <text:p text:style-name="P4"><text:span text:style-name="T2">Err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4" draw:layer="layout" draw:type="line" svg:x1="5.644cm" svg:y1="10.743cm" svg:x2="9.942cm" svg:y2="10.761cm" draw:start-shape="id2" draw:start-glue-point="4" draw:end-shape="id1" draw:end-glue-point="4" svg:d="m5644 10743 4298 18">
            <text:p/>
          </draw:connector>
          <draw:frame draw:style-name="gr7" draw:text-style-name="P10" draw:layer="layout" svg:width="2.28cm" svg:height="0.818cm" svg:x="6.653cm" svg:y="9.928cm">
            <draw:text-box>
              <text:p><text:span text:style-name="T17">lock()</text:span></text:p>
            </draw:text-box>
          </draw:frame>
          <draw:frame draw:style-name="gr8" draw:text-style-name="P11" draw:layer="layout" svg:width="2.873cm" svg:height="0.818cm" svg:x="6.344cm" svg:y="11.511cm">
            <draw:text-box>
              <text:p><text:span text:style-name="T17">unlock()</text:span></text:p>
            </draw:text-box>
          </draw:frame>
          <draw:frame draw:style-name="gr8" draw:text-style-name="P11" draw:layer="layout" svg:width="2.873cm" svg:height="0.818cm" svg:x="2.208cm" svg:y="12.545cm">
            <draw:text-box>
              <text:p><text:span text:style-name="T17">unlock()</text:span></text:p>
            </draw:text-box>
          </draw:frame>
          <draw:frame draw:style-name="gr8" draw:text-style-name="P11" draw:layer="layout" svg:width="2.28cm" svg:height="0.818cm" svg:x="10.561cm" svg:y="12.545cm">
            <draw:text-box>
              <text:p><text:span text:style-name="T17">lock()</text:span></text:p>
            </draw:text-box>
          </draw:frame>
          <draw:connector draw:style-name="gr5" draw:text-style-name="P4" draw:layer="layout" draw:type="line" svg:x1="11.737cm" svg:y1="11.837cm" svg:x2="9.591cm" svg:y2="13.638cm" draw:start-shape="id1" draw:start-glue-point="2" draw:end-shape="id3" draw:end-glue-point="4" svg:d="m11737 11837-2146 1801">
            <text:p/>
          </draw:connector>
          <draw:connector draw:style-name="gr5" draw:text-style-name="P4" draw:layer="layout" draw:type="line" svg:x1="3.833cm" svg:y1="11.837cm" svg:x2="5.969cm" svg:y2="13.65cm" draw:start-shape="id2" draw:start-glue-point="2" draw:end-shape="id3" draw:end-glue-point="5" svg:d="m3833 11837 2136 1813">
            <text:p/>
          </draw:connector>
        </draw:g>
        <draw:frame draw:style-name="gr3" draw:text-style-name="P7" xml:id="id11" draw:id="id11" draw:layer="layout" svg:width="8cm" svg:height="4.09cm" svg:x="15.278cm" svg:y="10.625cm">
          <draw:text-box>
            <text:p text:style-name="P6"><text:span text:style-name="T8">void</text:span><text:span text:style-name="T9"> </text:span><text:span text:style-name="T10">double_lock() {</text:span></text:p>
            <text:p text:style-name="P6"><text:span text:style-name="T9"><text:s text:c="2"/></text:span><text:span text:style-name="T10">lock();</text:span><text:span text:style-name="T11"> </text:span><text:span text:style-name="T12">// U → L</text:span></text:p>
            <text:p text:style-name="P6"><text:span text:style-name="T18"><text:s text:c="2"/></text:span><text:span text:style-name="T19">stuff();</text:span></text:p>
            <text:p text:style-name="P6"><text:span text:style-name="T18"><text:s text:c="2"/></text:span><text:span text:style-name="T19">more_stuff();</text:span></text:p>
            <text:p text:style-name="P6"><text:span text:style-name="T9"><text:s text:c="2"/></text:span><text:span text:style-name="T10">lock(); </text:span><text:span text:style-name="T12">// L → ERROR</text:span></text:p>
            <text:p text:style-name="P6"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Zamykací chyby ve Stanse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Počáteční funkce</text:p>
                <text:list>
                  <text:list-item>
                    <text:p>Ty, které nejsou volány uvnitř modulu</text:p>
                  </text:list-item>
                </text:list>
                <text:p/>
              </text:list-item>
            </text:list>
          </draw:text-box>
        </draw:frame>
        <draw:frame draw:style-name="gr9" draw:text-style-name="P12" draw:layer="layout" svg:width="10.664cm" svg:height="8.558cm" svg:x="7.373cm" svg:y="7.754cm">
          <draw:text-box>
            <text:p text:style-name="P12"><text:span text:style-name="T20">void</text:span><text:span text:style-name="T21"> </text:span><text:span text:style-name="T22">lock_me() {</text:span></text:p>
            <text:p text:style-name="P12"><text:span text:style-name="T22"><text:s text:c="2"/></text:span><text:span text:style-name="T22">lock(&amp;me);</text:span></text:p>
            <text:p text:style-name="P13"><text:span text:style-name="T21">}</text:span></text:p>
            <text:p text:style-name="P13"><text:span text:style-name="T21"/></text:p>
            <text:p text:style-name="P12"><text:span text:style-name="T20">void</text:span><text:span text:style-name="T21"> </text:span><text:span text:style-name="T22">unlock_me() {</text:span></text:p>
            <text:p text:style-name="P12"><text:span text:style-name="T22"><text:s text:c="2"/></text:span><text:span text:style-name="T22">unlock(&amp;me);</text:span></text:p>
            <text:p text:style-name="P13"><text:span text:style-name="T21">}</text:span></text:p>
            <text:p text:style-name="P13"><text:span text:style-name="T21"/></text:p>
            <text:p text:style-name="P12"><text:span text:style-name="T20">void</text:span><text:span text:style-name="T21"> </text:span><text:span text:style-name="T22">fun(</text:span><text:span text:style-name="T20">void</text:span><text:span text:style-name="T22">) { </text:span><text:span text:style-name="T23">// ← starting</text:span></text:p>
            <text:p text:style-name="P12"><text:span text:style-name="T22"><text:s text:c="2"/></text:span><text:span text:style-name="T22">lock_me();</text:span></text:p>
            <text:p text:style-name="P12"><text:span text:style-name="T22"><text:s text:c="2"/></text:span><text:span text:style-name="T22">stuff();</text:span></text:p>
            <text:p text:style-name="P12"><text:span text:style-name="T22"><text:s text:c="2"/></text:span><text:span text:style-name="T22">unlock_me();</text:span></text:p>
            <text:p text:style-name="P13"><text:span text:style-name="T21">}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Příklad</text:p>
          </draw:text-box>
        </draw:frame>
        <draw:frame draw:style-name="gr10" draw:text-style-name="P14" draw:layer="layout" svg:width="17.268cm" svg:height="6.383cm" svg:x="4.129cm" svg:y="5.376cm">
          <draw:text-box>
            <text:p text:style-name="P6"><text:span text:style-name="T24">void</text:span><text:span text:style-name="T25"> </text:span><text:span text:style-name="T26">fun(</text:span><text:span text:style-name="T24">int</text:span><text:span text:style-name="T25"> </text:span><text:span text:style-name="T26">x) {</text:span><text:span text:style-name="T25"> </text:span><text:span text:style-name="T27">// AUTOMATON STATE</text:span></text:p>
            <text:p text:style-name="P6"><text:span text:style-name="T25"><text:s text:c="2"/></text:span><text:span text:style-name="T28">if</text:span><text:span text:style-name="T25"> </text:span><text:span text:style-name="T26">(x)</text:span><text:span text:style-name="T25"> <text:s text:c="9"/></text:span><text:span text:style-name="T27">// U</text:span></text:p>
            <text:p text:style-name="P6"><text:span text:style-name="T25"><text:s text:c="4"/></text:span><text:span text:style-name="T26">lock();</text:span><text:span text:style-name="T25"> <text:s text:c="6"/></text:span><text:span text:style-name="T27">// L</text:span></text:p>
            <text:p text:style-name="P6"><text:span text:style-name="T25"><text:s text:c="2"/></text:span><text:span text:style-name="T26">stuff();</text:span><text:span text:style-name="T25"> <text:s text:c="7"/></text:span><text:span text:style-name="T27">// U or L</text:span></text:p>
            <text:p text:style-name="P6"><text:span text:style-name="T25"><text:s text:c="2"/></text:span><text:span text:style-name="T28">if</text:span><text:span text:style-name="T25"> </text:span><text:span text:style-name="T26">(x)</text:span><text:span text:style-name="T25"> <text:s text:c="9"/></text:span><text:span text:style-name="T27">// U or L</text:span></text:p>
            <text:p text:style-name="P6"><text:span text:style-name="T25"><text:s text:c="4"/></text:span><text:span text:style-name="T26">unlock();</text:span><text:span text:style-name="T25"> <text:s text:c="4"/></text:span><text:span text:style-name="T27">// ERROR or U</text:span></text:p>
            <text:p text:style-name="P6"><text:span text:style-name="T26">}</text:span></text:p>
          </draw:text-box>
        </draw:frame>
        <draw:frame presentation:style-name="pr7" draw:text-style-name="P15" draw:layer="layout" svg:width="20.93cm" svg:height="2.743cm" svg:x="2.235cm" svg:y="13.701cm" presentation:class="title" presentation:user-transformed="true">
          <draw:text-box>
            <text:p xml:id="id13" text:id="id13" text:style-name="P4"><text:span text:style-name="T29">61 % zamykacích hlášení je falešných</text:span><text:span text:style-name="T29"><text:line-break/></text:span><text:span text:style-name="T30">(bez použití eliminačních technik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eak" presentation:presentation-page-layout-name="AL3T19">
        <office:forms form:automatic-focus="false" form:apply-design-mode="false"/>
        <draw:frame presentation:style-name="pr10" draw:layer="layout" svg:width="20.884cm" svg:height="3.18cm" svg:x="2.286cm" svg:y="7.62cm" presentation:class="title" presentation:user-transformed="true">
          <draw:text-box>
            <text:p>Eliminace falešných hlášení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Nová technika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Automaty</text:p>
                <text:list>
                  <text:list-item>
                    <text:p>Stejně jako v klasickém přístupu</text:p>
                  </text:list-item>
                </text:list>
              </text:list-item>
              <text:list-item>
                <text:p>Nad bytekódem LLVM</text:p>
              </text:list-item>
              <text:list-item>
                <text:p>Slicing</text:p>
              </text:list-item>
              <text:list-item>
                <text:p>Symbolická exekuc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Automaty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Instrumentace</text:p>
              </text:list-item>
              <text:list-item>
                <text:p>Syntaktické</text:p>
                <text:list>
                  <text:list-item>
                    <text:p>Přechody svázány s kódem</text:p>
                  </text:list-item>
                  <text:list-item>
                    <text:p>Stejně jako Coverity a Stanse</text:p>
                  </text:list-item>
                </text:list>
              </text:list-item>
              <text:list-item>
                <text:p>Sémantické</text:p>
                <text:list>
                  <text:list-item>
                    <text:p>Jako při reálném vykonávání</text:p>
                  </text:list-item>
                </text:list>
              </text:list-item>
            </text:list>
          </draw:text-box>
        </draw:frame>
        <draw:frame draw:style-name="gr11" draw:text-style-name="P12" draw:layer="layout" svg:width="8.631cm" svg:height="7.919cm" svg:x="15.244cm" svg:y="5.566cm">
          <draw:text-box>
            <text:p text:style-name="P12"><text:span text:style-name="T20">void</text:span><text:span text:style-name="T21"> </text:span><text:span text:style-name="T22">fun(List node) {</text:span></text:p>
            <text:p text:style-name="P12"><text:span text:style-name="T22"><text:s text:c="2"/></text:span><text:span text:style-name="T22">List node1</text:span><text:span text:style-name="T21"> </text:span><text:span text:style-name="T22">=</text:span><text:span text:style-name="T21"> </text:span><text:span text:style-name="T22">node;</text:span></text:p>
            <text:p text:style-name="P12"><text:span text:style-name="T31"><text:s text:c="2"/></text:span><text:span text:style-name="T31">while</text:span><text:span text:style-name="T21"> </text:span><text:span text:style-name="T22">(node1) {</text:span></text:p>
            <text:p text:style-name="P12"><text:span text:style-name="T21"><text:s text:c="4"/></text:span><text:span text:style-name="T22">lock(node1-&gt;lock);</text:span></text:p>
            <text:p text:style-name="P12"><text:span text:style-name="T22"><text:s text:c="4"/></text:span><text:span text:style-name="T22">node1</text:span><text:span text:style-name="T21"> </text:span><text:span text:style-name="T22">=</text:span><text:span text:style-name="T21"> </text:span><text:span text:style-name="T22">node1-&gt;next;</text:span></text:p>
            <text:p text:style-name="P13"><text:span text:style-name="T21"><text:s text:c="2"/></text:span><text:span text:style-name="T21">}</text:span></text:p>
            <text:p text:style-name="P13"><text:span text:style-name="T21"><text:s text:c="2"/></text:span><text:span text:style-name="T21">stuff();</text:span></text:p>
            <text:p text:style-name="P12"><text:span text:style-name="T31"><text:s text:c="2"/></text:span><text:span text:style-name="T31">while</text:span><text:span text:style-name="T21"> </text:span><text:span text:style-name="T22">(node) {</text:span></text:p>
            <text:p text:style-name="P12"><text:span text:style-name="T21"><text:s text:c="4"/></text:span><text:span text:style-name="T22">unlock(node-&gt;lock);</text:span></text:p>
            <text:p text:style-name="P12"><text:span text:style-name="T22"><text:s text:c="4"/></text:span><text:span text:style-name="T22">node</text:span><text:span text:style-name="T21"> </text:span><text:span text:style-name="T22">=</text:span><text:span text:style-name="T21"> </text:span><text:span text:style-name="T22">node-&gt;next;</text:span></text:p>
            <text:p text:style-name="P13"><text:span text:style-name="T21"><text:s text:c="2"/></text:span><text:span text:style-name="T21">}</text:span></text:p>
            <text:p text:style-name="P13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LLVM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Bytekód</text:p>
                <text:list>
                  <text:list-item>
                    <text:p>Redukovaná instrukční sada</text:p>
                  </text:list-item>
                </text:list>
              </text:list-item>
              <text:list-item>
                <text:p>Vyvíjený a udržovaný</text:p>
                <text:list>
                  <text:list-item>
                    <text:p>Apple</text:p>
                  </text:list-item>
                </text:list>
              </text:list-item>
              <text:list-item>
                <text:p>Zdarma parser</text:p>
                <text:list>
                  <text:list-item>
                    <text:p>C, C++ a dalších</text:p>
                  </text:list-item>
                </text:list>
              </text:list-item>
              <text:list-item>
                <text:p>Dobré rozhraní</text:p>
                <text:list>
                  <text:list-item>
                    <text:p>Poskytuje dostatek informací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Slicing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Technika ze 70. let (Weiser)</text:p>
              </text:list-item>
              <text:list-item>
                <text:p>Odstranit z kódu nepodstatné</text:p>
                <text:list>
                  <text:list-item>
                    <text:p>Nezměnit význam podstatného</text:p>
                  </text:list-item>
                </text:list>
              </text:list-item>
              <text:list-item>
                <text:p>Interprocedurální rozšíření</text:p>
              </text:list-item>
            </text:list>
          </draw:text-box>
        </draw:frame>
        <draw:frame draw:style-name="gr12" draw:text-style-name="P7" draw:layer="layout" svg:width="8.63cm" svg:height="6.641cm" svg:x="8.388cm" svg:y="10.071cm">
          <draw:text-box>
            <text:p text:style-name="P6"><text:span text:style-name="T8">void</text:span><text:span text:style-name="T9"> </text:span><text:span text:style-name="T10">fun(</text:span><text:span text:style-name="T8">int</text:span><text:span text:style-name="T9"> </text:span><text:span text:style-name="T10">x) {</text:span></text:p>
            <text:p text:style-name="P6"><text:span text:style-name="T9"><text:s text:c="2"/></text:span><text:span text:style-name="T32">if</text:span><text:span text:style-name="T9"> </text:span><text:span text:style-name="T10">(x) {</text:span></text:p>
            <text:p text:style-name="P6"><text:span text:style-name="T10"><text:s text:c="4"/></text:span><text:span text:style-name="T10">print(“locking...“);</text:span></text:p>
            <text:p text:style-name="P6"><text:span text:style-name="T9"><text:s text:c="4"/></text:span><text:span text:style-name="T10">lock();</text:span></text:p>
            <text:p text:style-name="P6"><text:span text:style-name="T10"><text:s text:c="4"/></text:span><text:span text:style-name="T10">locked</text:span><text:span text:style-name="T9"> </text:span><text:span text:style-name="T10">=</text:span><text:span text:style-name="T9"> </text:span><text:span text:style-name="T33">1</text:span><text:span text:style-name="T10">;</text:span></text:p>
            <text:p text:style-name="P6"><text:span text:style-name="T9"><text:s text:c="2"/></text:span><text:span text:style-name="T10">}</text:span></text:p>
            <text:p text:style-name="P6"><text:span text:style-name="T9"><text:s text:c="2"/></text:span><text:span text:style-name="T10">stuff();</text:span></text:p>
            <text:p text:style-name="P6"><text:span text:style-name="T9"><text:s text:c="2"/></text:span><text:span text:style-name="T32">if</text:span><text:span text:style-name="T9"> </text:span><text:span text:style-name="T10">(locked)</text:span></text:p>
            <text:p text:style-name="P6"><text:span text:style-name="T9"><text:s text:c="4"/></text:span><text:span text:style-name="T10">unlock();</text:span></text:p>
            <text:p text:style-name="P6"><text:span text:style-name="T10">}</text:span></text:p>
          </draw:text-box>
        </draw:frame>
        <draw:frame draw:style-name="gr12" draw:text-style-name="P7" xml:id="id14" draw:id="id14" draw:layer="layout" svg:width="8.63cm" svg:height="6.641cm" svg:x="8.388cm" svg:y="10.072cm">
          <draw:text-box>
            <text:p text:style-name="P6"><text:span text:style-name="T8">void</text:span><text:span text:style-name="T9"> </text:span><text:span text:style-name="T10">fun(</text:span><text:span text:style-name="T8">int</text:span><text:span text:style-name="T9"> </text:span><text:span text:style-name="T10">x) {</text:span></text:p>
            <text:p text:style-name="P6"><text:span text:style-name="T9"><text:s text:c="2"/></text:span><text:span text:style-name="T32">if</text:span><text:span text:style-name="T9"> </text:span><text:span text:style-name="T10">(x) {</text:span></text:p>
            <text:p text:style-name="P6"><text:span text:style-name="T10"><text:s text:c="4"/></text:span><text:span text:style-name="T34">print(“locking...“);</text:span></text:p>
            <text:p text:style-name="P6"><text:span text:style-name="T9"><text:s text:c="4"/></text:span><text:span text:style-name="T10">lock();</text:span></text:p>
            <text:p text:style-name="P6"><text:span text:style-name="T10"><text:s text:c="4"/></text:span><text:span text:style-name="T10">locked</text:span><text:span text:style-name="T9"> </text:span><text:span text:style-name="T10">=</text:span><text:span text:style-name="T9"> </text:span><text:span text:style-name="T33">1</text:span><text:span text:style-name="T10">;</text:span></text:p>
            <text:p text:style-name="P6"><text:span text:style-name="T9"><text:s text:c="2"/></text:span><text:span text:style-name="T10">}</text:span></text:p>
            <text:p text:style-name="P6"><text:span text:style-name="T9"><text:s text:c="2"/></text:span><text:span text:style-name="T34">stuff();</text:span></text:p>
            <text:p text:style-name="P6"><text:span text:style-name="T9"><text:s text:c="2"/></text:span><text:span text:style-name="T32">if</text:span><text:span text:style-name="T9"> </text:span><text:span text:style-name="T10">(locked)</text:span></text:p>
            <text:p text:style-name="P6"><text:span text:style-name="T9"><text:s text:c="4"/></text:span><text:span text:style-name="T10">unlock();</text:span></text:p>
            <text:p text:style-name="P6"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ogo_20_Content" presentation:presentation-page-layout-name="AL2T1">
        <office:forms form:automatic-focus="false" form:apply-design-mode="false"/>
        <draw:frame presentation:style-name="pr12" draw:layer="layout" svg:width="20.93cm" svg:height="2.743cm" svg:x="2.286cm" svg:y="0.711cm" presentation:class="title" presentation:user-transformed="true">
          <draw:text-box>
            <text:p>Účinek slicování<text:line-break/><text:span text:style-name="T35">N</text:span><text:span text:style-name="T36">a funkcích se zámky jádra 2.6.28</text:span></text:p>
          </draw:text-box>
        </draw:frame>
        <draw:frame presentation:style-name="pr13" draw:layer="layout" svg:width="20.93cm" svg:height="12.573cm" svg:x="2.36cm" svg:y="4.088cm" presentation:class="outline" presentation:user-transformed="true">
          <draw:text-box>
            <text:list text:style-name="L3">
              <text:list-item>
                <text:p>Doba zpracování: 2 h 2 min</text:p>
              </text:list-item>
            </text:list>
          </draw:text-box>
        </draw:frame>
        <draw:frame draw:style-name="standard" draw:layer="layout" svg:width="17.649cm" svg:height="7.799cm" svg:x="3.877cm" svg:y="6.9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rows-spanned="2">
                <text:p><text:span text:style-name="T37">Počet funkcí</text:span></text:p>
              </table:table-cell>
              <table:table-cell table:number-columns-spanned="2">
                <text:p text:style-name="P4"><text:span text:style-name="T37">Před slicováním</text:span></text:p>
              </table:table-cell>
              <table:covered-table-cell table:style-name="ce3"/>
              <table:table-cell table:number-columns-spanned="2">
                <text:p text:style-name="P4"><text:span text:style-name="T37">Po slicování</text:span></text:p>
              </table:table-cell>
              <table:covered-table-cell table:style-name="ce3"/>
            </table:table-row>
            <table:table-row table:style-name="ro1" table:default-cell-style-name="ce3">
              <table:covered-table-cell table:style-name="ce4"/>
              <table:table-cell>
                <text:p text:style-name="P4">počet</text:p>
              </table:table-cell>
              <table:table-cell>
                <text:p text:style-name="P4">%</text:p>
              </table:table-cell>
              <table:table-cell>
                <text:p text:style-name="P4">počet</text:p>
              </table:table-cell>
              <table:table-cell>
                <text:p text:style-name="P4">%</text:p>
              </table:table-cell>
            </table:table-row>
            <table:table-row table:style-name="ro1" table:default-cell-style-name="ce6">
              <table:table-cell table:style-name="ce5">
                <text:p><text:span text:style-name="T38">S assemblerem</text:span></text:p>
              </table:table-cell>
              <table:table-cell>
                <text:p text:style-name="P16">477</text:p>
              </table:table-cell>
              <table:table-cell>
                <text:p text:style-name="P16">2,8</text:p>
              </table:table-cell>
              <table:table-cell>
                <text:p text:style-name="P16"><text:span text:style-name="T38">0</text:span><text:span text:style-name="T39">†</text:span></text:p>
              </table:table-cell>
              <table:table-cell>
                <text:p text:style-name="P16">0,0</text:p>
              </table:table-cell>
            </table:table-row>
            <table:table-row table:style-name="ro1" table:default-cell-style-name="ce6">
              <table:table-cell table:style-name="ce5">
                <text:p><text:span text:style-name="T38">S externím voláním</text:span></text:p>
              </table:table-cell>
              <table:table-cell>
                <text:p text:style-name="P16">13760</text:p>
              </table:table-cell>
              <table:table-cell>
                <text:p text:style-name="P16">80,6</text:p>
              </table:table-cell>
              <table:table-cell>
                <text:p text:style-name="P16">6174</text:p>
              </table:table-cell>
              <table:table-cell>
                <text:p text:style-name="P16">36,2</text:p>
              </table:table-cell>
            </table:table-row>
            <table:table-row table:style-name="ro1" table:default-cell-style-name="ce6">
              <table:table-cell table:style-name="ce5">
                <text:p><text:span text:style-name="T38">S cyklem</text:span></text:p>
              </table:table-cell>
              <table:table-cell>
                <text:p text:style-name="P16">11243</text:p>
              </table:table-cell>
              <table:table-cell>
                <text:p text:style-name="P16">65,9</text:p>
              </table:table-cell>
              <table:table-cell>
                <text:p text:style-name="P16">6207</text:p>
              </table:table-cell>
              <table:table-cell>
                <text:p text:style-name="P16">36,4</text:p>
              </table:table-cell>
            </table:table-row>
            <table:table-row table:style-name="ro1" table:default-cell-style-name="ce6">
              <table:table-cell table:style-name="ce5">
                <text:p><text:span text:style-name="T38">Bez ASM a volání</text:span></text:p>
              </table:table-cell>
              <table:table-cell>
                <text:p text:style-name="P16">3269</text:p>
              </table:table-cell>
              <table:table-cell table:style-name="ce7">
                <text:p text:style-name="P17"><text:span text:style-name="T40">19,2</text:span></text:p>
              </table:table-cell>
              <table:table-cell>
                <text:p text:style-name="P16">10882</text:p>
              </table:table-cell>
              <table:table-cell table:style-name="ce7">
                <text:p text:style-name="P17">63,8</text:p>
              </table:table-cell>
            </table:table-row>
            <table:table-row table:style-name="ro1" table:default-cell-style-name="ce6">
              <table:table-cell table:style-name="ce5">
                <text:p><text:span text:style-name="T38">Bez ASM, volání a cyklů</text:span></text:p>
              </table:table-cell>
              <table:table-cell>
                <text:p text:style-name="P16">1855</text:p>
              </table:table-cell>
              <table:table-cell table:style-name="ce7">
                <text:p text:style-name="P17"><text:span text:style-name="T40">10,9</text:span></text:p>
              </table:table-cell>
              <table:table-cell>
                <text:p text:style-name="P16">8655</text:p>
              </table:table-cell>
              <table:table-cell table:style-name="ce7">
                <text:p text:style-name="P17">50,7</text:p>
              </table:table-cell>
            </table:table-row>
            <table:table-row table:style-name="ro1" table:default-cell-style-name="ce5">
              <table:table-cell>
                <text:p>Celkem</text:p>
              </table:table-cell>
              <table:table-cell table:style-name="ce6" table:number-columns-spanned="4">
                <text:p text:style-name="P4">17069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8" draw:text-style-name="P18" draw:layer="layout" svg:width="3.343cm" svg:height="0.806cm" svg:x="1.055cm" svg:y="16.884cm">
          <draw:text-box>
            <text:p text:style-name="P18"><text:span text:style-name="T41">† </text:span><text:span text:style-name="T41">ignoruje 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Symbolická exekuce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Program se zpracovává symbolicky</text:p>
                <text:list>
                  <text:list-item>
                    <text:p>Symbolická paměť (mapa proměnná-výraz)</text:p>
                  </text:list-item>
                  <text:list-item>
                    <text:p>A vztahy mezi symboly pro jeden běh (path condition)</text:p>
                  </text:list-item>
                  <text:list-item>
                    <text:p>Použití SMT solveru</text:p>
                  </text:list-item>
                  <text:list-item>
                    <text:p>King (70. léta)</text:p>
                  </text:list-item>
                </text:list>
              </text:list-item>
            </text:list>
          </draw:text-box>
        </draw:frame>
        <draw:frame draw:style-name="gr13" draw:text-style-name="P19" xml:id="id15" draw:id="id15" draw:layer="layout" svg:width="18.199cm" svg:height="6.383cm" svg:x="3.648cm" svg:y="10.762cm">
          <draw:text-box>
            <text:p text:style-name="P19"><text:span text:style-name="T42">void</text:span><text:span text:style-name="T43"> </text:span><text:span text:style-name="T44">fun(</text:span><text:span text:style-name="T42">int</text:span><text:span text:style-name="T43"> </text:span><text:span text:style-name="T44">x) {</text:span><text:span text:style-name="T43"> </text:span><text:span text:style-name="T45">// 1st run | 2nd run</text:span></text:p>
            <text:p text:style-name="P19"><text:span text:style-name="T43"><text:s text:c="2"/></text:span><text:span text:style-name="T46">if</text:span><text:span text:style-name="T43"> </text:span><text:span text:style-name="T44">(x)</text:span><text:span text:style-name="T43"> <text:s text:c="9"/></text:span><text:span text:style-name="T45">// !x &amp;&amp; U | x &amp;&amp; U</text:span></text:p>
            <text:p text:style-name="P19"><text:span text:style-name="T43"><text:s text:c="4"/></text:span><text:span text:style-name="T44">lock();</text:span><text:span text:style-name="T43"> <text:s text:c="6"/></text:span><text:span text:style-name="T45">// <text:s text:c="8"/>| </text:span><text:span text:style-name="T45">x &amp;&amp; L</text:span></text:p>
            <text:p text:style-name="P19"><text:span text:style-name="T43"><text:s text:c="2"/></text:span><text:span text:style-name="T44">stuff();</text:span><text:span text:style-name="T43"> <text:s text:c="7"/></text:span><text:span text:style-name="T45">// !x &amp;&amp; U | x &amp;&amp; L</text:span></text:p>
            <text:p text:style-name="P19"><text:span text:style-name="T43"><text:s text:c="2"/></text:span><text:span text:style-name="T46">if</text:span><text:span text:style-name="T43"> </text:span><text:span text:style-name="T44">(x)</text:span><text:span text:style-name="T43"> <text:s text:c="9"/></text:span><text:span text:style-name="T45">// !x &amp;&amp; U | x &amp;&amp; L</text:span></text:p>
            <text:p text:style-name="P19"><text:span text:style-name="T43"><text:s text:c="4"/></text:span><text:span text:style-name="T44">unlock();</text:span><text:span text:style-name="T43"> <text:s text:c="4"/></text:span><text:span text:style-name="T45">// <text:s text:c="8"/>| x &amp;&amp; U</text:span></text:p>
            <text:p text:style-name="P19"><text:span text:style-name="T44">}</text:span><text:span text:style-name="T43"> <text:s text:c="16"/></text:span><text:span text:style-name="T45">// !x &amp;&amp; U | x &amp;&amp; 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Klee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Symbolický exekutor</text:p>
              </text:list-item>
              <text:list-item>
                <text:p>Existující a udržovaný kód</text:p>
              </text:list-item>
              <text:list-item>
                <text:p>Funguje nad LLVM</text:p>
              </text:list-item>
              <text:list-item>
                <text:p>Open Source</text:p>
              </text:list-item>
              <text:list-item>
                <text:p xml:id="id16" text:id="id16">Špatné heuristiky</text:p>
                <text:list>
                  <text:list-item>
                    <text:p xml:id="id17" text:id="id17">Cykly jsou smrtící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Úskalí symbolické exekuce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Assembler</text:p>
                <text:list>
                  <text:list-item>
                    <text:p>Optimalizace</text:p>
                  </text:list-item>
                  <text:list-item>
                    <text:p>Většinu lze nahradit C/LLVM kódem</text:p>
                  </text:list-item>
                </text:list>
              </text:list-item>
              <text:list-item>
                <text:p>Externí volání</text:p>
                <text:list>
                  <text:list-item>
                    <text:p>Celý projekt i se závislostmi</text:p>
                  </text:list-item>
                </text:list>
              </text:list-item>
              <text:list-item>
                <text:p>Cykly</text:p>
                <text:list>
                  <text:list-item>
                    <text:p>Heuristik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Použití techniky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Ověřování výstupu statické analýzy</text:p>
                <text:list>
                  <text:list-item>
                    <text:p>Odhalí falešná hlášení</text:p>
                  </text:list-item>
                  <text:list-item>
                    <text:p>Nemusí procházet celý projekt</text:p>
                  </text:list-item>
                </text:list>
              </text:list-item>
              <text:list-item>
                <text:p xml:id="id18" text:id="id18">Samostatný nástroj na hledání chyb</text:p>
                <text:list>
                  <text:list-item>
                    <text:p xml:id="id19" text:id="id19">Přesnější</text:p>
                  </text:list-item>
                  <text:list-item>
                    <text:p xml:id="id20" text:id="id20">Nemusí najít chyb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Experimentální nasazení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Linuxové jádro</text:p>
                <text:list>
                  <text:list-item>
                    <text:p>Rozsáhlý kód</text:p>
                  </text:list-item>
                  <text:list-item>
                    <text:p>Assembler</text:p>
                  </text:list-item>
                  <text:list-item>
                    <text:p>Neexistuje externí volání</text:p>
                    <text:list>
                      <text:list-item>
                        <text:p>Máme všechen kód, ale ne v C</text:p>
                      </text:list-item>
                    </text:list>
                  </text:list-item>
                </text:list>
              </text:list-item>
              <text:list-item>
                <text:p xml:id="id21" text:id="id21">Verze 2.6.28</text:p>
                <text:list>
                  <text:list-item>
                    <text:p xml:id="id22" text:id="id22">Označené chyby a falešná hlášení</text:p>
                  </text:list-item>
                  <text:list-item>
                    <text:p xml:id="id23" text:id="id23">Lze porovnat s jinými nástroji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Čas běhu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Podmínky</text:p>
                <text:list>
                  <text:list-item>
                    <text:p>CPU: Core 2 Duo 3 GHz</text:p>
                  </text:list-item>
                  <text:list-item>
                    <text:p>Paměť: 6 GiB</text:p>
                  </text:list-item>
                </text:list>
              </text:list-item>
              <text:list-item>
                <text:p xml:id="id24" text:id="id24">Stanse: 1 h 54 min</text:p>
              </text:list-item>
              <text:list-item>
                <text:p xml:id="id25" text:id="id25">Nová technika</text:p>
                <text:list>
                  <text:list-item>
                    <text:p xml:id="id26" text:id="id26">Instrumentace a překlad do LLVM: 3 h 21 min</text:p>
                  </text:list-item>
                  <text:list-item>
                    <text:p xml:id="id27" text:id="id27">Slicing: 2 h 2 min</text:p>
                  </text:list-item>
                  <text:list-item>
                    <text:p xml:id="id28" text:id="id28">Klee: 9 dní (odhad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Čas běhu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Timeout nastaven na 20 s</text:p>
                <text:list>
                  <text:list-item>
                    <text:p xml:id="id29" text:id="id29">Dopočítá 21 % funkcí</text:p>
                  </text:list-item>
                  <text:list-item>
                    <text:p>Bez slicování: &lt; 1 %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Spotřeba paměti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Stanse: 1 GiB</text:p>
              </text:list-item>
              <text:list-item>
                <text:p xml:id="id30" text:id="id30">Nová technika</text:p>
                <text:list>
                  <text:list-item>
                    <text:p xml:id="id31" text:id="id31">Instrumentace a překlad do LLVM: 300 MiB</text:p>
                  </text:list-item>
                  <text:list-item>
                    <text:p xml:id="id32" text:id="id32">Slicing: 200 MiB</text:p>
                  </text:list-item>
                  <text:list-item>
                    <text:p xml:id="id33" text:id="id33">Klee: 1,2 GiB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Výsledky<text:line-break/><text:span text:style-name="T43">Zamykací chyby</text:span></text:p>
          </draw:text-box>
        </draw:frame>
        <draw:frame draw:style-name="standard" draw:layer="layout" svg:width="16.177cm" svg:height="2.915cm" svg:x="4.612cm" svg:y="10.268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row table:style-name="ro1" table:default-cell-style-name="ce8">
              <table:table-cell>
                <text:p text:style-name="P20"><text:span text:style-name="T2">Nástroj</text:span></text:p>
              </table:table-cell>
              <table:table-cell>
                <text:p text:style-name="P20">Falešná hlášení</text:p>
              </table:table-cell>
              <table:table-cell>
                <text:p text:style-name="P20">Reálné chyby</text:p>
              </table:table-cell>
            </table:table-row>
            <table:table-row table:style-name="ro1" table:default-cell-style-name="ce6">
              <table:table-cell table:style-name="ce5">
                <text:p>Stanse</text:p>
              </table:table-cell>
              <table:table-cell>
                <text:p text:style-name="P16">105</text:p>
              </table:table-cell>
              <table:table-cell>
                <text:p text:style-name="P16">49</text:p>
              </table:table-cell>
            </table:table-row>
            <table:table-row table:style-name="ro1" table:default-cell-style-name="ce6">
              <table:table-cell table:style-name="ce5">
                <text:p>Slicing a exekuce</text:p>
              </table:table-cell>
              <table:table-cell>
                <text:p text:style-name="P16">11</text:p>
              </table:table-cell>
              <table:table-cell>
                <text:p text:style-name="P16">6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8" draw:layer="layout" svg:width="20.93cm" svg:height="12.573cm" svg:x="2.286cm" svg:y="4.04cm" presentation:class="outline" presentation:user-transformed="true">
          <draw:text-box>
            <text:list text:style-name="L2">
              <text:list-item>
                <text:p>Prvotní implementace</text:p>
                <text:list>
                  <text:list-item>
                    <text:p>Čísla nejsou příliš směrodatná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Příklady<text:line-break/><text:span text:style-name="T43">Ověřená chyba</text:span></text:p>
          </draw:text-box>
        </draw:frame>
        <draw:frame draw:style-name="gr14" draw:text-style-name="P12" draw:layer="layout" svg:width="23.194cm" svg:height="13.031cm" svg:x="1.084cm" svg:y="3.928cm">
          <draw:text-box>
            <text:p text:style-name="P12"><text:span text:style-name="T20">static</text:span><text:span text:style-name="T21"> </text:span><text:span text:style-name="T22">ssize_t</text:span><text:span text:style-name="T21"> </text:span><text:span text:style-name="T22">set_div(</text:span><text:span text:style-name="T20">struct</text:span><text:span text:style-name="T21"> </text:span><text:span text:style-name="T22">device</text:span><text:span text:style-name="T21"> </text:span><text:span text:style-name="T22">*dev, ...</text:span></text:p>
            <text:p text:style-name="P12"><text:span text:style-name="T22"><text:s text:c="8"/></text:span><text:span text:style-name="T20">const char</text:span><text:span text:style-name="T21"> </text:span><text:span text:style-name="T22">*buf,</text:span><text:span text:style-name="T21"> </text:span><text:span text:style-name="T20">size_t</text:span><text:span text:style-name="T21"> </text:span><text:span text:style-name="T22">count)</text:span></text:p>
            <text:p text:style-name="P13"><text:span text:style-name="T21">{</text:span></text:p>
            <text:p text:style-name="P12"><text:span text:style-name="T21"><text:s text:c="2"/></text:span><text:span text:style-name="T20">struct</text:span><text:span text:style-name="T21"> </text:span><text:span text:style-name="T22">i2c_client</text:span><text:span text:style-name="T21"> </text:span><text:span text:style-name="T22">*client</text:span><text:span text:style-name="T21"> </text:span><text:span text:style-name="T22">=</text:span><text:span text:style-name="T21"> </text:span><text:span text:style-name="T22">to_i2c_client(dev);</text:span></text:p>
            <text:p text:style-name="P12"><text:span text:style-name="T21"><text:s text:c="2"/></text:span><text:span text:style-name="T20">struct</text:span><text:span text:style-name="T21"> </text:span><text:span text:style-name="T22">max6650_data</text:span><text:span text:style-name="T21"> </text:span><text:span text:style-name="T22">*data</text:span><text:span text:style-name="T21"> </text:span><text:span text:style-name="T22">=</text:span><text:span text:style-name="T21"> </text:span><text:span text:style-name="T22">i2c_get_clientdata(client);</text:span></text:p>
            <text:p text:style-name="P12"><text:span text:style-name="T21"><text:s text:c="2"/></text:span><text:span text:style-name="T20">int</text:span><text:span text:style-name="T21"> </text:span><text:span text:style-name="T22">div</text:span><text:span text:style-name="T21"> </text:span><text:span text:style-name="T22">=</text:span><text:span text:style-name="T21"> </text:span><text:span text:style-name="T22">simple_strtoul(buf,</text:span><text:span text:style-name="T21"> </text:span><text:span text:style-name="T22">NULL,</text:span><text:span text:style-name="T21"> </text:span><text:span text:style-name="T47">10</text:span><text:span text:style-name="T22">);</text:span></text:p>
            <text:p text:style-name="P12"><text:span text:style-name="T21"/></text:p>
            <text:p text:style-name="P12"><text:span text:style-name="T21"><text:s text:c="2"/></text:span><text:span text:style-name="T22">mutex_lock(&amp;data-&gt;update_lock);</text:span></text:p>
            <text:p text:style-name="P12"><text:span text:style-name="T21"><text:s text:c="2"/></text:span><text:span text:style-name="T31">switch</text:span><text:span text:style-name="T21"> </text:span><text:span text:style-name="T22">(div) {</text:span></text:p>
            <text:p text:style-name="P12"><text:span text:style-name="T21"><text:s text:c="2"/></text:span><text:span text:style-name="T31">case</text:span><text:span text:style-name="T21"> </text:span><text:span text:style-name="T47">1</text:span><text:span text:style-name="T22">: data-&gt;count</text:span><text:span text:style-name="T21"> </text:span><text:span text:style-name="T22">=</text:span><text:span text:style-name="T21"> </text:span><text:span text:style-name="T47">0</text:span><text:span text:style-name="T22">; </text:span><text:span text:style-name="T31">break</text:span><text:span text:style-name="T22">;</text:span></text:p>
            <text:p text:style-name="P12"><text:span text:style-name="T21"><text:s text:c="2"/></text:span><text:span text:style-name="T22">...</text:span></text:p>
            <text:p text:style-name="P12"><text:span text:style-name="T21"><text:s text:c="2"/></text:span><text:span text:style-name="T31">default</text:span><text:span text:style-name="T22">:</text:span></text:p>
            <text:p text:style-name="P12"><text:span text:style-name="T21"><text:s text:c="4"/></text:span><text:span text:style-name="T22">dev_err(&amp;client-&gt;dev, </text:span><text:span text:style-name="T47">"illegal value for divider (%d)</text:span><text:span text:style-name="T48">\n</text:span><text:span text:style-name="T47">"</text:span><text:span text:style-name="T22">,</text:span><text:span text:style-name="T21"> </text:span><text:span text:style-name="T22">div);</text:span></text:p>
            <text:p text:style-name="P12"><text:span text:style-name="T21"><text:s text:c="4"/></text:span><text:span text:style-name="T31">return</text:span><text:span text:style-name="T21"> </text:span><text:span text:style-name="T22">-EINVAL; </text:span><text:span text:style-name="T23">// ERROR</text:span></text:p>
            <text:p text:style-name="P12"><text:span text:style-name="T21"><text:s text:c="2"/></text:span><text:span text:style-name="T22">}</text:span></text:p>
            <text:p text:style-name="P12"><text:span text:style-name="T21"><text:s text:c="2"/></text:span><text:span text:style-name="T22">...</text:span></text:p>
            <text:p text:style-name="P12"><text:span text:style-name="T21"><text:s text:c="2"/></text:span><text:span text:style-name="T22">mutex_unlock(&amp;data-&gt;update_lock);</text:span></text:p>
            <text:p text:style-name="P12"><text:span text:style-name="T21"/></text:p>
            <text:p text:style-name="P12"><text:span text:style-name="T21"><text:s text:c="2"/></text:span><text:span text:style-name="T31">return</text:span><text:span text:style-name="T21"> </text:span><text:span text:style-name="T22">count;</text:span></text:p>
            <text:p text:style-name="P13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Příklady<text:line-break/><text:span text:style-name="T43">Ověřená chyba</text:span></text:p>
          </draw:text-box>
        </draw:frame>
        <draw:frame draw:style-name="gr15" draw:text-style-name="P12" draw:layer="layout" svg:width="20.146cm" svg:height="13.67cm" svg:x="2.627cm" svg:y="3.705cm">
          <draw:text-box>
            <text:p text:style-name="P12"><text:span text:style-name="T22">ssize_t</text:span><text:span text:style-name="T21"> </text:span><text:span text:style-name="T22">ext2_quota_write(</text:span><text:span text:style-name="T20">struct</text:span><text:span text:style-name="T21"> </text:span><text:span text:style-name="T22">super_block</text:span><text:span text:style-name="T21"> </text:span><text:span text:style-name="T22">*sb,</text:span><text:span text:style-name="T21"> </text:span><text:span text:style-name="T20">int</text:span><text:span text:style-name="T21"> </text:span><text:span text:style-name="T22">type,</text:span></text:p>
            <text:p text:style-name="P12"><text:span text:style-name="T21"><text:s text:c="8"/></text:span><text:span text:style-name="T20">const char</text:span><text:span text:style-name="T21"> </text:span><text:span text:style-name="T22">*data,</text:span><text:span text:style-name="T21"> </text:span><text:span text:style-name="T20">size_t</text:span><text:span text:style-name="T21"> </text:span><text:span text:style-name="T22">len,</text:span><text:span text:style-name="T21"> </text:span><text:span text:style-name="T22">loff_t off)</text:span></text:p>
            <text:p text:style-name="P13"><text:span text:style-name="T21">{</text:span></text:p>
            <text:p text:style-name="P12"><text:span text:style-name="T21"><text:s text:c="2"/></text:span><text:span text:style-name="T20">struct</text:span><text:span text:style-name="T21"> </text:span><text:span text:style-name="T22">inode</text:span><text:span text:style-name="T21"> </text:span><text:span text:style-name="T22">*inode</text:span><text:span text:style-name="T21"> </text:span><text:span text:style-name="T22">=</text:span><text:span text:style-name="T21"> </text:span><text:span text:style-name="T22">sb_dqopt(sb)-&gt;files[type];</text:span></text:p>
            <text:p text:style-name="P12"><text:span text:style-name="T21"><text:s text:c="2"/></text:span><text:span text:style-name="T20">int</text:span><text:span text:style-name="T21"> </text:span><text:span text:style-name="T22">err</text:span><text:span text:style-name="T21"> </text:span><text:span text:style-name="T22">=</text:span><text:span text:style-name="T21"> </text:span><text:span text:style-name="T47">0</text:span><text:span text:style-name="T22">;</text:span></text:p>
            <text:p text:style-name="P12"><text:span text:style-name="T21"><text:s text:c="2"/></text:span><text:span text:style-name="T20">int</text:span><text:span text:style-name="T21"> </text:span><text:span text:style-name="T22">tocopy;</text:span></text:p>
            <text:p text:style-name="P12"><text:span text:style-name="T21"><text:s text:c="2"/></text:span><text:span text:style-name="T20">size_t</text:span><text:span text:style-name="T21"> </text:span><text:span text:style-name="T22">towrite</text:span><text:span text:style-name="T21"> </text:span><text:span text:style-name="T22">=</text:span><text:span text:style-name="T21"> </text:span><text:span text:style-name="T22">len;</text:span></text:p>
            <text:p text:style-name="P12"><text:span text:style-name="T21"/></text:p>
            <text:p text:style-name="P12"><text:span text:style-name="T21"><text:s text:c="2"/></text:span><text:span text:style-name="T22">mutex_lock_nested(&amp;inode-&gt;i_mutex,</text:span><text:span text:style-name="T21"> </text:span><text:span text:style-name="T22">I_MUTEX_QUOTA);</text:span></text:p>
            <text:p text:style-name="P12"><text:span text:style-name="T21"><text:s text:c="2"/></text:span><text:span text:style-name="T31">while</text:span><text:span text:style-name="T21"> </text:span><text:span text:style-name="T22">(towrite</text:span><text:span text:style-name="T21"> </text:span><text:span text:style-name="T22">&gt;</text:span><text:span text:style-name="T21"> </text:span><text:span text:style-name="T47">0</text:span><text:span text:style-name="T22">) {</text:span></text:p>
            <text:p text:style-name="P12"><text:span text:style-name="T21"><text:s text:c="4"/></text:span><text:span text:style-name="T22">...</text:span></text:p>
            <text:p text:style-name="P12"><text:span text:style-name="T22"><text:s text:c="4"/></text:span><text:span text:style-name="T22">towrite</text:span><text:span text:style-name="T21"> </text:span><text:span text:style-name="T22">-=</text:span><text:span text:style-name="T21"> </text:span><text:span text:style-name="T22">tocopy;</text:span></text:p>
            <text:p text:style-name="P12"><text:span text:style-name="T22"><text:s text:c="4"/></text:span><text:span text:style-name="T22">data</text:span><text:span text:style-name="T21"> </text:span><text:span text:style-name="T22">+=</text:span><text:span text:style-name="T21"> </text:span><text:span text:style-name="T22">tocopy;</text:span></text:p>
            <text:p text:style-name="P12"><text:span text:style-name="T21"><text:s text:c="2"/></text:span><text:span text:style-name="T22">}</text:span></text:p>
            <text:p text:style-name="P13"><text:span text:style-name="T21">out:</text:span></text:p>
            <text:p text:style-name="P12"><text:span text:style-name="T21"><text:s text:c="2"/></text:span><text:span text:style-name="T31">if</text:span><text:span text:style-name="T21"> </text:span><text:span text:style-name="T22">(len</text:span><text:span text:style-name="T21"> </text:span><text:span text:style-name="T22">==</text:span><text:span text:style-name="T21"> </text:span><text:span text:style-name="T22">towrite)</text:span></text:p>
            <text:p text:style-name="P12"><text:span text:style-name="T21"><text:s text:c="4"/></text:span><text:span text:style-name="T31">return</text:span><text:span text:style-name="T21"> </text:span><text:span text:style-name="T22">err; </text:span><text:span text:style-name="T23">// ERROR</text:span></text:p>
            <text:p text:style-name="P12"><text:span text:style-name="T21"><text:s text:c="2"/></text:span><text:span text:style-name="T22">...</text:span></text:p>
            <text:p text:style-name="P12"><text:span text:style-name="T21"><text:s text:c="2"/></text:span><text:span text:style-name="T22">mutex_unlock(&amp;inode-&gt;i_mutex);</text:span></text:p>
            <text:p text:style-name="P12"><text:span text:style-name="T21"><text:s text:c="2"/></text:span><text:span text:style-name="T31">return</text:span><text:span text:style-name="T21"> </text:span><text:span text:style-name="T22">len</text:span><text:span text:style-name="T21"> </text:span><text:span text:style-name="T22">-</text:span><text:span text:style-name="T21"> </text:span><text:span text:style-name="T22">towrite;</text:span></text:p>
            <text:p text:style-name="P13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Příklady<text:line-break/><text:span text:style-name="T43">Vyvrácené falešné hlášení</text:span></text:p>
          </draw:text-box>
        </draw:frame>
        <draw:frame draw:style-name="gr16" draw:text-style-name="P12" draw:layer="layout" svg:width="17.775cm" svg:height="13.67cm" svg:x="3.813cm" svg:y="3.699cm">
          <draw:text-box>
            <text:p text:style-name="P12"><text:span text:style-name="T20">bool</text:span><text:span text:style-name="T21"> </text:span><text:span text:style-name="T22">cgroup_lock_live_group(</text:span><text:span text:style-name="T20">struct</text:span><text:span text:style-name="T21"> </text:span><text:span text:style-name="T22">cgroup</text:span><text:span text:style-name="T21"> </text:span><text:span text:style-name="T22">*cgrp) {</text:span></text:p>
            <text:p text:style-name="P12"><text:span text:style-name="T21"><text:s text:c="2"/></text:span><text:span text:style-name="T22">mutex_lock(&amp;cgroup_mutex);</text:span></text:p>
            <text:p text:style-name="P12"><text:span text:style-name="T21"><text:s text:c="2"/></text:span><text:span text:style-name="T31">if</text:span><text:span text:style-name="T21"> </text:span><text:span text:style-name="T22">(cgroup_is_removed(cgrp)) {</text:span></text:p>
            <text:p text:style-name="P12"><text:span text:style-name="T21"><text:s text:c="4"/></text:span><text:span text:style-name="T22">mutex_unlock(&amp;cgroup_mutex);</text:span></text:p>
            <text:p text:style-name="P12"><text:span text:style-name="T21"><text:s text:c="4"/></text:span><text:span text:style-name="T31">return false</text:span><text:span text:style-name="T22">;</text:span></text:p>
            <text:p text:style-name="P12"><text:span text:style-name="T21"><text:s text:c="2"/></text:span><text:span text:style-name="T22">}</text:span></text:p>
            <text:p text:style-name="P12"><text:span text:style-name="T21"><text:s text:c="2"/></text:span><text:span text:style-name="T31">return true</text:span><text:span text:style-name="T22">;</text:span></text:p>
            <text:p text:style-name="P13"><text:span text:style-name="T21">}</text:span></text:p>
            <text:p text:style-name="P12"><text:span text:style-name="T21"/></text:p>
            <text:p text:style-name="P12"><text:span text:style-name="T20">void</text:span><text:span text:style-name="T21"> </text:span><text:span text:style-name="T22">cgroup_unlock(</text:span><text:span text:style-name="T20">void</text:span><text:span text:style-name="T22">) {</text:span><text:span text:style-name="T21"> <text:s text:c="6"/></text:span></text:p>
            <text:p text:style-name="P12"><text:span text:style-name="T21"><text:s text:c="2"/></text:span><text:span text:style-name="T22">mutex_unlock(&amp;cgroup_mutex);</text:span></text:p>
            <text:p text:style-name="P13"><text:span text:style-name="T21">}</text:span></text:p>
            <text:p text:style-name="P12"><text:span text:style-name="T21"/></text:p>
            <text:p text:style-name="P12"><text:span text:style-name="T20">int</text:span><text:span text:style-name="T21"> </text:span><text:span text:style-name="T22">cgroup_release_agent_write(</text:span><text:span text:style-name="T20">struct</text:span><text:span text:style-name="T21"> </text:span><text:span text:style-name="T22">cgroup</text:span><text:span text:style-name="T21"> </text:span><text:span text:style-name="T22">*cgrp,</text:span></text:p>
            <text:p text:style-name="P12"><text:span text:style-name="T20"><text:s text:c="9"/></text:span><text:span text:style-name="T20">struct</text:span><text:span text:style-name="T21"> </text:span><text:span text:style-name="T22">cftype</text:span><text:span text:style-name="T21"> </text:span><text:span text:style-name="T22">*cft,</text:span><text:span text:style-name="T21"> </text:span><text:span text:style-name="T20">const char</text:span><text:span text:style-name="T21"> </text:span><text:span text:style-name="T22">*buffer) {</text:span></text:p>
            <text:p text:style-name="P12"><text:span text:style-name="T21"><text:s text:c="2"/></text:span><text:span text:style-name="T31">if</text:span><text:span text:style-name="T21"> </text:span><text:span text:style-name="T22">(!cgroup_lock_live_group(cgrp))</text:span></text:p>
            <text:p text:style-name="P12"><text:span text:style-name="T21"><text:s text:c="4"/></text:span><text:span text:style-name="T31">return</text:span><text:span text:style-name="T21"> </text:span><text:span text:style-name="T22">-ENODEV; </text:span><text:span text:style-name="T23">// ERROR</text:span></text:p>
            <text:p text:style-name="P12"><text:span text:style-name="T21"><text:s text:c="2"/></text:span><text:span text:style-name="T22">strcpy(cgrp-&gt;root-&gt;release_agent_path,</text:span><text:span text:style-name="T21"> </text:span><text:span text:style-name="T22">buffer);</text:span></text:p>
            <text:p text:style-name="P12"><text:span text:style-name="T21"><text:s text:c="2"/></text:span><text:span text:style-name="T22">cgroup_unlock();</text:span></text:p>
            <text:p text:style-name="P12"><text:span text:style-name="T21"><text:s text:c="2"/></text:span><text:span text:style-name="T31">return</text:span><text:span text:style-name="T21"> </text:span><text:span text:style-name="T47">0</text:span><text:span text:style-name="T22">;</text:span></text:p>
            <text:p text:style-name="P13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Příklady<text:line-break/><text:span text:style-name="T43">Vyvrácené falešné hlášení</text:span></text:p>
          </draw:text-box>
        </draw:frame>
        <draw:frame draw:style-name="gr17" draw:text-style-name="P12" draw:layer="layout" svg:width="22.515cm" svg:height="13.67cm" svg:x="1.458cm" svg:y="3.874cm">
          <draw:text-box>
            <text:p text:style-name="P12"><text:span text:style-name="T20">int</text:span><text:span text:style-name="T21"> </text:span><text:span text:style-name="T22">rx_refill(</text:span><text:span text:style-name="T20">struct</text:span><text:span text:style-name="T21"> </text:span><text:span text:style-name="T22">net_device</text:span><text:span text:style-name="T21"> </text:span><text:span text:style-name="T22">*ndev,</text:span><text:span text:style-name="T21"> </text:span><text:span text:style-name="T22">gfp_t gfp)</text:span></text:p>
            <text:p text:style-name="P13"><text:span text:style-name="T21">{</text:span></text:p>
            <text:p text:style-name="P12"><text:span text:style-name="T21"><text:s text:c="2"/></text:span><text:span text:style-name="T20">struct</text:span><text:span text:style-name="T21"> </text:span><text:span text:style-name="T22">ns83820</text:span><text:span text:style-name="T21"> </text:span><text:span text:style-name="T22">*dev</text:span><text:span text:style-name="T21"> </text:span><text:span text:style-name="T22">=</text:span><text:span text:style-name="T21"> </text:span><text:span text:style-name="T22">PRIV(ndev);</text:span></text:p>
            <text:p text:style-name="P12"><text:span text:style-name="T21"><text:s text:c="2"/></text:span><text:span text:style-name="T20">unsigned</text:span><text:span text:style-name="T21"> </text:span><text:span text:style-name="T22">i;</text:span></text:p>
            <text:p text:style-name="P12"><text:span text:style-name="T21"><text:s text:c="2"/></text:span><text:span text:style-name="T20">unsigned long</text:span><text:span text:style-name="T21"> </text:span><text:span text:style-name="T22">flags</text:span><text:span text:style-name="T21"> </text:span><text:span text:style-name="T22">=</text:span><text:span text:style-name="T21"> </text:span><text:span text:style-name="T47">0</text:span><text:span text:style-name="T22">;</text:span></text:p>
            <text:p text:style-name="P12"><text:span text:style-name="T21"><text:s text:c="2"/></text:span><text:span text:style-name="T22">...</text:span></text:p>
            <text:p text:style-name="P12"><text:span text:style-name="T21"><text:s text:c="2"/></text:span><text:span text:style-name="T31">if</text:span><text:span text:style-name="T21"> </text:span><text:span text:style-name="T22">(gfp</text:span><text:span text:style-name="T21"> </text:span><text:span text:style-name="T22">==</text:span><text:span text:style-name="T21"> </text:span><text:span text:style-name="T22">GFP_ATOMIC)</text:span></text:p>
            <text:p text:style-name="P12"><text:span text:style-name="T21"><text:s text:c="4"/></text:span><text:span text:style-name="T22">spin_lock_irqsave(&amp;dev-&gt;rx_info.lock,</text:span><text:span text:style-name="T21"> </text:span><text:span text:style-name="T22">flags); </text:span><text:span text:style-name="T23">// ERROR</text:span></text:p>
            <text:p text:style-name="P12"><text:span text:style-name="T21"><text:s text:c="2"/></text:span><text:span text:style-name="T31">for</text:span><text:span text:style-name="T21"> </text:span><text:span text:style-name="T22">(i=</text:span><text:span text:style-name="T47">0</text:span><text:span text:style-name="T22">;</text:span><text:span text:style-name="T21"> </text:span><text:span text:style-name="T22">i&lt;NR_RX_DESC;</text:span><text:span text:style-name="T21"> </text:span><text:span text:style-name="T22">i++) {</text:span></text:p>
            <text:p text:style-name="P12"><text:span text:style-name="T21"><text:s text:c="4"/></text:span><text:span text:style-name="T22">...</text:span></text:p>
            <text:p text:style-name="P12"><text:span text:style-name="T21"><text:s text:c="4"/></text:span><text:span text:style-name="T31">if</text:span><text:span text:style-name="T21"> </text:span><text:span text:style-name="T22">(gfp</text:span><text:span text:style-name="T21"> </text:span><text:span text:style-name="T22">!=</text:span><text:span text:style-name="T21"> </text:span><text:span text:style-name="T22">GFP_ATOMIC)</text:span></text:p>
            <text:p text:style-name="P12"><text:span text:style-name="T21"><text:s text:c="6"/></text:span><text:span text:style-name="T22">spin_lock_irqsave(&amp;dev-&gt;rx_info.lock,</text:span><text:span text:style-name="T21"> </text:span><text:span text:style-name="T22">flags); </text:span><text:span text:style-name="T23">// ERROR</text:span></text:p>
            <text:p text:style-name="P12"><text:span text:style-name="T22"><text:s text:c="4"/></text:span><text:span text:style-name="T22">res</text:span><text:span text:style-name="T21"> </text:span><text:span text:style-name="T22">=</text:span><text:span text:style-name="T21"> </text:span><text:span text:style-name="T22">ns83820_add_rx_skb(dev,</text:span><text:span text:style-name="T21"> </text:span><text:span text:style-name="T22">skb);</text:span></text:p>
            <text:p text:style-name="P12"><text:span text:style-name="T21"><text:s text:c="4"/></text:span><text:span text:style-name="T31">if</text:span><text:span text:style-name="T21"> </text:span><text:span text:style-name="T22">(gfp</text:span><text:span text:style-name="T21"> </text:span><text:span text:style-name="T22">!=</text:span><text:span text:style-name="T21"> </text:span><text:span text:style-name="T22">GFP_ATOMIC)</text:span></text:p>
            <text:p text:style-name="P12"><text:span text:style-name="T21"><text:s text:c="6"/></text:span><text:span text:style-name="T22">spin_unlock_irqrestore(&amp;dev-&gt;rx_info.lock,</text:span><text:span text:style-name="T21"> </text:span><text:span text:style-name="T22">flags); </text:span><text:span text:style-name="T23">// ERROR</text:span></text:p>
            <text:p text:style-name="P12"><text:span text:style-name="T21"><text:s text:c="4"/></text:span><text:span text:style-name="T22">...</text:span></text:p>
            <text:p text:style-name="P12"><text:span text:style-name="T21"><text:s text:c="2"/></text:span><text:span text:style-name="T22">}</text:span></text:p>
            <text:p text:style-name="P12"><text:span text:style-name="T21"><text:s text:c="2"/></text:span><text:span text:style-name="T31">if</text:span><text:span text:style-name="T21"> </text:span><text:span text:style-name="T22">(gfp</text:span><text:span text:style-name="T21"> </text:span><text:span text:style-name="T22">==</text:span><text:span text:style-name="T21"> </text:span><text:span text:style-name="T22">GFP_ATOMIC)</text:span></text:p>
            <text:p text:style-name="P12"><text:span text:style-name="T21"><text:s text:c="4"/></text:span><text:span text:style-name="T22">spin_unlock_irqrestore(&amp;dev-&gt;rx_info.lock,</text:span><text:span text:style-name="T21"> </text:span><text:span text:style-name="T22">flags); </text:span><text:span text:style-name="T23">// ERROR</text:span></text:p>
            <text:p text:style-name="P12"><text:span text:style-name="T21"><text:s text:c="2"/></text:span><text:span text:style-name="T49">...</text:span></text:p>
            <text:p text:style-name="P13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Příklady<text:line-break/><text:span text:style-name="T43">Přeživší falešné hlášení</text:span></text:p>
          </draw:text-box>
        </draw:frame>
        <draw:frame draw:style-name="gr18" draw:text-style-name="P12" draw:layer="layout" svg:width="12.02cm" svg:height="4.085cm" svg:x="6.69cm" svg:y="7.563cm">
          <draw:text-box>
            <text:p text:style-name="P12"><text:span text:style-name="T20">void</text:span><text:span text:style-name="T21"> </text:span><text:span text:style-name="T22">cas_lock_tx(</text:span><text:span text:style-name="T20">struct</text:span><text:span text:style-name="T21"> </text:span><text:span text:style-name="T22">cas</text:span><text:span text:style-name="T21"> </text:span><text:span text:style-name="T22">*cp) </text:span><text:span text:style-name="T49">{</text:span></text:p>
            <text:p text:style-name="P12"><text:span text:style-name="T21"><text:s text:c="2"/></text:span><text:span text:style-name="T20">int</text:span><text:span text:style-name="T21"> </text:span><text:span text:style-name="T22">i;</text:span></text:p>
            <text:p text:style-name="P12"><text:span text:style-name="T21"/></text:p>
            <text:p text:style-name="P12"><text:span text:style-name="T21"><text:s text:c="2"/></text:span><text:span text:style-name="T31">for</text:span><text:span text:style-name="T21"> </text:span><text:span text:style-name="T22">(i</text:span><text:span text:style-name="T21"> </text:span><text:span text:style-name="T22">=</text:span><text:span text:style-name="T21"> </text:span><text:span text:style-name="T47">0</text:span><text:span text:style-name="T22">;</text:span><text:span text:style-name="T21"> </text:span><text:span text:style-name="T22">i</text:span><text:span text:style-name="T21"> </text:span><text:span text:style-name="T22">&lt;</text:span><text:span text:style-name="T21"> </text:span><text:span text:style-name="T22">N_TX_RINGS;</text:span><text:span text:style-name="T21"> </text:span><text:span text:style-name="T22">i++)</text:span></text:p>
            <text:p text:style-name="P12"><text:span text:style-name="T21"><text:s text:c="4"/></text:span><text:span text:style-name="T22">spin_lock(&amp;cp-&gt;tx_lock[i]);</text:span></text:p>
            <text:p text:style-name="P13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Závěr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Symbolická exekuce</text:p>
                <text:list>
                  <text:list-item>
                    <text:p>Přesná, pomalá</text:p>
                  </text:list-item>
                </text:list>
              </text:list-item>
              <text:list-item>
                <text:p>Instrumentace</text:p>
                <text:list>
                  <text:list-item>
                    <text:p>Implementuje automaty v kódu</text:p>
                  </text:list-item>
                </text:list>
              </text:list-item>
              <text:list-item>
                <text:p>Slicování</text:p>
                <text:list>
                  <text:list-item>
                    <text:p>Mění exekuci na užitečnou</text:p>
                  </text:list-item>
                </text:list>
              </text:list-item>
              <text:list-item>
                <text:p xml:id="id34" text:id="id34">Budoucí práce</text:p>
                <text:list>
                  <text:list-item>
                    <text:p xml:id="id35" text:id="id35">Redukovat úskalí → zrychlení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Call_20_to_20_Action" presentation:presentation-page-layout-name="AL3T19">
        <office:forms form:automatic-focus="false" form:apply-design-mode="false"/>
        <draw:custom-shape draw:name="TextBox 1" draw:style-name="gr19" draw:text-style-name="P22" draw:layer="layout" svg:width="18.188cm" svg:height="4.502cm" svg:x="4.386cm" svg:y="3.616cm">
          <text:p text:style-name="P21"><text:span text:style-name="T50">Dotaz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51931f" draw:end-color="#77bd2d" draw:start-intensity="100%" draw:end-intensity="100%" draw:angle="180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3" draw:display-name="Gradient 13" draw:style="linear" draw:start-color="#77bd2d" draw:end-color="#51931f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6cm" svg:stroke-color="#454c51" draw:marker-start-width="0.406cm" draw:marker-start-center="false" draw:marker-end-width="0.406cm" draw:marker-end-center="false" draw:fill="solid" draw:fill-color="#000000" draw:fill-gradient-name="Gradient_20_11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1cm" draw:shadow-offset-y="0.3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ymbol0_5f_c" style:display-name="symbol0_c" style:family="graphic">
      <style:paragraph-properties style:text-autospace="none"/>
      <style:text-properties fo:color="#339933" fo:font-style="normal" fo:font-weight="normal" style:font-style-asian="normal" style:font-weight-asian="normal" style:font-style-complex="normal" style:font-weight-complex="normal"/>
    </style:style>
    <style:style style:name="keyword3_5f_c" style:display-name="keyword3_c" style:family="graphic">
      <style:paragraph-properties style:text-autospace="none"/>
      <style:text-properties fo:color="#993333" fo:font-style="normal" fo:font-weight="normal" style:font-style-asian="normal" style:font-weight-asian="normal" style:font-style-complex="normal" style:font-weight-complex="normal"/>
    </style:style>
    <style:style style:name="Znaky_20_pro_20_poznámku_20_pod_20_čarou" style:display-name="Znaky pro poznámku pod čarou" style:family="graphic">
      <style:paragraph-properties style:text-autospace="none"/>
    </style:style>
    <style:style style:name="Znaky_20_pro_20_vysvětlivky" style:display-name="Znaky pro vysvětlivky" style:family="graphic">
      <style:paragraph-properties style:text-autospace="none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Navštívený_20_internetový_20_odkaz" style:display-name="Navštívený internetový odkaz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Obsah_20_seznamu" style:display-name="Obsah seznamu" style:family="graphic">
      <style:paragraph-properties fo:margin-left="1.764cm" fo:margin-right="0cm" fo:text-indent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 Condensed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 draw:textarea-horizontal-align="left" draw:auto-grow-height="false" draw:fit-to-size="shrink-to-fit">
        <text:list-style style:name="Title-outline1">
          <text:list-level-style-bullet text:level="1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10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0cm" fo:margin-right="0cm" fo:margin-top="0cm" fo:margin-bottom="0.152cm" fo:text-align="start" fo:text-indent="0cm"/>
      <style:text-properties fo:font-size="16pt" style:font-size-asian="16pt" style:font-size-complex="16pt"/>
    </style:style>
    <style:style style:name="Title-outline3" style:family="presentation" style:parent-style-name="Title-outline2">
      <style:paragraph-properties fo:margin-left="0cm" fo:margin-right="0cm" fo:margin-top="0cm" fo:margin-bottom="0.152cm" fo:text-align="start" fo:text-indent="0cm"/>
      <style:text-properties fo:font-size="16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152cm" fo:text-align="start" fo:text-indent="0cm"/>
      <style:text-properties fo:font-size="1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52cm" fo:text-align="start" fo:text-indent="0cm"/>
      <style:text-properties fo:font-size="14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52cm" fo:text-align="start" fo:text-indent="0cm"/>
      <style:text-properties fo:font-size="1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 draw:auto-grow-height="fals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fo:font-family="Arial" style:font-style-name="Bold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No-Logo_20_Content-background" style:display-name="No-Logo Content-background" style:family="presentation">
      <style:graphic-properties draw:stroke="none" draw:fill="none"/>
      <style:text-properties style:letter-kerning="true"/>
    </style:style>
    <style:style style:name="No-Logo_20_Content-backgroundobjects" style:display-name="No-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o-Logo_20_Content-notes" style:display-name="No-Log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No-Logo_20_Content-outline1" style:display-name="No-Logo Content-outline1" style:family="presentation">
      <style:graphic-properties draw:stroke="none" draw:fill="none" draw:textarea-horizontal-align="left" draw:auto-grow-height="false" draw:fit-to-size="shrink-to-fit">
        <text:list-style style:name="No-Logo_20_Content-outline1" style:display-name="No-Logo Content-outline1">
          <text:list-level-style-bullet text:level="1" text:bullet-char="•">
            <style:list-level-properties text:space-before="0.7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9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-0.73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outline2" style:display-name="No-Logo Content-outline2" style:family="presentation" style:parent-style-name="No-Logo_20_Content-outline1">
      <style:paragraph-properties fo:margin-left="-1.146cm" fo:margin-right="0cm" fo:margin-top="0cm" fo:margin-bottom="0.406cm" fo:text-indent="0cm"/>
      <style:text-properties fo:color="#454c51" fo:font-size="20pt" style:font-size-asian="28pt" style:font-size-complex="28pt"/>
    </style:style>
    <style:style style:name="No-Logo_20_Content-outline3" style:display-name="No-Logo Content-outline3" style:family="presentation" style:parent-style-name="No-Logo_20_Content-outline2">
      <style:paragraph-properties fo:margin-left="-1.342cm" fo:margin-right="0cm" fo:margin-top="0cm" fo:margin-bottom="0.406cm" fo:text-indent="0cm"/>
      <style:text-properties fo:color="#454c51" fo:font-size="16pt" style:font-size-asian="24pt" style:font-size-complex="24pt"/>
    </style:style>
    <style:style style:name="No-Logo_20_Content-outline4" style:display-name="No-Logo Content-outline4" style:family="presentation" style:parent-style-name="No-Logo_20_Content-outline3">
      <style:paragraph-properties fo:margin-left="-1.79cm" fo:margin-right="0cm" fo:margin-top="0cm" fo:margin-bottom="0.406cm" fo:text-indent="0cm"/>
      <style:text-properties fo:color="#454c51" fo:font-size="14pt" style:font-size-asian="20pt" style:font-size-complex="20pt"/>
    </style:style>
    <style:style style:name="No-Logo_20_Content-outline5" style:display-name="No-Logo Content-outline5" style:family="presentation" style:parent-style-name="No-Logo_20_Content-outline4">
      <style:paragraph-properties fo:margin-left="-2.2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6" style:display-name="No-Logo Content-outline6" style:family="presentation" style:parent-style-name="No-Logo_20_Content-outline5">
      <style:paragraph-properties fo:margin-left="-3.4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7" style:display-name="No-Logo Content-outline7" style:family="presentation" style:parent-style-name="No-Logo_20_Content-outline6">
      <style:paragraph-properties fo:margin-left="-4.6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8" style:display-name="No-Logo Content-outline8" style:family="presentation" style:parent-style-name="No-Logo_20_Content-outline7">
      <style:paragraph-properties fo:margin-left="-5.8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9" style:display-name="No-Logo Content-outline9" style:family="presentation" style:parent-style-name="No-Logo_20_Content-outline8">
      <style:paragraph-properties fo:margin-left="-7.0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subtitle" style:display-name="No-Logo Content-subtitle" style:family="presentation">
      <style:graphic-properties draw:stroke="none" draw:fill="none" draw:textarea-vertical-align="middle">
        <text:list-style style:name="No-Logo_20_Content-subtitle" style:display-name="No-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title" style:display-name="No-Logo Content-title" style:family="presentation">
      <style:graphic-properties draw:stroke="none" draw:fill="none" draw:textarea-vertical-align="middle">
        <text:list-style style:name="No-Logo_20_Content-title" style:display-name="No-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Logo_20_Content-background" style:display-name="Logo Content-background" style:family="presentation">
      <style:graphic-properties draw:stroke="none" draw:fill="none"/>
      <style:text-properties style:letter-kerning="true"/>
    </style:style>
    <style:style style:name="Logo_20_Content-backgroundobjects" style:display-name="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_20_Content-notes" style:display-name="Log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_20_Content-outline1" style:display-name="Logo Content-outline1" style:family="presentation">
      <style:graphic-properties draw:stroke="none" draw:fill="none" draw:textarea-horizontal-align="left" draw:auto-grow-height="false" draw:fit-to-size="shrink-to-fit">
        <text:list-style style:name="Logo_20_Content-outline1" style:display-name="Logo Content-outline1">
          <text:list-level-style-bullet text:level="1" text:bullet-char="•">
            <style:list-level-properties text:space-before="0.737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24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1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8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27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05cm" text:min-label-width="0.483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-0.727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outline2" style:display-name="Logo Content-outline2" style:family="presentation" style:parent-style-name="Logo_20_Content-outline1">
      <style:paragraph-properties fo:margin-left="-1.146cm" fo:margin-right="0cm" fo:margin-top="0cm" fo:margin-bottom="0.406cm" fo:text-indent="0cm"/>
      <style:text-properties fo:color="#454c51" fo:font-size="20pt" style:font-size-asian="28pt" style:font-size-complex="28pt"/>
    </style:style>
    <style:style style:name="Logo_20_Content-outline3" style:display-name="Logo Content-outline3" style:family="presentation" style:parent-style-name="Logo_20_Content-outline2">
      <style:paragraph-properties fo:margin-left="-1.352cm" fo:margin-right="0cm" fo:margin-top="0cm" fo:margin-bottom="0.406cm" fo:text-indent="0cm"/>
      <style:text-properties fo:color="#454c51" fo:font-size="16pt" style:font-size-asian="24pt" style:font-size-complex="24pt"/>
    </style:style>
    <style:style style:name="Logo_20_Content-outline4" style:display-name="Logo Content-outline4" style:family="presentation" style:parent-style-name="Logo_20_Content-outline3">
      <style:paragraph-properties fo:margin-left="-1.753cm" fo:margin-right="0cm" fo:margin-top="0cm" fo:margin-bottom="0.406cm" fo:text-indent="0cm"/>
      <style:text-properties fo:color="#454c51" fo:font-size="14pt" style:font-size-asian="20pt" style:font-size-complex="20pt"/>
    </style:style>
    <style:style style:name="Logo_20_Content-outline5" style:display-name="Logo Content-outline5" style:family="presentation" style:parent-style-name="Logo_20_Content-outline4">
      <style:paragraph-properties fo:margin-left="-2.2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6" style:display-name="Logo Content-outline6" style:family="presentation" style:parent-style-name="Logo_20_Content-outline5">
      <style:paragraph-properties fo:margin-left="-3.4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7" style:display-name="Logo Content-outline7" style:family="presentation" style:parent-style-name="Logo_20_Content-outline6">
      <style:paragraph-properties fo:margin-left="-4.6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8" style:display-name="Logo Content-outline8" style:family="presentation" style:parent-style-name="Logo_20_Content-outline7">
      <style:paragraph-properties fo:margin-left="-5.8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9" style:display-name="Logo Content-outline9" style:family="presentation" style:parent-style-name="Logo_20_Content-outline8">
      <style:paragraph-properties fo:margin-left="-7.0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subtitle" style:display-name="Logo Content-subtitle" style:family="presentation">
      <style:graphic-properties draw:stroke="none" draw:fill="none" draw:textarea-vertical-align="middle">
        <text:list-style style:name="Logo_20_Content-subtitle" style:display-name="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title" style:display-name="Logo Content-title" style:family="presentation">
      <style:graphic-properties draw:stroke="none" draw:fill="none" draw:textarea-vertical-align="middle">
        <text:list-style style:name="Logo_20_Content-title" style:display-name="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Break-background" style:family="presentation">
      <style:graphic-properties draw:stroke="none" draw:fill="none"/>
      <style:text-properties style:letter-kerning="true"/>
    </style:style>
    <style:style style:name="Brea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rea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reak-outline1" style:family="presentation">
      <style:graphic-properties draw:stroke="none" draw:fill="none" draw:auto-grow-height="false" draw:fit-to-size="shrink-to-fit">
        <text:list-style style:name="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Break-outline2" style:family="presentation" style:parent-style-name="Break-outline1">
      <style:paragraph-properties fo:margin-top="0cm" fo:margin-bottom="0cm"/>
      <style:text-properties fo:font-size="6pt" style:font-size-asian="6pt" style:font-size-complex="6pt"/>
    </style:style>
    <style:style style:name="Break-outline3" style:family="presentation" style:parent-style-name="Break-outline2">
      <style:paragraph-properties fo:margin-top="0cm" fo:margin-bottom="0cm"/>
      <style:text-properties fo:font-size="6pt" style:font-size-asian="6pt" style:font-size-complex="6pt"/>
    </style:style>
    <style:style style:name="Break-outline4" style:family="presentation" style:parent-style-name="Break-outline3">
      <style:paragraph-properties fo:margin-top="0cm" fo:margin-bottom="0cm"/>
      <style:text-properties fo:font-size="6pt" style:font-size-asian="6pt" style:font-size-complex="6pt"/>
    </style:style>
    <style:style style:name="Break-outline5" style:family="presentation" style:parent-style-name="Break-outline4">
      <style:paragraph-properties fo:margin-top="0cm" fo:margin-bottom="0cm"/>
      <style:text-properties fo:font-size="6pt" style:font-size-asian="6pt" style:font-size-complex="6pt"/>
    </style:style>
    <style:style style:name="Break-outline6" style:family="presentation" style:parent-style-name="Break-outline5">
      <style:paragraph-properties fo:margin-top="0cm" fo:margin-bottom="0cm"/>
      <style:text-properties fo:font-size="6pt" style:font-size-asian="6pt" style:font-size-complex="6pt"/>
    </style:style>
    <style:style style:name="Break-outline7" style:family="presentation" style:parent-style-name="Break-outline6">
      <style:paragraph-properties fo:margin-top="0cm" fo:margin-bottom="0cm"/>
      <style:text-properties fo:font-size="6pt" style:font-size-asian="6pt" style:font-size-complex="6pt"/>
    </style:style>
    <style:style style:name="Break-outline8" style:family="presentation" style:parent-style-name="Break-outline7">
      <style:paragraph-properties fo:margin-top="0cm" fo:margin-bottom="0cm"/>
      <style:text-properties fo:font-size="6pt" style:font-size-asian="6pt" style:font-size-complex="6pt"/>
    </style:style>
    <style:style style:name="Break-outline9" style:family="presentation" style:parent-style-name="Break-outline8">
      <style:paragraph-properties fo:margin-top="0cm" fo:margin-bottom="0cm"/>
      <style:text-properties fo:font-size="6pt" style:font-size-asian="6pt" style:font-size-complex="6pt"/>
    </style:style>
    <style:style style:name="Break-subtitle" style:family="presentation">
      <style:graphic-properties draw:stroke="none" draw:fill="none" draw:textarea-vertical-align="middle">
        <text:list-style style:name="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eak-title" style:family="presentation">
      <style:graphic-properties draw:stroke="none" draw:fill="none" draw:textarea-horizontal-align="right" draw:textarea-vertical-align="middle">
        <text:list-style style:name="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Bol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ll_20_to_20_Action-background" style:display-name="Call to Action-background" style:family="presentation">
      <style:graphic-properties draw:stroke="none" draw:fill="none"/>
      <style:text-properties style:letter-kerning="true"/>
    </style:style>
    <style:style style:name="Call_20_to_20_Action-backgroundobjects" style:display-name="Call to A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ll_20_to_20_Action-notes" style:display-name="Call to A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ll_20_to_20_Action-outline1" style:display-name="Call to Action-outline1" style:family="presentation">
      <style:graphic-properties draw:stroke="none" draw:fill="none" draw:auto-grow-height="false" draw:fit-to-size="shrink-to-fit">
        <text:list-style style:name="Call_20_to_20_Action-outline1" style:display-name="Call to A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Call_20_to_20_Action-outline2" style:display-name="Call to Action-outline2" style:family="presentation" style:parent-style-name="Call_20_to_20_Action-outline1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3" style:display-name="Call to Action-outline3" style:family="presentation" style:parent-style-name="Call_20_to_20_Action-outline2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4" style:display-name="Call to Action-outline4" style:family="presentation" style:parent-style-name="Call_20_to_20_Action-outline3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5" style:display-name="Call to Action-outline5" style:family="presentation" style:parent-style-name="Call_20_to_20_Action-outline4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6" style:display-name="Call to Action-outline6" style:family="presentation" style:parent-style-name="Call_20_to_20_Action-outline5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7" style:display-name="Call to Action-outline7" style:family="presentation" style:parent-style-name="Call_20_to_20_Action-outline6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8" style:display-name="Call to Action-outline8" style:family="presentation" style:parent-style-name="Call_20_to_20_Action-outline7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9" style:display-name="Call to Action-outline9" style:family="presentation" style:parent-style-name="Call_20_to_20_Action-outline8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subtitle" style:display-name="Call to Action-subtitle" style:family="presentation">
      <style:graphic-properties draw:stroke="none" draw:fill="none" draw:textarea-vertical-align="middle">
        <text:list-style style:name="Call_20_to_20_Action-subtitle" style:display-name="Call to A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ll_20_to_20_Action-title" style:display-name="Call to Action-title" style:family="presentation">
      <style:graphic-properties draw:stroke="none" draw:fill="none" draw:textarea-horizontal-align="left" draw:textarea-vertical-align="top">
        <text:list-style style:name="Call_20_to_20_Action-title" style:display-name="Call to A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10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gradient" draw:fill-gradient-name="Gradient_20_13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ffffff" svg:stroke-opacity="31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3f7418" svg:stroke-opacity="48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svg:stroke-width="0.076cm" draw:stroke-linejoin="round" draw:fill="none" draw:textarea-horizontal-align="center" draw:textarea-vertical-align="middle" draw:auto-grow-height="false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26cm" draw:stroke-linejoin="round" draw:fill="solid" draw:fill-color="#e4e5e6" draw:textarea-vertical-align="top" draw:auto-grow-height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none" draw:textarea-vertical-align="top" draw:auto-grow-height="true" fo:min-height="1.281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No-Logo_20_Content-backgroundobjects">
      <style:graphic-properties draw:stroke="none" draw:fill="none" draw:fill-color="#ffffff" draw:auto-grow-height="false" fo:min-height="1.397cm" fo:min-width="8.869cm"/>
    </style:style>
    <style:style style:name="Mpr4" style:family="presentation" style:parent-style-name="No-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5" style:family="presentation" style:parent-style-name="Logo_20_Content-backgroundobjects">
      <style:graphic-properties draw:stroke="none" draw:fill="none" draw:fill-color="#ffffff" draw:auto-grow-height="false" fo:min-height="1.397cm" fo:min-width="8.869cm"/>
    </style:style>
    <style:style style:name="Mpr6" style:family="presentation" style:parent-style-name="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7" style:family="presentation" style:parent-style-name="Break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Break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Call_20_to_20_Action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Call_20_to_20_Action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MP6" style:family="paragraph">
      <style:paragraph-properties fo:margin-left="0cm" fo:margin-right="0cm" fo:margin-top="0cm" fo:margin-bottom="0cm" fo:line-height="93%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style:text-line-through-style="none" fo:font-family="Arial" style:font-family-generic="swiss" fo:font-size="9pt" fo:letter-spacing="normal" fo:font-style="normal" style:text-underline-style="none" fo:font-weight="bold" style:font-size-asian="9pt" style:font-style-asian="normal" style:font-weight-asian="bold" style:font-family-complex="'Lucida Sans Unicode'" style:font-family-generic-complex="swiss" style:font-size-complex="9pt" style:font-style-complex="normal" style:font-weight-complex="bold"/>
    </style:style>
    <style:style style:name="MT4" style:family="text">
      <style:text-properties fo:color="#454c51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4cm" svg:height="1.396cm" svg:x="3.36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372cm" svg:height="1.396cm" svg:x="15.21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428cm" svg:height="1.396cm" svg:x="3.47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098cm" svg:height="1.396cm" svg:x="15.855cm" svg:y="26.543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" style:page-layout-name="PM1" draw:style-name="Mdp1">
      <office:forms form:automatic-focus="false" form:apply-design-mode="false"/>
      <draw:custom-shape draw:name="Rectangle 9" draw:style-name="Mgr3" draw:text-style-name="MP3" draw:layer="backgroundobjects" svg:width="24.129cm" svg:height="11.605cm" svg:x="0.637cm" svg:y="0.565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1.558cm" svg:height="4.242cm" svg:x="2.286cm" svg:y="6.579cm" presentation:class="title" presentation:placeholder="true">
        <draw:text-box/>
      </draw:frame>
      <draw:frame presentation:style-name="Title-outline1" draw:layer="backgroundobjects" svg:width="10.566cm" svg:height="12.573cm" svg:x="2.261cm" svg:y="13.081cm" presentation:class="outline" presentation:placeholder="true">
        <draw:text-box/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2"><text:page-number>&lt;číslo&gt;</text:page-number></text:span></text:p>
          </draw:text-box>
        </draw:frame>
      </presentation:notes>
    </style:master-page>
    <style:master-page style:name="No-Logo_20_Content" style:display-name="No-Logo Content" style:page-layout-name="PM1" draw:style-name="Mdp1">
      <office:forms form:automatic-focus="false" form:apply-design-mode="false"/>
      <draw:frame presentation:style-name="No-Logo_20_Content-title" draw:layer="backgroundobjects" svg:width="20.93cm" svg:height="2.743cm" svg:x="2.286cm" svg:y="0.711cm" presentation:class="title" presentation:placeholder="true">
        <draw:text-box/>
      </draw:frame>
      <draw:frame presentation:style-name="No-Logo_20_Content-outline1" draw:layer="backgroundobjects" svg:width="20.93cm" svg:height="12.573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8cm" svg:y="18.123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1cm" svg:y1="18.123cm" svg:x2="2.291cm" svg:y2="19.088cm">
        <text:p/>
      </draw:line>
      <draw:line draw:name="Straight Connector 11" draw:style-name="Mgr6" draw:text-style-name="MP3" draw:layer="backgroundobjects" svg:x1="2.265cm" svg:y1="18.123cm" svg:x2="2.265cm" svg:y2="19.088cm">
        <text:p/>
      </draw:line>
      <draw:custom-shape draw:name="Text Box 4" draw:style-name="Mgr7" draw:text-style-name="MP3" draw:layer="backgroundobjects" svg:width="16.024cm" svg:height="0.656cm" svg:x="2.403cm" svg:y="18.318cm">
        <text:p/>
        <draw:enhanced-geometry svg:viewBox="0 0 21600 21600" draw:type="rectangle" draw:enhanced-path="M 0 0 L 21600 0 21600 21600 0 21600 0 0 Z N"/>
      </draw:custom-shape>
      <draw:custom-shape draw:name="Text Box 5" draw:style-name="Mgr8" draw:text-style-name="MP5" draw:layer="backgroundobjects" svg:width="0.801cm" svg:height="0.762cm" svg:x="1.155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No-Logo_20_Content-title" draw:layer="backgroundobjects" svg:width="0.001cm" svg:height="0.001cm" svg:x="0cm" svg:y="2.123cm" presentation:class="page"/>
        <draw:frame presentation:style-name="No-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ogo_20_Content" style:display-name="Logo Content" style:page-layout-name="PM1" draw:style-name="Mdp1">
      <office:forms form:automatic-focus="false" form:apply-design-mode="false"/>
      <draw:frame presentation:style-name="Logo_20_Content-title" draw:layer="backgroundobjects" svg:width="20.93cm" svg:height="2.743cm" svg:x="2.286cm" svg:y="0.711cm" presentation:class="title" presentation:placeholder="true">
        <draw:text-box/>
      </draw:frame>
      <draw:frame presentation:style-name="Logo_20_Content-outline1" draw:layer="backgroundobjects" svg:width="20.93cm" svg:height="12.573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2cm" svg:y1="18.124cm" svg:x2="2.292cm" svg:y2="19.089cm">
        <text:p/>
      </draw:line>
      <draw:line draw:name="Straight Connector 11" draw:style-name="Mgr6" draw:text-style-name="MP3" draw:layer="backgroundobjects" svg:x1="2.266cm" svg:y1="18.124cm" svg:x2="2.266cm" svg:y2="19.089cm">
        <text:p/>
      </draw:line>
      <draw:custom-shape draw:name="Text Box 5" draw:style-name="Mgr8" draw:text-style-name="MP5" draw:layer="backgroundobjects" svg:width="0.801cm" svg:height="0.762cm" svg:x="1.156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Logo_20_Content-title" draw:layer="backgroundobjects" svg:width="13.968cm" svg:height="10.476cm" svg:x="3.81cm" svg:y="2.123cm" presentation:class="page"/>
        <draw:frame presentation:style-name="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Break" style:page-layout-name="PM1" draw:style-name="Mdp1">
      <office:forms form:automatic-focus="false" form:apply-design-mode="false"/>
      <draw:custom-shape draw:name="Rectangle 4" draw:style-name="Mgr3" draw:text-style-name="MP3" draw:layer="backgroundobjects" svg:width="24.129cm" svg:height="17.872cm" svg:x="0.681cm" svg:y="0.564cm">
        <text:p/>
        <draw:enhanced-geometry svg:viewBox="0 0 21600 21600" draw:type="rectangle" draw:enhanced-path="M 0 0 L 21600 0 21600 21600 0 21600 0 0 Z N"/>
      </draw:custom-shape>
      <draw:frame presentation:style-name="Break-title" draw:layer="backgroundobjects" svg:width="20.884cm" svg:height="3.18cm" svg:x="2.286cm" svg:y="7.62cm" presentation:class="title" presentation:placeholder="true">
        <draw:text-box/>
      </draw:frame>
      <draw:frame presentation:style-name="Break-outline1" draw:layer="backgroundobjects" svg:width="13.259cm" svg:height="12.573cm" svg:x="0cm" svg:y="19.743cm" presentation:class="outline" presentation:placeholder="true">
        <draw:text-box/>
      </draw:frame>
      <presentation:notes style:page-layout-name="PM0">
        <draw:page-thumbnail presentation:style-name="Break-title" draw:layer="backgroundobjects" svg:width="0.001cm" svg:height="0.001cm" svg:x="0cm" svg:y="2.123cm" presentation:class="page"/>
        <draw:frame presentation:style-name="Brea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Call_20_to_20_Action" style:display-name="Call to Action" style:page-layout-name="PM1" draw:style-name="Mdp1">
      <office:forms form:automatic-focus="false" form:apply-design-mode="false"/>
      <draw:frame presentation:style-name="Call_20_to_20_Action-title" draw:layer="backgroundobjects" svg:width="6.16cm" svg:height="0.783cm" svg:x="0cm" svg:y="-0.952cm" presentation:class="title" presentation:placeholder="true">
        <draw:text-box/>
      </draw:frame>
      <draw:frame presentation:style-name="Call_20_to_20_Action-outline1" draw:layer="backgroundobjects" svg:width="6.546cm" svg:height="20.542cm" svg:x="0cm" svg:y="19.316cm" presentation:class="outline" presentation:placeholder="true">
        <draw:text-box/>
      </draw:frame>
      <draw:custom-shape draw:name="Rectangle 9" draw:style-name="Mgr9" draw:text-style-name="MP3" draw:layer="backgroundobjects" svg:width="19.243cm" svg:height="6.931cm" svg:x="3.07cm" svg:y="2.753cm">
        <text:p/>
        <draw:enhanced-geometry svg:viewBox="0 0 21600 21600" draw:type="rectangle" draw:enhanced-path="M 0 0 L 21600 0 21600 21600 0 21600 0 0 Z N"/>
      </draw:custom-shape>
      <draw:custom-shape draw:name="Right Triangle 10" draw:style-name="Mgr9" draw:text-style-name="MP3" draw:layer="backgroundobjects" svg:width="1.683cm" svg:height="1.833cm" svg:x="4.675cm" svg:y="9.531cm">
        <text:p/>
        <draw:enhanced-geometry svg:viewBox="0 0 21600 21600" draw:mirror-horizontal="false" draw:mirror-vertical="true" draw:glue-points="10800 0 5400 10800 0 21600 10800 21600 21600 21600 16200 10800" draw:text-areas="1900 12700 12700 19700" draw:type="right-triangle" draw:enhanced-path="M 0 0 L 21600 21600 0 21600 0 0 Z N"/>
      </draw:custom-shape>
      <draw:custom-shape draw:name="TextBox 12" draw:style-name="Mgr10" draw:text-style-name="MP7" draw:layer="backgroundobjects" svg:width="17.492cm" svg:height="1.673cm" svg:x="3.065cm" svg:y="12.377cm">
        <text:p text:style-name="MP6"><text:span text:style-name="MT4">Děkuji za pozornost</text:span></text:p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backgroundobjects" svg:width="24.129cm" svg:height="0.964cm" svg:x="0.64cm" svg:y="18.125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3cm" svg:y1="18.125cm" svg:x2="2.293cm" svg:y2="19.09cm">
        <text:p/>
      </draw:line>
      <draw:line draw:name="Straight Connector 11" draw:style-name="Mgr6" draw:text-style-name="MP3" draw:layer="backgroundobjects" svg:x1="2.267cm" svg:y1="18.125cm" svg:x2="2.267cm" svg:y2="19.09cm">
        <text:p/>
      </draw:line>
      <draw:custom-shape draw:name="Text Box 5" draw:style-name="Mgr8" draw:text-style-name="MP5" draw:layer="backgroundobjects" svg:width="0.801cm" svg:height="0.762cm" svg:x="1.157cm" svg:y="18.234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Call_20_to_20_Action-title" draw:layer="backgroundobjects" svg:width="13.968cm" svg:height="10.476cm" svg:x="3.81cm" svg:y="2.123cm" presentation:class="page"/>
        <draw:frame presentation:style-name="Call_20_to_20_Actio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7-15T11:39:04.07</meta:creation-date>
    <dc:date>2011-12-12T23:26:31</dc:date>
    <meta:editing-duration>P1DT16H54M43S</meta:editing-duration>
    <meta:editing-cycles>138</meta:editing-cycles>
    <meta:generator>LibreOffice/3.4$Unix LibreOffice_project/340m1$Build-1206</meta:generator>
    <dc:title>SUSE Template v17: 8/12/11</dc:title>
    <meta:document-statistic meta:object-count="214"/>
    <meta:user-defined meta:name="Info 1"/>
    <meta:user-defined meta:name="Info 2"/>
    <meta:user-defined meta:name="Info 3"/>
    <meta:user-defined meta:name="Info 4"/>
  </office:meta>
</office:document-meta>
</file>