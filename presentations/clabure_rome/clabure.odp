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No-Logo_20_Content-outline1">
      <style:graphic-properties fo:min-height="10.799cm" fo:min-width="20.43cm"/>
    </style:style>
    <style:style style:name="pr11" style:family="presentation" style:parent-style-name="Break-title">
      <style:graphic-properties draw:auto-grow-height="true" fo:min-height="3.18cm" fo:min-width="20.43cm"/>
    </style:style>
    <style:style style:name="pr12" style:family="presentation" style:parent-style-name="Break-outline1">
      <style:graphic-properties fo:min-height="10.799cm" fo:min-width="20.43cm"/>
    </style:style>
    <style:style style:name="pr13" style:family="presentation" style:parent-style-name="Break-notes">
      <style:graphic-properties draw:fill-color="#ffffff" draw:auto-grow-height="true" fo:min-height="12.572cm" fo:min-width="16.771cm"/>
    </style:style>
    <style:style style:name="pr14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32pt" style:font-size-asian="32pt" style:font-size-complex="32pt"/>
    </style:style>
    <style:style style:name="P8" style:family="paragraph">
      <style:paragraph-properties fo:margin-top="0cm" fo:margin-bottom="0cm" fo:line-height="93%" fo:text-align="start"/>
    </style:style>
    <style:style style:name="P9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ClabureDB</text:span><text:span text:style-name="T2"><text:line-break/></text:span><text:span text:style-name="T3">Classified Bug-Reports Database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VMCAI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 and Motivation</text:span></text:p>
              </text:list-item>
              <text:list-item>
                <text:p><text:span text:style-name="T7">Internals</text:span></text:p>
              </text:list-item>
              <text:list-item>
                <text:p><text:span text:style-name="T7">Demonstr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Motiv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ode analysis tool</text:p>
                <text:list>
                  <text:list-item>
                    <text:p>Run on a software</text:p>
                  </text:list-item>
                  <text:list-item>
                    <text:p>Output: Reports</text:p>
                  </text:list-item>
                </text:list>
              </text:list-item>
              <text:list-item>
                <text:p xml:id="id1" text:id="id1">How precise is the tool (the reports)?</text:p>
                <text:list>
                  <text:list-item>
                    <text:p xml:id="id2" text:id="id2">Go and investigate manually</text:p>
                    <text:list>
                      <text:list-item>
                        <text:p xml:id="id3" text:id="id3">Burden for large projects</text:p>
                      </text:list-item>
                    </text:list>
                  </text:list-item>
                  <text:list-item>
                    <text:p xml:id="id4" text:id="id4">Alternatively use some knowledge base (benchmark)</text:p>
                    <text:list>
                      <text:list-item>
                        <text:p xml:id="id5" text:id="id5">Run on predefined sources</text:p>
                      </text:list-item>
                    </text:list>
                  </text:list-item>
                </text:list>
              </text:list-item>
              <text:list-item>
                <text:p xml:id="id6" text:id="id6">Existing benchmarks</text:p>
                <text:list>
                  <text:list-item>
                    <text:p xml:id="id7" text:id="id7">Small, unclassified, or on synthetic pro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ClabureDB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Benchmark for code analyzers</text:p>
              </text:list-item>
              <text:list-item>
                <text:p>Takes analyzer's reports</text:p>
                <text:list>
                  <text:list-item>
                    <text:p>Predefined sources</text:p>
                  </text:list-item>
                </text:list>
              </text:list-item>
              <text:list-item>
                <text:p>Compares it to data in the database</text:p>
              </text:list-item>
              <text:list-item>
                <text:p>Reports how many misses/hits there are</text:p>
                <text:list>
                  <text:list-item>
                    <text:p>Correct answers</text:p>
                  </text:list-item>
                  <text:list-item>
                    <text:p>False-positives</text:p>
                  </text:list-item>
                  <text:list-item>
                    <text:p>False-negatives</text:p>
                  </text:list-item>
                  <text:list-item>
                    <text:p>No record in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Architecture</text:p>
          </draw:text-box>
        </draw:frame>
        <draw:frame presentation:style-name="pr10" draw:layer="layout" svg:width="20.93cm" svg:height="11.049cm" svg:x="2.286cm" svg:y="4.039cm" presentation:class="outline">
          <draw:text-box>
            <text:list text:style-name="L2">
              <text:list-item>
                <text:p>SQLite v. 3 “sub-databases”</text:p>
                <text:list>
                  <text:list-item>
                    <text:p>For each project</text:p>
                  </text:list-item>
                  <text:list-item>
                    <text:p>Can be downloaded and manipulated locally</text:p>
                  </text:list-item>
                </text:list>
              </text:list-item>
              <text:list-item>
                <text:p xml:id="id8" text:id="id8">Web-frontend in Ruby on Rails</text:p>
                <text:list>
                  <text:list-item>
                    <text:p xml:id="id9" text:id="id9">http://claburedb.fi.muni.cz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tored Information</text:p>
          </draw:text-box>
        </draw:frame>
        <draw:frame presentation:style-name="pr10" draw:layer="layout" svg:width="20.93cm" svg:height="11.049cm" svg:x="2.286cm" svg:y="4.039cm" presentation:class="outline">
          <draw:text-box>
            <text:list text:style-name="L2">
              <text:list-item>
                <text:p>A sub-database contains:</text:p>
                <text:list>
                  <text:list-item>
                    <text:p>General information</text:p>
                  </text:list-item>
                  <text:list-item>
                    <text:p>Categories, users, tools</text:p>
                  </text:list-item>
                  <text:list-item>
                    <text:p><text:span text:style-name="T4">Classified</text:span> reports</text:p>
                  </text:list-item>
                </text:list>
              </text:list-item>
              <text:list-item>
                <text:p xml:id="id10" text:id="id10">Categories link to Common Weakness Enumeration</text:p>
                <text:list>
                  <text:list-item>
                    <text:p xml:id="id11" text:id="id11">Well-known categories</text:p>
                  </text:list-item>
                  <text:list-item>
                    <text:p xml:id="id12" text:id="id12">Although some do not exist</text:p>
                  </text:list-item>
                </text:list>
              </text:list-item>
              <text:list-item>
                <text:p xml:id="id13" text:id="id13">Having real bugs only is insufficient</text:p>
                <text:list>
                  <text:list-item>
                    <text:p xml:id="id14" text:id="id14">For large pro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Data</text:p>
          </draw:text-box>
        </draw:frame>
        <draw:frame presentation:style-name="pr10" draw:layer="layout" svg:width="20.93cm" svg:height="11.049cm" svg:x="2.286cm" svg:y="4.039cm" presentation:class="outline">
          <draw:text-box>
            <text:list text:style-name="L2">
              <text:list-item>
                <text:p>3 projects</text:p>
                <text:list>
                  <text:list-item>
                    <text:p>Linux kernel 2.6.28</text:p>
                    <text:list>
                      <text:list-item>
                        <text:p>850 reports in 11 categories from 5 tools</text:p>
                      </text:list-item>
                    </text:list>
                  </text:list-item>
                  <text:list-item>
                    <text:p>SV-COMP 2012 and 2013</text:p>
                    <text:list>
                      <text:list-item>
                        <text:p>286 and 2337 reports, respectivelly</text:p>
                      </text:list-item>
                    </text:list>
                  </text:list-item>
                </text:list>
              </text:list-item>
              <text:list-item>
                <text:p xml:id="id15" text:id="id15">Data sources</text:p>
                <text:list>
                  <text:list-item>
                    <text:p xml:id="id16" text:id="id16">Clang, Stanse, one commercial tool, web, …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eak" presentation:presentation-page-layout-name="AL2T1">
        <office:forms form:automatic-focus="false" form:apply-design-mode="false"/>
        <draw:frame presentation:style-name="pr11" draw:text-style-name="P7" draw:layer="layout" svg:width="20.884cm" svg:height="3.18cm" svg:x="2.286cm" svg:y="7.62cm" presentation:class="title">
          <draw:text-box>
            <text:p text:style-name="P6"><text:span text:style-name="T8">Demonstration</text:span></text:p>
          </draw:text-box>
        </draw:frame>
        <draw:frame presentation:style-name="pr12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Part 1: Web Front-end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Read-only for the time being</text:p>
              </text:list-item>
              <text:list-item>
                <text:p>Insertion support is work in progres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>
          <draw:text-box>
            <text:p>Part 2: Local Database Manipulation</text:p>
          </draw:text-box>
        </draw:frame>
        <draw:frame presentation:style-name="pr10" draw:layer="layout" svg:width="20.93cm" svg:height="11.049cm" svg:x="2.286cm" svg:y="4.039cm" presentation:class="outline" presentation:user-transformed="true">
          <draw:text-box>
            <text:list text:style-name="L2">
              <text:list-item>
                <text:p>Download a snapshot from the web front-end</text:p>
              </text:list-item>
              <text:list-item>
                <text:p>Obtain results from an analysis tool</text:p>
              </text:list-item>
              <text:list-item>
                <text:p>Compare the results with the databa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labureDB: Classified Bug-Reports Database</text:p>
                <text:list>
                  <text:list-item>
                    <text:p>Benchmark for analysis tools</text:p>
                  </text:list-item>
                  <text:list-item>
                    <text:p>http://claburedb.fi.muni.cz</text:p>
                  </text:list-item>
                </text:list>
              </text:list-item>
              <text:list-item>
                <text:p xml:id="id17" text:id="id17">Future work</text:p>
                <text:list>
                  <text:list-item>
                    <text:p xml:id="id18" text:id="id18">Add more data</text:p>
                  </text:list-item>
                  <text:list-item>
                    <text:p xml:id="id19" text:id="id19">Add support for insertion to the web front-e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all_20_to_20_Action" presentation:presentation-page-layout-name="AL3T19">
        <draw:custom-shape draw:name="TextBox 1" draw:style-name="gr2" draw:text-style-name="P9" draw:layer="layout" svg:width="18.188cm" svg:height="4.502cm" svg:x="4.386cm" svg:y="3.616cm">
          <text:p text:style-name="P8"><text:span text:style-name="T9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53cm" svg:height="1.396cm" svg:x="3.35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68cm" svg:height="1.396cm" svg:x="15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32cm" svg:height="1.396cm" svg:x="3.46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102cm" svg:height="1.396cm" svg:x="15.853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0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1-21T13:34:55</dc:date>
    <meta:editing-duration>P5DT12H3M52S</meta:editing-duration>
    <meta:editing-cycles>198</meta:editing-cycles>
    <meta:generator>LibreOffice/3.6$Linux_X86_64 LibreOffice_project/360m1$Build-304</meta:generator>
    <dc:title>SUSE Template v17: 8/12/11</dc:title>
    <meta:print-date>2012-10-27T00:28:51</meta:print-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