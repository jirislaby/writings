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No-Logo_20_Content-outline1">
      <style:graphic-properties fo:min-height="10.799cm" fo:min-width="20.43cm"/>
    </style:style>
    <style:style style:name="pr11" style:family="presentation" style:parent-style-name="Break-title">
      <style:graphic-properties draw:auto-grow-height="true" fo:min-height="3.18cm" fo:min-width="20.43cm"/>
    </style:style>
    <style:style style:name="pr12" style:family="presentation" style:parent-style-name="Break-outline1">
      <style:graphic-properties fo:min-height="10.799cm" fo:min-width="20.43cm"/>
    </style:style>
    <style:style style:name="pr13" style:family="presentation" style:parent-style-name="Break-notes">
      <style:graphic-properties draw:fill-color="#ffffff" draw:auto-grow-height="true" fo:min-height="12.572cm" fo:min-width="16.771cm"/>
    </style:style>
    <style:style style:name="pr14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32pt" style:font-size-asian="32pt" style:font-size-complex="32pt"/>
    </style:style>
    <style:style style:name="P8" style:family="paragraph">
      <style:paragraph-properties fo:margin-top="0cm" fo:margin-bottom="0cm" fo:line-height="93%" fo:text-align="start"/>
    </style:style>
    <style:style style:name="P9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2.623cm" svg:x="2.286cm" svg:y="8.198cm" presentation:class="title" presentation:user-transformed="true">
          <draw:text-box>
            <text:p text:style-name="P1"><text:span text:style-name="T1">ClabureDB</text:span><text:span text:style-name="T2"><text:line-break/></text:span><text:span text:style-name="T3">Classified Bug-Reports Database</text:span></text:p>
          </draw:text-box>
        </draw:frame>
        <draw:frame presentation:style-name="pr2" draw:text-style-name="P3" draw:layer="layout" svg:width="10.566cm" svg:height="3.966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ček, Marek Trtík</text:span></text:p>
            <text:p text:style-name="P3"><text:span text:style-name="T6">Masaryk University</text:span></text:p>
            <text:p text:style-name="P3"><text:span text:style-name="T6">Brno, Czech Republic</text:span></text:p>
            <text:p text:style-name="P3"><text:span text:style-name="T6"/></text:p>
            <text:p text:style-name="P3"><text:span text:style-name="T6">VMCAI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115cm" svg:y="4.039cm" presentation:class="outline" presentation:user-transformed="true">
          <draw:text-box>
            <text:list text:style-name="L2">
              <text:list-item>
                <text:p><text:span text:style-name="T7">Introduction and Motivation</text:span></text:p>
              </text:list-item>
              <text:list-item>
                <text:p><text:span text:style-name="T7">Internals</text:span></text:p>
              </text:list-item>
              <text:list-item>
                <text:p><text:span text:style-name="T7">Demonstration</text:span></text:p>
                <text:list>
                  <text:list-item>
                    <text:p><text:span text:style-name="T7">Web Front-end</text:span></text:p>
                  </text:list-item>
                  <text:list-item>
                    <text:p><text:span text:style-name="T7">Database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39cm" presentation:class="title" presentation:user-transformed="true">
          <draw:text-box>
            <text:p>Motiva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tic analysis tool</text:p>
                <text:list>
                  <text:list-item>
                    <text:p>Run on a software</text:p>
                  </text:list-item>
                  <text:list-item>
                    <text:p>Output: Reports – how precise they are?</text:p>
                  </text:list-item>
                </text:list>
              </text:list-item>
              <text:list-item>
                <text:p>ClabureDB: a benchmark for static analyzers</text:p>
                <text:list>
                  <text:list-item>
                    <text:p>Compares the output to data in the database</text:p>
                  </text:list-item>
                  <text:list-item>
                    <text:p>Reports how many misses/hits there were</text:p>
                    <text:list>
                      <text:list-item>
                        <text:p>Correct answers</text:p>
                      </text:list-item>
                      <text:list-item>
                        <text:p>False-positives</text:p>
                      </text:list-item>
                      <text:list-item>
                        <text:p>False-negatives</text:p>
                      </text:list-item>
                      <text:list-item>
                        <text:p>No record in the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Architecture</text:p>
          </draw:text-box>
        </draw:frame>
        <draw:frame presentation:style-name="pr10" draw:layer="layout" svg:width="20.93cm" svg:height="11.049cm" svg:x="2.286cm" svg:y="4.039cm" presentation:class="outline">
          <draw:text-box>
            <text:list text:style-name="L2">
              <text:list-item>
                <text:p>SQLite v. 3 sub-databases</text:p>
                <text:list>
                  <text:list-item>
                    <text:p>For each project</text:p>
                    <text:list>
                      <text:list-item>
                        <text:p>Information</text:p>
                      </text:list-item>
                      <text:list-item>
                        <text:p>Categories, users, tools</text:p>
                      </text:list-item>
                      <text:list-item>
                        <text:p><text:span text:style-name="T4">Classified</text:span> reports</text:p>
                      </text:list-item>
                    </text:list>
                  </text:list-item>
                  <text:list-item>
                    <text:p>Can be downloaded and manipulated locally</text:p>
                  </text:list-item>
                </text:list>
              </text:list-item>
              <text:list-item>
                <text:p>Web-frontend in Ruby on Rails</text:p>
                <text:list>
                  <text:list-item>
                    <text:p>http://claburedb.fi.muni.c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eak" presentation:presentation-page-layout-name="AL2T1">
        <office:forms form:automatic-focus="false" form:apply-design-mode="false"/>
        <draw:frame presentation:style-name="pr11" draw:text-style-name="P7" draw:layer="layout" svg:width="20.884cm" svg:height="3.18cm" svg:x="2.286cm" svg:y="7.62cm" presentation:class="title">
          <draw:text-box>
            <text:p text:style-name="P6"><text:span text:style-name="T8">Demonstration</text:span></text:p>
          </draw:text-box>
        </draw:frame>
        <draw:frame presentation:style-name="pr12" draw:layer="layout" svg:width="13.259cm" svg:height="11.049cm" svg:x="0cm" svg:y="19.74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Part 1: Web Front-end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3 projects</text:p>
                <text:list>
                  <text:list-item>
                    <text:p>Linux kernel 2.6.28</text:p>
                    <text:list>
                      <text:list-item>
                        <text:p>850 reports in 11 categories from 5 tools</text:p>
                      </text:list-item>
                    </text:list>
                  </text:list-item>
                  <text:list-item>
                    <text:p>SV-COMP 2012 and 2013</text:p>
                    <text:list>
                      <text:list-item>
                        <text:p>286 and XXX reports</text:p>
                      </text:list-item>
                    </text:list>
                  </text:list-item>
                </text:list>
              </text:list-item>
              <text:list-item>
                <text:p>Read-only for the time being</text:p>
                <text:list>
                  <text:list-item>
                    <text:p>Inserting is work in progr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art 2: Local Database Manipulation</text:p>
          </draw:text-box>
        </draw:frame>
        <draw:frame presentation:style-name="pr10" draw:layer="layout" svg:width="20.93cm" svg:height="11.049cm" svg:x="2.286cm" svg:y="4.039cm" presentation:class="outline" presentation:user-transformed="true">
          <draw:text-box>
            <text:list text:style-name="L2">
              <text:list-item>
                <text:p>Download a snapshot from the Web Front-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ClabureDB: Classified Bug-Reports Database</text:p>
                <text:list>
                  <text:list-item>
                    <text:p xml:id="id1" text:id="id1">http://claburedb.fi.muni.cz</text:p>
                  </text:list-item>
                </text:list>
              </text:list-item>
              <text:list-item>
                <text:p xml:id="id2" text:id="id2">Future work</text:p>
                <text:list>
                  <text:list-item>
                    <text:p>Add more data</text:p>
                  </text:list-item>
                  <text:list-item>
                    <text:p>Add support for insertion to web front-e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all_20_to_20_Action" presentation:presentation-page-layout-name="AL3T19">
        <office:forms form:automatic-focus="false" form:apply-design-mode="false"/>
        <draw:custom-shape draw:name="TextBox 1" draw:style-name="gr2" draw:text-style-name="P9" draw:layer="layout" svg:width="18.188cm" svg:height="4.502cm" svg:x="4.386cm" svg:y="3.616cm">
          <text:p text:style-name="P8"><text:span text:style-name="T9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09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01-17T12:25:47</dc:date>
    <meta:editing-duration>P2DT12H12M55S</meta:editing-duration>
    <meta:editing-cycles>188</meta:editing-cycles>
    <meta:generator>LibreOffice/3.6$Linux_X86_64 LibreOffice_project/360m1$Build-304</meta:generator>
    <dc:title>SUSE Template v17: 8/12/11</dc:title>
    <meta:print-date>2012-10-27T00:28:51</meta:print-date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