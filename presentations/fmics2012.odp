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29e1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e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189cm" fo:min-width="1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7cm" fo:min-width="0cm"/>
    </style:style>
    <style:style style:name="gr8" style:family="graphic" style:parent-style-name="standard">
      <style:graphic-properties draw:stroke="none" draw:fill="solid" draw:fill-color="#000000" draw:auto-grow-width="false" fo:min-height="3.84cm" fo:min-width="5.074cm"/>
    </style:style>
    <style:style style:name="gr9" style:family="graphic" style:parent-style-name="standard">
      <style:graphic-properties draw:stroke="none" draw:fill="none" fo:min-height="0.492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1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1cm" fo:min-width="1.568cm"/>
    </style:style>
    <style:style style:name="gr12" style:family="graphic" style:parent-style-name="standard">
      <style:graphic-properties draw:stroke="none" draw:fill="solid" draw:fill-color="#000000" fo:min-height="2.539cm" fo:min-width="7.1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color="#ff0000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svg:stroke-color="#ff0000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draw:fill="solid" draw:fill-color="#000000" fo:min-height="8.103cm" fo:min-width="11.773cm"/>
    </style:style>
    <style:style style:name="gr18" style:family="graphic" style:parent-style-name="standard">
      <style:graphic-properties draw:stroke="none" draw:fill="solid" draw:fill-color="#000000" fo:min-height="8.911cm" fo:min-width="12.826cm"/>
    </style:style>
    <style:style style:name="gr19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Break-title">
      <style:graphic-properties draw:auto-grow-height="true" fo:min-height="3.18cm" fo:min-width="20.43cm"/>
    </style:style>
    <style:style style:name="pr11" style:family="presentation" style:parent-style-name="Break-outline1">
      <style:graphic-properties fo:min-height="10.799cm" fo:min-width="20.43cm"/>
    </style:style>
    <style:style style:name="pr12" style:family="presentation" style:parent-style-name="Break-notes">
      <style:graphic-properties draw:fill-color="#ffffff" draw:auto-grow-height="true" fo:min-height="12.572cm" fo:min-width="16.771cm"/>
    </style:style>
    <style:style style:name="pr13" style:family="presentation" style:parent-style-name="Logo_20_Content-title">
      <style:graphic-properties fo:min-height="2.743cm" fo:min-width="20.43cm"/>
    </style:style>
    <style:style style:name="pr14" style:family="presentation" style:parent-style-name="Logo_20_Content-outline1">
      <style:graphic-properties fo:min-height="12.323cm" fo:min-width="20.43cm"/>
    </style:style>
    <style:style style:name="pr15" style:family="presentation" style:parent-style-name="Logo_20_Content-notes">
      <style:graphic-properties draw:fill-color="#ffffff" fo:min-height="12.572cm" fo:min-width="16.771cm"/>
    </style:style>
    <style:style style:name="pr16" style:family="presentation" style:parent-style-name="No-Logo_20_Content-outline1">
      <style:graphic-properties fo:min-height="10.799cm" fo:min-width="20.43cm"/>
    </style:style>
    <style:style style:name="pr17" style:family="presentation" style:parent-style-name="Call_20_to_20_Action-notes">
      <style:graphic-properties draw:fill-color="#ffffff" draw:auto-grow-height="true" fo:min-height="12.572cm" fo:min-width="16.771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2.709cm" style:use-optimal-column-width="false"/>
    </style:style>
    <style:style style:name="co3" style:family="table-column">
      <style:table-column-properties style:column-width="2.708cm" style:use-optimal-column-width="false"/>
    </style:style>
    <style:style style:name="co4" style:family="table-column">
      <style:table-column-properties style:column-width="2.316cm" style:use-optimal-column-width="false"/>
    </style:style>
    <style:style style:name="co5" style:family="table-column">
      <style:table-column-properties style:column-width="2.315cm" style:use-optimal-column-width="false"/>
    </style:style>
    <style:style style:name="co6" style:family="table-column">
      <style:table-column-properties style:column-width="4.675cm" style:use-optimal-column-width="false"/>
    </style:style>
    <style:style style:name="co7" style:family="table-column">
      <style:table-column-properties style:column-width="2.762cm" style:use-optimal-column-width="false"/>
    </style:style>
    <style:style style:name="co8" style:family="table-column">
      <style:table-column-properties style:column-width="2.76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end"/>
    </style:style>
    <style:style style:name="ce7" style:family="table-cell">
      <style:graphic-properties style:repeat="repeat"/>
      <style:paragraph-properties fo:text-align="end"/>
      <style:text-properties fo:color="#e00000"/>
    </style:style>
    <style:style style:name="ce8" style:family="table-cell">
      <style:graphic-properties style:repeat="repeat"/>
      <style:text-properties fo:font-weight="bold" style:font-weight-asian="bold" style:font-weight-complex="bold"/>
    </style:style>
    <style:style style:name="ce9" style:family="table-cell">
      <style:graphic-properties style:repeat="repeat" draw:textarea-vertical-align="middle"/>
      <style:text-properties fo:font-family="Courier" style:font-family-generic="modern" style:font-pitch="fixed" fo:font-size="13pt" fo:font-weight="bold" style:font-size-asian="13pt" style:font-weight-asian="bold" style:font-size-complex="13pt" style:font-weight-complex="bold"/>
    </style:style>
    <style:style style:name="ce10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text-properties fo:font-size="24pt" fo:language="en" fo:country="GB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32pt" style:font-size-asian="32pt" style:font-size-complex="32pt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19" style:family="paragraph">
      <style:text-properties fo:color="#333333" fo:font-size="14pt" style:font-size-asian="14pt" style:font-size-complex="14pt"/>
    </style:style>
    <style:style style:name="P20" style:family="paragraph">
      <style:paragraph-properties fo:margin-top="0cm" fo:margin-bottom="0cm" fo:line-height="93%" fo:text-align="start"/>
    </style:style>
    <style:style style:name="P21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24pt" fo:language="en" fo:country="GB" style:font-size-asian="32pt" style:font-size-complex="3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2" style:family="text"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" style:family="text">
      <style:text-properties fo:color="#00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fo:color="#ff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5" style:family="text">
      <style:text-properties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6" style:family="text">
      <style:text-properties fo:color="#ffffff"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7" style:family="text">
      <style:text-properties fo:color="#00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8" style:family="text"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9" style:family="text">
      <style:text-properties fo:color="#ffff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0" style:family="text">
      <style:text-properties fo:color="#ff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1" style:family="text">
      <style:text-properties fo:color="#ff3366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2" style:family="text">
      <style:text-properties fo:color="#4c4c4c" fo:font-size="32pt" style:font-size-asian="32pt" style:font-size-complex="32pt"/>
    </style:style>
    <style:style style:name="T23" style:family="text">
      <style:text-properties fo:color="#ff0000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00ff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6" style:family="text">
      <style:text-properties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7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8" style:family="text">
      <style:text-properties fo:color="#ff3366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9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0" style:family="text">
      <style:text-properties fo:color="#000000" style:text-line-through-style="none" fo:font-family="'Courier New'" style:font-family-generic="modern" style:font-pitch="fixed" fo:font-size="18pt" fo:text-shadow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1" style:family="text">
      <style:text-properties fo:color="#ffff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2" style:family="text">
      <style:text-properties fo:color="#ff3366" style:text-line-through-style="none" fo:font-family="'Courier New'" style:font-family-generic="modern" style:font-pitch="fixed" fo:font-size="18pt" fo:text-shadow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3" style:family="text">
      <style:text-properties style:text-line-through-style="solid" style:text-line-through-width="bold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4" style:family="text">
      <style:text-properties fo:color="#ffffff" style:text-line-through-style="solid" style:text-line-through-width="bold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5" style:family="text">
      <style:text-properties fo:color="#3c3c41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18pt" fo:font-weight="bold" style:font-weight-asian="bold" style:font-weight-complex="bold"/>
    </style:style>
    <style:style style:name="T37" style:family="text">
      <style:text-properties fo:font-size="18pt"/>
    </style:style>
    <style:style style:name="T38" style:family="text">
      <style:text-properties style:text-position="super 58%" fo:font-size="18pt" style:font-size-asian="18pt" style:font-size-complex="18pt"/>
    </style:style>
    <style:style style:name="T39" style:family="text">
      <style:text-properties fo:color="#e00000"/>
    </style:style>
    <style:style style:name="T40" style:family="text">
      <style:text-properties fo:color="#333333" fo:font-size="14pt" style:font-size-asian="14pt" style:font-size-complex="14pt"/>
    </style:style>
    <style:style style:name="T41" style:family="text">
      <style:text-properties fo:color="#ff3366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2" style:family="text">
      <style:text-properties fo:color="#ffffff" style:text-line-through-style="none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3" style:family="text">
      <style:text-properties fo:color="#ff3366"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4" style:family="text">
      <style:text-properties fo:font-family="Courier" style:font-family-generic="modern" style:font-pitch="fixed" fo:font-size="13pt" fo:font-weight="bold" style:font-size-asian="13pt" style:font-weight-asian="bold" style:font-size-complex="13pt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ff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7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number text:level="1" style:num-suffix=")" style:num-format="1">
        <style:list-level-properties text:space-before="0.73cm" text:min-label-width="0.47cm"/>
        <style:text-properties fo:color="#454c51" fo:font-size="100%"/>
      </text:list-level-style-number>
      <text:list-level-style-number text:level="2" style:num-suffix=")" style:num-format="1">
        <style:list-level-properties text:space-before="1.905cm" text:min-label-width="0.483cm"/>
        <style:text-properties fo:color="#454c51" fo:font-size="100%"/>
      </text:list-level-style-number>
      <text:list-level-style-number text:level="3" style:num-suffix=")" style:num-format="1">
        <style:list-level-properties text:space-before="3.13cm" text:min-label-width="0.47cm"/>
        <style:text-properties fo:color="#454c51" fo:font-size="100%"/>
      </text:list-level-style-number>
      <text:list-level-style-number text:level="4" style:num-suffix=")" style:num-format="1">
        <style:list-level-properties text:space-before="4.33cm" text:min-label-width="0.47cm"/>
        <style:text-properties fo:color="#454c51" fo:font-size="100%"/>
      </text:list-level-style-number>
      <text:list-level-style-number text:level="5" style:num-suffix=")" style:num-format="1">
        <style:list-level-properties text:space-before="5.498cm" text:min-label-width="0.483cm"/>
        <style:text-properties fo:color="#454c51" fo:font-size="100%"/>
      </text:list-level-style-number>
      <text:list-level-style-number text:level="6" style:num-suffix=")" style:num-format="1">
        <style:list-level-properties text:space-before="6.706cm" text:min-label-width="0.483cm"/>
        <style:text-properties fo:color="#454c51" fo:font-size="100%"/>
      </text:list-level-style-number>
      <text:list-level-style-number text:level="7" style:num-suffix=")" style:num-format="1">
        <style:list-level-properties text:space-before="7.899cm" text:min-label-width="0.483cm"/>
        <style:text-properties fo:color="#454c51" fo:font-size="100%"/>
      </text:list-level-style-number>
      <text:list-level-style-number text:level="8" style:num-suffix=")" style:num-format="1">
        <style:list-level-properties text:space-before="9.119cm" text:min-label-width="0.483cm"/>
        <style:text-properties fo:color="#454c51" fo:font-size="100%"/>
      </text:list-level-style-number>
      <text:list-level-style-number text:level="9" style:num-suffix=")" style:num-format="1">
        <style:list-level-properties text:space-before="10.312cm" text:min-label-width="0.483cm"/>
        <style:text-properties fo:color="#454c51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54c51" fo:font-size="100%"/>
      </text:list-level-style-number>
    </text:list-style>
    <text:list-style style:name="L4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3.938cm" svg:x="2.286cm" svg:y="6.883cm" presentation:class="title" presentation:user-transformed="true">
          <draw:text-box>
            <text:p text:style-name="P1"><text:span text:style-name="T1">Checking Properties Described by State Machines</text:span><text:span text:style-name="T2"><text:line-break/></text:span><text:span text:style-name="T3">On Synergy of Instrumentation, Slicing, and Symbolic Execution</text:span></text:p>
          </draw:text-box>
        </draw:frame>
        <draw:frame presentation:style-name="pr2" draw:text-style-name="P3" draw:layer="layout" svg:width="10.566cm" svg:height="3.193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ček, Marek Trtík</text:span></text:p>
            <text:p text:style-name="P3"><text:span text:style-name="T6">Masaryk University</text:span></text:p>
            <text:p text:style-name="P3"><text:span text:style-name="T6">Brno, Czech Republ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esentation Outline</text:p>
          </draw:text-box>
        </draw:frame>
        <draw:frame presentation:style-name="pr5" draw:text-style-name="P4" draw:layer="layout" svg:width="20.93cm" svg:height="12.573cm" svg:x="2.115cm" svg:y="4.039cm" presentation:class="outline" presentation:user-transformed="true">
          <draw:text-box>
            <text:list text:style-name="L2">
              <text:list-item>
                <text:p><text:span text:style-name="T7">Introduction</text:span></text:p>
                <text:list>
                  <text:list-item>
                    <text:p><text:span text:style-name="T7">Static analysis and false-positives</text:span></text:p>
                  </text:list-item>
                </text:list>
              </text:list-item>
              <text:list-item>
                <text:p><text:span text:style-name="T7">New approach to false-positive elimination</text:span></text:p>
              </text:list-item>
              <text:list-item>
                <text:p><text:span text:style-name="T7">Result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39cm" presentation:class="title" presentation:user-transformed="true">
          <draw:text-box>
            <text:p>Running Example: Locking Errors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Described by a finite state machine</text:p>
              </text:list-item>
              <text:list-item>
                <text:p>Syntactic constructs change states</text:p>
              </text:list-item>
            </text:list>
          </draw:text-box>
        </draw:frame>
        <draw:g>
          <draw:g>
            <draw:custom-shape draw:style-name="gr2" draw:text-style-name="P7" xml:id="id2" draw:id="id2" draw:layer="layout" svg:width="3.622cm" svg:height="1.469cm" svg:x="6.937cm" svg:y="9.668cm">
              <draw:glue-point draw:id="4" svg:x="5.024cm" svg:y="-2.45cm" draw:escape-direction="right"/>
              <draw:glue-point draw:id="5" svg:x="1.802cm" svg:y="0.306cm" draw:align="center"/>
              <text:p text:style-name="P6"><text:span text:style-name="T8">Unlock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xml:id="id1" draw:id="id1" draw:layer="layout" svg:width="3.622cm" svg:height="1.469cm" svg:x="14.841cm" svg:y="9.668cm">
              <draw:glue-point draw:id="4" svg:x="-4.958cm" svg:y="-2.328cm"/>
              <draw:glue-point draw:id="5" svg:x="-1.811cm" svg:y="0.332cm" draw:align="center" draw:escape-direction="left"/>
              <text:p text:style-name="P6">Locked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6" draw:layer="layout" draw:type="line" svg:x1="14.841cm" svg:y1="10.734cm" svg:x2="10.55cm" svg:y2="10.708cm" draw:start-shape="id1" draw:start-glue-point="5" draw:end-shape="id2" draw:end-glue-point="5" svg:d="m14841 10734-4291-26">
              <text:p/>
            </draw:connector>
            <draw:custom-shape draw:style-name="gr4" draw:text-style-name="P8" xml:id="id3" draw:id="id3" draw:layer="layout" svg:width="3.622cm" svg:height="1.469cm" svg:x="10.884cm" svg:y="12.563cm">
              <draw:glue-point draw:id="4" svg:x="5.024cm" svg:y="-2.45cm" draw:escape-direction="right"/>
              <draw:glue-point draw:id="5" svg:x="-1.821cm" svg:y="-0.347cm" draw:align="center"/>
              <text:p text:style-name="P6"><text:span text:style-name="T4">Err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6" draw:layer="layout" draw:type="line" svg:x1="10.559cm" svg:y1="10.043cm" svg:x2="14.857cm" svg:y2="10.061cm" draw:start-shape="id2" draw:start-glue-point="4" draw:end-shape="id1" draw:end-glue-point="4" svg:d="m10559 10043 4298 18">
              <text:p/>
            </draw:connector>
            <draw:frame draw:style-name="gr5" draw:text-style-name="P9" draw:layer="layout" svg:width="2.28cm" svg:height="0.818cm" svg:x="11.568cm" svg:y="9.228cm">
              <draw:text-box>
                <text:p><text:span text:style-name="T9">lock()</text:span></text:p>
              </draw:text-box>
            </draw:frame>
            <draw:frame draw:style-name="gr6" draw:text-style-name="P10" draw:layer="layout" svg:width="2.873cm" svg:height="0.818cm" svg:x="11.259cm" svg:y="10.811cm">
              <draw:text-box>
                <text:p><text:span text:style-name="T9">unlock()</text:span></text:p>
              </draw:text-box>
            </draw:frame>
            <draw:frame draw:style-name="gr6" draw:text-style-name="P10" draw:layer="layout" svg:width="2.873cm" svg:height="0.818cm" svg:x="7.123cm" svg:y="11.845cm">
              <draw:text-box>
                <text:p><text:span text:style-name="T9">unlock()</text:span></text:p>
              </draw:text-box>
            </draw:frame>
            <draw:frame draw:style-name="gr7" draw:text-style-name="P11" draw:layer="layout" svg:width="2.28cm" svg:height="2.007cm" svg:x="15.76cm" svg:y="11.56cm">
              <draw:text-box>
                <text:p text:style-name="P6"><text:span text:style-name="T9">lock()</text:span></text:p>
                <text:p text:style-name="P6"><text:span text:style-name="T9">or</text:span></text:p>
                <text:p text:style-name="P6"><text:span text:style-name="T9">return</text:span></text:p>
              </draw:text-box>
            </draw:frame>
            <draw:connector draw:style-name="gr3" draw:text-style-name="P6" draw:layer="layout" draw:type="line" svg:x1="16.652cm" svg:y1="11.137cm" svg:x2="14.506cm" svg:y2="12.938cm" draw:start-shape="id1" draw:start-glue-point="2" draw:end-shape="id3" draw:end-glue-point="4" svg:d="m16652 11137-2146 1801">
              <text:p/>
            </draw:connector>
            <draw:connector draw:style-name="gr3" draw:text-style-name="P6" draw:layer="layout" draw:type="line" svg:x1="8.748cm" svg:y1="11.137cm" svg:x2="10.884cm" svg:y2="12.95cm" draw:start-shape="id2" draw:start-glue-point="2" draw:end-shape="id3" draw:end-glue-point="5" svg:d="m8748 11137 2136 1813">
              <text:p/>
            </draw:connector>
          </draw:g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tatic Analysis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Cousot&amp;Cousot in 1970s</text:p>
                <text:p/>
                <text:p/>
                <text:p/>
                <text:p/>
                <text:p/>
              </text:list-item>
              <text:list-item>
                <text:p xml:id="id20" text:id="id20">Used in many tools: xgcc, Stanse…</text:p>
              </text:list-item>
              <text:list-item>
                <text:p xml:id="id21" text:id="id21">Pros: Configurable, Fast, Possibly proves program correctness</text:p>
              </text:list-item>
              <text:list-item>
                <text:p xml:id="id22" text:id="id22">Cons: False positives</text:p>
              </text:list-item>
            </text:list>
          </draw:text-box>
        </draw:frame>
        <draw:frame draw:style-name="gr8" draw:text-style-name="P13" draw:layer="layout" svg:width="8cm" svg:height="4.09cm" svg:x="15.22cm" svg:y="6.385cm">
          <draw:text-box>
            <text:p text:style-name="P12"><text:span text:style-name="T10">void</text:span><text:span text:style-name="T11"> </text:span><text:span text:style-name="T12">double_lock() {</text:span></text:p>
            <text:p text:style-name="P12"><text:span text:style-name="T11"><text:s text:c="2"/></text:span><text:span text:style-name="T12">lock();</text:span><text:span text:style-name="T13"> </text:span><text:span text:style-name="T14">// U → L</text:span></text:p>
            <text:p text:style-name="P12"><text:span text:style-name="T15"><text:s text:c="2"/></text:span><text:span text:style-name="T16">stuff();</text:span></text:p>
            <text:p text:style-name="P12"><text:span text:style-name="T15"><text:s text:c="2"/></text:span><text:span text:style-name="T16">more_stuff();</text:span></text:p>
            <text:p text:style-name="P12"><text:span text:style-name="T11"><text:s text:c="2"/></text:span><text:span text:style-name="T12">lock(); </text:span><text:span text:style-name="T14">// L → ERROR</text:span></text:p>
            <text:p text:style-name="P12"><text:span text:style-name="T12">}</text:span></text:p>
          </draw:text-box>
        </draw:frame>
        <draw:g>
          <draw:g>
            <draw:custom-shape draw:style-name="gr2" draw:text-style-name="P7" xml:id="id5" draw:id="id5" draw:layer="layout" svg:width="3.286cm" svg:height="1.333cm" svg:x="3.001cm" svg:y="6.63cm">
              <draw:glue-point draw:id="4" svg:x="5.024cm" svg:y="-2.45cm" draw:escape-direction="right"/>
              <draw:glue-point draw:id="5" svg:x="1.802cm" svg:y="0.306cm" draw:align="center"/>
              <text:p text:style-name="P6"><text:span text:style-name="T8">Unlock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xml:id="id4" draw:id="id4" draw:layer="layout" svg:width="3.286cm" svg:height="1.333cm" svg:x="10.171cm" svg:y="6.63cm">
              <draw:glue-point draw:id="4" svg:x="-4.958cm" svg:y="-2.328cm"/>
              <draw:glue-point draw:id="5" svg:x="-1.811cm" svg:y="0.332cm" draw:align="center" draw:escape-direction="left"/>
              <text:p text:style-name="P6">Locked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6" draw:layer="layout" draw:type="line" svg:x1="10.171cm" svg:y1="7.628cm" svg:x2="6.287cm" svg:y2="7.602cm" draw:start-shape="id4" draw:start-glue-point="5" draw:end-shape="id5" draw:end-glue-point="5" svg:d="m10171 7628-3884-26">
              <text:p/>
            </draw:connector>
            <draw:custom-shape draw:style-name="gr4" draw:text-style-name="P8" xml:id="id6" draw:id="id6" draw:layer="layout" svg:width="3.285cm" svg:height="1.333cm" svg:x="6.582cm" svg:y="9.256cm">
              <draw:glue-point draw:id="4" svg:x="5.024cm" svg:y="-2.45cm" draw:escape-direction="right"/>
              <draw:glue-point draw:id="5" svg:x="-1.821cm" svg:y="-0.347cm" draw:align="center"/>
              <text:p text:style-name="P6"><text:span text:style-name="T4">Err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6" draw:layer="layout" draw:type="line" svg:x1="6.287cm" svg:y1="6.97cm" svg:x2="10.185cm" svg:y2="6.986cm" draw:start-shape="id5" draw:start-glue-point="4" draw:end-shape="id4" draw:end-glue-point="4" svg:d="m6287 6970 3898 16">
              <text:p/>
            </draw:connector>
            <draw:frame draw:style-name="gr9" draw:text-style-name="P9" draw:layer="layout" svg:width="2.28cm" svg:height="0.818cm" svg:x="7.096cm" svg:y="6.231cm">
              <draw:text-box>
                <text:p><text:span text:style-name="T9">lock()</text:span></text:p>
              </draw:text-box>
            </draw:frame>
            <draw:frame draw:style-name="gr10" draw:text-style-name="P10" draw:layer="layout" svg:width="2.873cm" svg:height="0.818cm" svg:x="6.922cm" svg:y="7.667cm">
              <draw:text-box>
                <text:p><text:span text:style-name="T9">unlock()</text:span></text:p>
              </draw:text-box>
            </draw:frame>
            <draw:frame draw:style-name="gr10" draw:text-style-name="P10" draw:layer="layout" svg:width="2.873cm" svg:height="0.818cm" svg:x="3.17cm" svg:y="8.605cm">
              <draw:text-box>
                <text:p><text:span text:style-name="T9">unlock()</text:span></text:p>
              </draw:text-box>
            </draw:frame>
            <draw:frame draw:style-name="gr11" draw:text-style-name="P11" draw:layer="layout" svg:width="2.28cm" svg:height="1.952cm" svg:x="11.005cm" svg:y="8.346cm">
              <draw:text-box>
                <text:p text:style-name="P6"><text:span text:style-name="T9">lock()</text:span></text:p>
                <text:p text:style-name="P6"><text:span text:style-name="T9">or</text:span></text:p>
                <text:p text:style-name="P6"><text:span text:style-name="T9">return</text:span></text:p>
              </draw:text-box>
            </draw:frame>
            <draw:connector draw:style-name="gr3" draw:text-style-name="P6" draw:layer="layout" draw:type="line" svg:x1="11.814cm" svg:y1="7.963cm" svg:x2="9.867cm" svg:y2="9.596cm" draw:start-shape="id4" draw:start-glue-point="2" draw:end-shape="id6" draw:end-glue-point="4" svg:d="m11814 7963-1947 1633">
              <text:p/>
            </draw:connector>
            <draw:connector draw:style-name="gr3" draw:text-style-name="P6" draw:layer="layout" draw:type="line" svg:x1="4.644cm" svg:y1="7.963cm" svg:x2="6.582cm" svg:y2="9.575cm" draw:start-shape="id5" draw:start-glue-point="2" draw:end-shape="id6" draw:end-glue-point="5" svg:d="m4644 7963 1938 1612">
              <text:p/>
            </draw:connector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ample of a False-positive</text:p>
          </draw:text-box>
        </draw:frame>
        <draw:frame draw:style-name="gr12" draw:text-style-name="P14" draw:layer="layout" svg:width="18.199cm" svg:height="6.383cm" svg:x="3.664cm" svg:y="5.376cm">
          <draw:text-box>
            <text:p text:style-name="P12"><text:span text:style-name="T17">void</text:span><text:span text:style-name="T18"> </text:span><text:span text:style-name="T19">fun(</text:span><text:span text:style-name="T17">int</text:span><text:span text:style-name="T18"> </text:span><text:span text:style-name="T19">x) {</text:span><text:span text:style-name="T18"> <text:s text:c="2"/></text:span><text:span text:style-name="T20">// AUTOMATON STATE</text:span></text:p>
            <text:p text:style-name="P12"><text:span text:style-name="T18"><text:s text:c="2"/></text:span><text:span text:style-name="T21">if</text:span><text:span text:style-name="T18"> </text:span><text:span text:style-name="T19">(x)</text:span><text:span text:style-name="T18"> <text:s text:c="11"/></text:span><text:span text:style-name="T20">// U</text:span></text:p>
            <text:p text:style-name="P12"><text:span text:style-name="T18"><text:s text:c="4"/></text:span><text:span text:style-name="T19">lock(myLock);</text:span><text:span text:style-name="T18"> <text:s text:c="2"/></text:span><text:span text:style-name="T20">// L</text:span></text:p>
            <text:p text:style-name="P12"><text:span text:style-name="T18"><text:s text:c="2"/></text:span><text:span text:style-name="T19">stuff();</text:span><text:span text:style-name="T18"> <text:s text:c="9"/></text:span><text:span text:style-name="T20">// U or L</text:span></text:p>
            <text:p text:style-name="P12"><text:span text:style-name="T18"><text:s text:c="2"/></text:span><text:span text:style-name="T21">if</text:span><text:span text:style-name="T18"> </text:span><text:span text:style-name="T19">(x)</text:span><text:span text:style-name="T18"> <text:s text:c="11"/></text:span><text:span text:style-name="T20">// U or L</text:span></text:p>
            <text:p text:style-name="P12"><text:span text:style-name="T18"><text:s text:c="4"/></text:span><text:span text:style-name="T19">unlock(myLock);</text:span><text:span text:style-name="T18"> </text:span><text:span text:style-name="T20">// ERROR or U</text:span></text:p>
            <text:p text:style-name="P12"><text:span text:style-name="T19">}</text:span></text:p>
          </draw:text-box>
        </draw:frame>
        <draw:frame presentation:style-name="pr7" draw:text-style-name="P15" draw:layer="layout" svg:width="20.93cm" svg:height="2.743cm" svg:x="2.235cm" svg:y="13.701cm" presentation:class="title" presentation:user-transformed="true">
          <draw:text-box>
            <text:p xml:id="id23" text:id="id23" text:style-name="P6"><text:span text:style-name="T22">Stanse reports more than</text:span><text:span text:style-name="T22"><text:line-break/></text:span><text:span text:style-name="T23">60% of false-positiv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eak" presentation:presentation-page-layout-name="AL2T1">
        <office:forms form:automatic-focus="false" form:apply-design-mode="false"/>
        <draw:frame presentation:style-name="pr10" draw:text-style-name="P17" draw:layer="layout" svg:width="20.884cm" svg:height="3.18cm" svg:x="2.286cm" svg:y="7.62cm" presentation:class="title">
          <draw:text-box>
            <text:p text:style-name="P16"><text:span text:style-name="T24">New Approach to</text:span><text:span text:style-name="T24"><text:line-break/></text:span><text:span text:style-name="T24">False-positive Elimination</text:span></text:p>
          </draw:text-box>
        </draw:frame>
        <draw:frame presentation:style-name="pr11" draw:layer="layout" svg:width="13.259cm" svg:height="11.049cm" svg:x="0cm" svg:y="19.74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Overview of the Approach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Performed on the output of static analysis</text:p>
              </text:list-item>
              <text:list-item>
                <text:p xml:id="id24" text:id="id24">Designed for errors described by finite state machines</text:p>
              </text:list-item>
              <text:list-item>
                <text:p xml:id="id25" text:id="id25">Steps</text:p>
              </text:list-item>
            </text:list>
            <text:list text:style-name="L3">
              <text:list-item>
                <text:list>
                  <text:list-item>
                    <text:p xml:id="id26" text:id="id26"><text:s/>Instrumentation</text:p>
                  </text:list-item>
                  <text:list-item>
                    <text:p xml:id="id27" text:id="id27"><text:s/>Slicing</text:p>
                  </text:list-item>
                  <text:list-item>
                    <text:p xml:id="id28" text:id="id28"><text:s/>Symbolic execu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draw:style-name="gr12" draw:text-style-name="P18" xml:id="id29" draw:id="id29" draw:layer="layout" svg:width="16.885cm" svg:height="8.171cm" svg:x="4.315cm" svg:y="8.555cm">
          <draw:text-box>
            <text:p text:style-name="P12"><text:span text:style-name="T25">void</text:span><text:span text:style-name="T26"> </text:span><text:span text:style-name="T27">fun(</text:span><text:span text:style-name="T25">int</text:span><text:span text:style-name="T26"> </text:span><text:span text:style-name="T27">x) {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9"><text:s text:c="4"/></text:span><text:span text:style-name="T29">smFire(smGetMachine(myLock), smLock);</text:span></text:p>
            <text:p text:style-name="P12"><text:span text:style-name="T26"><text:s text:c="4"/></text:span><text:span text:style-name="T27">lock(myLock);</text:span></text:p>
            <text:p text:style-name="P12"><text:span text:style-name="T27"><text:s text:c="2"/></text:span><text:span text:style-name="T27">}</text:span></text:p>
            <text:p text:style-name="P12"><text:span text:style-name="T26"><text:s text:c="2"/></text:span><text:span text:style-name="T27">stuff();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7"><text:s text:c="4"/></text:span><text:span text:style-name="T30">smFire(smGetMachine(myLock), smUnlock);</text:span></text:p>
            <text:p text:style-name="P12"><text:span text:style-name="T26"><text:s text:c="4"/></text:span><text:span text:style-name="T27">unlock(myLock);</text:span></text:p>
            <text:p text:style-name="P12"><text:span text:style-name="T27"><text:s text:c="2"/></text:span><text:span text:style-name="T27">}</text:span></text:p>
            <text:p text:style-name="P12"><text:span text:style-name="T27">}</text:span></text:p>
          </draw:text-box>
        </draw:frame>
        <draw:frame draw:style-name="gr12" draw:text-style-name="P18" xml:id="id30" draw:id="id30" draw:layer="layout" svg:width="16.885cm" svg:height="8.171cm" svg:x="4.315cm" svg:y="8.554cm">
          <draw:text-box>
            <text:p text:style-name="P12"><text:span text:style-name="T25">void</text:span><text:span text:style-name="T26"> </text:span><text:span text:style-name="T27">fun(</text:span><text:span text:style-name="T25">int</text:span><text:span text:style-name="T26"> </text:span><text:span text:style-name="T27">x) {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31"><text:s text:c="4"/></text:span><text:span text:style-name="T28">smFire(smGetMachine(myLock), smLock);</text:span></text:p>
            <text:p text:style-name="P12"><text:span text:style-name="T26"><text:s text:c="4"/></text:span><text:span text:style-name="T27">lock(myLock);</text:span></text:p>
            <text:p text:style-name="P12"><text:span text:style-name="T27"><text:s text:c="2"/></text:span><text:span text:style-name="T27">}</text:span></text:p>
            <text:p text:style-name="P12"><text:span text:style-name="T26"><text:s text:c="2"/></text:span><text:span text:style-name="T27">stuff();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7"><text:s text:c="4"/></text:span><text:span text:style-name="T32">smFire(smGetMachine(myLock), smUnlock);</text:span></text:p>
            <text:p text:style-name="P12"><text:span text:style-name="T26"><text:s text:c="4"/></text:span><text:span text:style-name="T27">unlock(myLock);</text:span></text:p>
            <text:p text:style-name="P12"><text:span text:style-name="T27"><text:s text:c="2"/></text:span><text:span text:style-name="T27">}</text:span></text:p>
            <text:p text:style-name="P12"><text:span text:style-name="T27">}</text:span></text:p>
          </draw:text-box>
        </draw:frame>
        <draw:frame presentation:style-name="pr7" draw:layer="layout" svg:width="20.93cm" svg:height="2.743cm" svg:x="2.286cm" svg:y="0.711cm" presentation:class="title" presentation:user-transformed="true">
          <draw:text-box>
            <text:p>Step 1: Instrumentat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State machines</text:p>
                <text:list>
                  <text:list-item>
                    <text:p>Transitions performed by the inserted code</text:p>
                  </text:list-item>
                  <text:list-item>
                    <text:p>Compiled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draw:style-name="gr12" draw:text-style-name="P18" draw:layer="layout" svg:width="17.266cm" svg:height="8.171cm" svg:x="4.067cm" svg:y="9.42cm">
          <draw:text-box>
            <text:p text:style-name="P12"><text:span text:style-name="T25">void</text:span><text:span text:style-name="T26"> </text:span><text:span text:style-name="T27">fun(</text:span><text:span text:style-name="T25">int</text:span><text:span text:style-name="T26"> </text:span><text:span text:style-name="T27">x) {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31"><text:s text:c="4"/></text:span><text:span text:style-name="T28">smFire(smGetMachine(myLock), smLock);</text:span></text:p>
            <text:p text:style-name="P12"><text:span text:style-name="T26"><text:s text:c="4"/></text:span><text:span text:style-name="T27">lock(myLock);</text:span></text:p>
            <text:p text:style-name="P12"><text:span text:style-name="T27"><text:s text:c="2"/></text:span><text:span text:style-name="T27">}</text:span></text:p>
            <text:p text:style-name="P12"><text:span text:style-name="T26"><text:s text:c="2"/></text:span><text:span text:style-name="T27">stuff();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7"><text:s text:c="5"/></text:span><text:span text:style-name="T32">smFire(smGetMachine(myLock), smUnlock);</text:span></text:p>
            <text:p text:style-name="P12"><text:span text:style-name="T26"><text:s text:c="5"/></text:span><text:span text:style-name="T27">unlock(myLock);</text:span></text:p>
            <text:p text:style-name="P12"><text:span text:style-name="T27"><text:s text:c="2"/></text:span><text:span text:style-name="T27">}</text:span></text:p>
            <text:p text:style-name="P12"><text:span text:style-name="T27">}</text:span></text:p>
          </draw:text-box>
        </draw:frame>
        <draw:frame draw:style-name="gr12" draw:text-style-name="P18" xml:id="id31" draw:id="id31" draw:layer="layout" svg:width="17.266cm" svg:height="8.171cm" svg:x="4.067cm" svg:y="9.421cm">
          <draw:text-box>
            <text:p text:style-name="P12"><text:span text:style-name="T25">void</text:span><text:span text:style-name="T26"> </text:span><text:span text:style-name="T27">fun(</text:span><text:span text:style-name="T25">int</text:span><text:span text:style-name="T26"> </text:span><text:span text:style-name="T27">x) {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31"><text:s text:c="4"/></text:span><text:span text:style-name="T28">smFire(smGetMachine(myLock), smLock);</text:span></text:p>
            <text:p text:style-name="P12"><text:span text:style-name="T26"><text:s text:c="4"/></text:span><text:span text:style-name="T27">lock(myLock);</text:span></text:p>
            <text:p text:style-name="P12"><text:span text:style-name="T27"><text:s text:c="2"/></text:span><text:span text:style-name="T27">}</text:span></text:p>
            <text:p text:style-name="P12"><text:span text:style-name="T33"><text:s text:c="2"/></text:span><text:span text:style-name="T34">stuff();</text:span></text:p>
            <text:p text:style-name="P12"><text:span text:style-name="T26"><text:s text:c="2"/></text:span><text:span text:style-name="T28">if</text:span><text:span text:style-name="T26"> </text:span><text:span text:style-name="T27">(x) {</text:span></text:p>
            <text:p text:style-name="P12"><text:span text:style-name="T27"><text:s text:c="5"/></text:span><text:span text:style-name="T32">smFire(smGetMachine(myLock), smUnlock);</text:span></text:p>
            <text:p text:style-name="P12"><text:span text:style-name="T26"><text:s text:c="5"/></text:span><text:span text:style-name="T27">unlock(myLock);</text:span></text:p>
            <text:p text:style-name="P12"><text:span text:style-name="T27"><text:s text:c="2"/></text:span><text:span text:style-name="T27">}</text:span></text:p>
            <text:p text:style-name="P12"><text:span text:style-name="T27">}</text:span></text:p>
          </draw:text-box>
        </draw:frame>
        <draw:frame presentation:style-name="pr7" draw:layer="layout" svg:width="20.93cm" svg:height="2.743cm" svg:x="2.286cm" svg:y="0.711cm" presentation:class="title">
          <draw:text-box>
            <text:p>Step 2: Slicing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Weiser in 1970s</text:p>
              </text:list-item>
              <text:list-item>
                <text:p>Removes irrelevant code</text:p>
              </text:list-item>
              <text:list-item>
                <text:p>The produced code behaves the same with respect to instrumented state machines (slicing criteria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ogo_20_Content" presentation:presentation-page-layout-name="AL2T1">
        <office:forms form:automatic-focus="false" form:apply-design-mode="false"/>
        <draw:frame presentation:style-name="pr13" draw:layer="layout" svg:width="20.93cm" svg:height="2.743cm" svg:x="2.286cm" svg:y="0.711cm" presentation:class="title" presentation:user-transformed="true">
          <draw:text-box>
            <text:p>Slicing Effectiveness<text:line-break/><text:span text:style-name="T35">Functions with locks in kernel 2.6.28</text:span></text:p>
          </draw:text-box>
        </draw:frame>
        <draw:frame presentation:style-name="pr14" draw:layer="layout" svg:width="20.93cm" svg:height="12.573cm" svg:x="2.36cm" svg:y="4.088cm" presentation:class="outline" presentation:user-transformed="true">
          <draw:text-box>
            <text:list text:style-name="L4">
              <text:list-item>
                <text:p>Computation time: 2h 2min</text:p>
              </text:list-item>
            </text:list>
          </draw:text-box>
        </draw:frame>
        <draw:frame draw:style-name="standard" draw:layer="layout" svg:width="17.649cm" svg:height="7.799cm" svg:x="3.877cm" svg:y="6.9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><text:span text:style-name="T36">Function Count</text:span></text:p>
              </table:table-cell>
              <table:table-cell table:number-columns-spanned="2">
                <text:p text:style-name="P6"><text:span text:style-name="T36">Before slicing</text:span></text:p>
              </table:table-cell>
              <table:covered-table-cell table:style-name="ce3"/>
              <table:table-cell table:number-columns-spanned="2">
                <text:p text:style-name="P6"><text:span text:style-name="T36">After slicing</text:span></text:p>
              </table:table-cell>
              <table:covered-table-cell table:style-name="ce3"/>
            </table:table-row>
            <table:table-row table:style-name="ro1" table:default-cell-style-name="ce3">
              <table:covered-table-cell table:style-name="ce4"/>
              <table:table-cell>
                <text:p text:style-name="P6">count</text:p>
              </table:table-cell>
              <table:table-cell>
                <text:p text:style-name="P6">%</text:p>
              </table:table-cell>
              <table:table-cell>
                <text:p text:style-name="P6">count</text:p>
              </table:table-cell>
              <table:table-cell>
                <text:p text:style-name="P6">%</text:p>
              </table:table-cell>
            </table:table-row>
            <table:table-row table:style-name="ro1" table:default-cell-style-name="ce6">
              <table:table-cell table:style-name="ce5">
                <text:p><text:span text:style-name="T37">With assembler</text:span></text:p>
              </table:table-cell>
              <table:table-cell>
                <text:p text:style-name="P16">477</text:p>
              </table:table-cell>
              <table:table-cell>
                <text:p text:style-name="P16">2,8</text:p>
              </table:table-cell>
              <table:table-cell>
                <text:p text:style-name="P16"><text:span text:style-name="T37">0</text:span><text:span text:style-name="T38">†</text:span></text:p>
              </table:table-cell>
              <table:table-cell>
                <text:p text:style-name="P16">0,0</text:p>
              </table:table-cell>
            </table:table-row>
            <table:table-row table:style-name="ro1" table:default-cell-style-name="ce6">
              <table:table-cell table:style-name="ce5">
                <text:p><text:span text:style-name="T37">With external call</text:span></text:p>
              </table:table-cell>
              <table:table-cell>
                <text:p text:style-name="P16">13760</text:p>
              </table:table-cell>
              <table:table-cell>
                <text:p text:style-name="P16">80,6</text:p>
              </table:table-cell>
              <table:table-cell>
                <text:p text:style-name="P16">6174</text:p>
              </table:table-cell>
              <table:table-cell>
                <text:p text:style-name="P16">36,2</text:p>
              </table:table-cell>
            </table:table-row>
            <table:table-row table:style-name="ro1" table:default-cell-style-name="ce6">
              <table:table-cell table:style-name="ce5">
                <text:p><text:span text:style-name="T37">With loop</text:span></text:p>
              </table:table-cell>
              <table:table-cell>
                <text:p text:style-name="P16">11243</text:p>
              </table:table-cell>
              <table:table-cell>
                <text:p text:style-name="P16">65,9</text:p>
              </table:table-cell>
              <table:table-cell>
                <text:p text:style-name="P16">6207</text:p>
              </table:table-cell>
              <table:table-cell>
                <text:p text:style-name="P16">36,4</text:p>
              </table:table-cell>
            </table:table-row>
            <table:table-row table:style-name="ro1" table:default-cell-style-name="ce6">
              <table:table-cell table:style-name="ce5">
                <text:p><text:span text:style-name="T37">No ASM or call</text:span></text:p>
              </table:table-cell>
              <table:table-cell>
                <text:p text:style-name="P16">3269</text:p>
              </table:table-cell>
              <table:table-cell table:style-name="ce7">
                <text:p text:style-name="P16"><text:span text:style-name="T39">19,2</text:span></text:p>
              </table:table-cell>
              <table:table-cell>
                <text:p text:style-name="P16">10882</text:p>
              </table:table-cell>
              <table:table-cell table:style-name="ce7">
                <text:p text:style-name="P16"><text:span text:style-name="T39">63,8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37">No ASM, call or loop</text:span></text:p>
              </table:table-cell>
              <table:table-cell>
                <text:p text:style-name="P16">1855</text:p>
              </table:table-cell>
              <table:table-cell table:style-name="ce7">
                <text:p text:style-name="P16"><text:span text:style-name="T39">10,9</text:span></text:p>
              </table:table-cell>
              <table:table-cell>
                <text:p text:style-name="P16">8655</text:p>
              </table:table-cell>
              <table:table-cell table:style-name="ce7">
                <text:p text:style-name="P16"><text:span text:style-name="T39">50,7</text:span></text:p>
              </table:table-cell>
            </table:table-row>
            <table:table-row table:style-name="ro1" table:default-cell-style-name="ce5">
              <table:table-cell>
                <text:p>Summary</text:p>
              </table:table-cell>
              <table:table-cell table:style-name="ce6" table:number-columns-spanned="4">
                <text:p text:style-name="P6">17069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9" draw:layer="layout" svg:width="5.692cm" svg:height="0.806cm" svg:x="1.055cm" svg:y="16.884cm">
          <draw:text-box>
            <text:p><text:span text:style-name="T40">† </text:span><text:span text:style-name="T40">Assembler is igno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tep 3: Symbolic Execution</text:p>
          </draw:text-box>
        </draw:frame>
        <draw:frame presentation:style-name="pr8" draw:layer="layout" svg:width="20.93cm" svg:height="12.573cm" svg:x="2.257cm" svg:y="4.039cm" presentation:class="outline" presentation:user-transformed="true">
          <draw:text-box>
            <text:list text:style-name="L2">
              <text:list-item>
                <text:p>King in 1970s</text:p>
              </text:list-item>
            </text:list>
          </draw:text-box>
        </draw:frame>
        <draw:custom-shape draw:style-name="gr13" draw:text-style-name="P8" xml:id="id7" draw:id="id7" draw:layer="layout" svg:width="1.195cm" svg:height="1.195cm" svg:x="19.396cm" svg:y="2.333cm">
          <text:p text:style-name="P6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6.42cm" svg:height="6.641cm" svg:x="0.508cm" svg:y="8.455cm">
          <draw:text-box>
            <text:p text:style-name="P12"><text:span text:style-name="T12"><text:s/></text:span><text:span text:style-name="T12">1:</text:span><text:span text:style-name="T10">void</text:span><text:span text:style-name="T11"> </text:span><text:span text:style-name="T12">fun(</text:span><text:span text:style-name="T10">int</text:span><text:span text:style-name="T11"> </text:span><text:span text:style-name="T12">x) {</text:span></text:p>
            <text:p text:style-name="P12"><text:span text:style-name="T12"><text:s/></text:span><text:span text:style-name="T12">2: </text:span><text:span text:style-name="T11"><text:s/></text:span><text:span text:style-name="T41">if</text:span><text:span text:style-name="T11"> </text:span><text:span text:style-name="T12">(x) {</text:span></text:p>
            <text:p text:style-name="P12"><text:span text:style-name="T12"><text:s/></text:span><text:span text:style-name="T12">3: </text:span><text:span text:style-name="T14"><text:s text:c="3"/></text:span><text:span text:style-name="T41">smFire(smGetMachine(myLock), smLock);</text:span></text:p>
            <text:p text:style-name="P12"><text:span text:style-name="T12"><text:s/></text:span><text:span text:style-name="T12">4: </text:span><text:span text:style-name="T11"><text:s text:c="3"/></text:span><text:span text:style-name="T12">lock(myLock);</text:span></text:p>
            <text:p text:style-name="P12"><text:span text:style-name="T12"><text:s/></text:span><text:span text:style-name="T12">5: <text:s/>}</text:span></text:p>
            <text:p text:style-name="P12"><text:span text:style-name="T42"><text:s/></text:span><text:span text:style-name="T42">6: </text:span><text:span text:style-name="T11"><text:s/></text:span><text:span text:style-name="T41">if</text:span><text:span text:style-name="T11"> </text:span><text:span text:style-name="T12">(x) {</text:span></text:p>
            <text:p text:style-name="P12"><text:span text:style-name="T12"><text:s/></text:span><text:span text:style-name="T12">7: <text:s text:c="4"/></text:span><text:span text:style-name="T43">smFire(smGetMachine(myLock), smUnlock);</text:span></text:p>
            <text:p text:style-name="P12"><text:span text:style-name="T12"><text:s/></text:span><text:span text:style-name="T12">8: </text:span><text:span text:style-name="T11"><text:s text:c="4"/></text:span><text:span text:style-name="T12">unlock(myLock);</text:span></text:p>
            <text:p text:style-name="P12"><text:span text:style-name="T12"><text:s/></text:span><text:span text:style-name="T12">9: <text:s/>}</text:span></text:p>
            <text:p text:style-name="P12"><text:span text:style-name="T12">10:}</text:span></text:p>
          </draw:text-box>
        </draw:frame>
        <draw:custom-shape draw:style-name="gr13" draw:text-style-name="P8" xml:id="id8" draw:id="id8" draw:layer="layout" svg:width="1.195cm" svg:height="1.195cm" svg:x="17.88cm" svg:y="4.15cm">
          <text:p text:style-name="P6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9" draw:id="id9" draw:layer="layout" svg:width="1.195cm" svg:height="1.195cm" svg:x="17.88cm" svg:y="6.148cm">
          <text:p text:style-name="P6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0" draw:id="id10" draw:layer="layout" svg:width="1.195cm" svg:height="1.195cm" svg:x="17.88cm" svg:y="8.146cm">
          <text:p text:style-name="P6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2" draw:id="id12" draw:layer="layout" svg:width="1.195cm" svg:height="1.195cm" svg:x="17.88cm" svg:y="12.143cm">
          <text:p text:style-name="P6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1" draw:id="id11" draw:layer="layout" svg:width="1.195cm" svg:height="1.195cm" svg:x="17.88cm" svg:y="10.144cm">
          <text:p text:style-name="P6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3" draw:id="id13" draw:layer="layout" svg:width="1.195cm" svg:height="1.195cm" svg:x="17.88cm" svg:y="14.141cm">
          <text:p text:style-name="P6"><text:span text:style-name="T4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4" draw:id="id14" draw:layer="layout" svg:width="1.195cm" svg:height="1.195cm" svg:x="17.88cm" svg:y="16.061cm">
          <text:p text:style-name="P6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5" draw:id="id15" draw:layer="layout" svg:width="1.195cm" svg:height="1.195cm" svg:x="20.801cm" svg:y="4.261cm">
          <text:p text:style-name="P6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6" draw:id="id16" draw:layer="layout" svg:width="1.195cm" svg:height="1.195cm" svg:x="20.801cm" svg:y="6.253cm">
          <text:p text:style-name="P6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7" draw:id="id17" draw:layer="layout" svg:width="1.195cm" svg:height="1.195cm" svg:x="20.801cm" svg:y="8.168cm">
          <text:p text:style-name="P6"><text:span text:style-name="T4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19.571cm" svg:y1="3.353cm" svg:x2="18.9cm" svg:y2="4.325cm" draw:start-shape="id7" draw:start-glue-point="7" draw:end-shape="id8" draw:end-glue-point="11" svg:d="m19571 3353-671 972">
          <text:p/>
        </draw:connector>
        <draw:connector draw:style-name="gr3" draw:text-style-name="P6" draw:layer="layout" draw:type="line" svg:x1="18.478cm" svg:y1="5.345cm" svg:x2="18.478cm" svg:y2="6.148cm" draw:start-shape="id8" draw:start-glue-point="8" draw:end-shape="id9" draw:end-glue-point="4" svg:d="m18478 5345v803">
          <text:p/>
        </draw:connector>
        <draw:connector draw:style-name="gr3" draw:text-style-name="P6" draw:layer="layout" draw:type="line" svg:x1="18.478cm" svg:y1="7.343cm" svg:x2="18.478cm" svg:y2="8.146cm" draw:start-shape="id9" draw:start-glue-point="8" draw:end-shape="id10" draw:end-glue-point="4" svg:d="m18478 7343v803">
          <text:p/>
        </draw:connector>
        <draw:connector draw:style-name="gr3" draw:text-style-name="P6" draw:layer="layout" draw:type="line" svg:x1="18.478cm" svg:y1="9.341cm" svg:x2="18.478cm" svg:y2="10.144cm" draw:start-shape="id10" draw:start-glue-point="8" draw:end-shape="id11" draw:end-glue-point="4" svg:d="m18478 9341v803">
          <text:p/>
        </draw:connector>
        <draw:connector draw:style-name="gr3" draw:text-style-name="P6" draw:layer="layout" draw:type="line" svg:x1="18.478cm" svg:y1="11.339cm" svg:x2="18.478cm" svg:y2="12.143cm" draw:start-shape="id11" draw:start-glue-point="8" draw:end-shape="id12" draw:end-glue-point="4" svg:d="m18478 11339v804">
          <text:p/>
        </draw:connector>
        <draw:connector draw:style-name="gr3" draw:text-style-name="P6" draw:layer="layout" draw:type="line" svg:x1="18.478cm" svg:y1="13.338cm" svg:x2="18.478cm" svg:y2="14.141cm" draw:start-shape="id12" draw:start-glue-point="8" draw:end-shape="id13" draw:end-glue-point="4" svg:d="m18478 13338v803">
          <text:p/>
        </draw:connector>
        <draw:connector draw:style-name="gr3" draw:text-style-name="P6" draw:layer="layout" draw:type="line" svg:x1="18.478cm" svg:y1="15.336cm" svg:x2="18.478cm" svg:y2="16.061cm" draw:start-shape="id13" draw:start-glue-point="8" draw:end-shape="id14" draw:end-glue-point="4" svg:d="m18478 15336v725">
          <text:p/>
        </draw:connector>
        <draw:connector draw:style-name="gr3" draw:text-style-name="P6" draw:layer="layout" draw:type="line" svg:x1="20.416cm" svg:y1="3.353cm" svg:x2="21.399cm" svg:y2="4.261cm" draw:start-shape="id7" draw:start-glue-point="9" draw:end-shape="id15" draw:end-glue-point="4" svg:d="m20416 3353 983 908">
          <text:p/>
        </draw:connector>
        <draw:connector draw:style-name="gr3" draw:text-style-name="P6" draw:layer="layout" draw:type="line" svg:x1="21.399cm" svg:y1="5.456cm" svg:x2="21.399cm" svg:y2="6.253cm" draw:start-shape="id15" draw:start-glue-point="8" draw:end-shape="id16" draw:end-glue-point="4" svg:d="m21399 5456v797">
          <text:p/>
        </draw:connector>
        <draw:connector draw:style-name="gr3" draw:text-style-name="P6" draw:layer="layout" draw:type="line" svg:x1="21.399cm" svg:y1="7.448cm" svg:x2="21.399cm" svg:y2="8.168cm" draw:start-shape="id16" draw:start-glue-point="8" draw:end-shape="id17" draw:end-glue-point="4" svg:d="m21399 7448v720">
          <text:p/>
        </draw:connector>
        <draw:custom-shape draw:style-name="gr14" draw:text-style-name="P8" xml:id="id18" draw:id="id18" draw:layer="layout" svg:width="1.195cm" svg:height="1.195cm" svg:x="19.777cm" svg:y="12.153cm">
          <text:p text:style-name="P6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xml:id="id32" draw:id="id32" draw:layer="layout" draw:type="line" svg:x1="18.9cm" svg:y1="11.164cm" svg:x2="19.952cm" svg:y2="12.328cm" draw:start-shape="id11" draw:start-glue-point="9" draw:end-shape="id18" draw:end-glue-point="5" svg:d="m18900 11164 1052 1164">
          <text:p/>
        </draw:connector>
        <draw:polyline draw:style-name="gr16" draw:text-style-name="P6" xml:id="id33" draw:id="id33" draw:layer="layout" svg:width="2.36cm" svg:height="2.36cm" svg:x="18.969cm" svg:y="11.351cm" svg:viewBox="0 0 2361 2361" draw:points="2361,0 0,2361">
          <text:p/>
        </draw:polyline>
        <draw:polyline draw:style-name="gr16" draw:text-style-name="P6" xml:id="id34" draw:id="id34" draw:layer="layout" svg:width="2.502cm" svg:height="2.502cm" svg:x="18.884cm" svg:y="11.38cm" svg:viewBox="0 0 2503 2503" draw:points="2503,2503 0,0">
          <text:p/>
        </draw:polyline>
        <draw:custom-shape draw:style-name="gr14" draw:text-style-name="P8" xml:id="id19" draw:id="id19" draw:layer="layout" svg:width="1.195cm" svg:height="1.195cm" svg:x="22.699cm" svg:y="8.19cm">
          <text:p text:style-name="P6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xml:id="id35" draw:id="id35" draw:layer="layout" draw:type="line" svg:x1="21.821cm" svg:y1="7.273cm" svg:x2="22.874cm" svg:y2="8.365cm" draw:start-shape="id16" draw:start-glue-point="9" draw:end-shape="id19" draw:end-glue-point="5" svg:d="m21821 7273 1053 1092">
          <text:p/>
        </draw:connector>
        <draw:polyline draw:style-name="gr16" draw:text-style-name="P6" xml:id="id36" draw:id="id36" draw:layer="layout" svg:width="2.36cm" svg:height="2.36cm" svg:x="21.891cm" svg:y="7.388cm" svg:viewBox="0 0 2361 2361" draw:points="2361,0 0,2361">
          <text:p/>
        </draw:polyline>
        <draw:polyline draw:style-name="gr16" draw:text-style-name="P6" xml:id="id37" draw:id="id37" draw:layer="layout" svg:width="2.502cm" svg:height="2.502cm" svg:x="21.806cm" svg:y="7.417cm" svg:viewBox="0 0 2503 2503" draw:points="2503,2503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eak" presentation:presentation-page-layout-name="AL2T1">
        <office:forms form:automatic-focus="false" form:apply-design-mode="false"/>
        <draw:frame presentation:style-name="pr10" draw:text-style-name="P17" draw:layer="layout" svg:width="20.884cm" svg:height="3.18cm" svg:x="2.286cm" svg:y="7.62cm" presentation:class="title">
          <draw:text-box>
            <text:p text:style-name="P16"><text:span text:style-name="T24">Results</text:span></text:p>
          </draw:text-box>
        </draw:frame>
        <draw:frame presentation:style-name="pr11" draw:layer="layout" svg:width="13.259cm" svg:height="11.049cm" svg:x="0cm" svg:y="19.74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periments: tool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Instrumentation: on C level</text:p>
              </text:list-item>
              <text:list-item>
                <text:p>Compilation to LLVM by clang</text:p>
              </text:list-item>
              <text:list-item>
                <text:p>Slicing: on LLVM level</text:p>
              </text:list-item>
              <text:list-item>
                <text:p>Symbolic execution: on LLVM level by Klee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Experimental Results</text:p>
          </draw:text-box>
        </draw:frame>
        <draw:frame presentation:style-name="pr16" draw:layer="layout" svg:width="20.93cm" svg:height="11.049cm" svg:x="2.286cm" svg:y="4.039cm" presentation:class="outline">
          <draw:text-box>
            <text:list text:style-name="L2">
              <text:list-item>
                <text:p>Output of Stanse for the Linux kernel 2.6.28</text:p>
              </text:list-item>
            </text:list>
          </draw:text-box>
        </draw:frame>
        <draw:frame draw:style-name="standard" draw:layer="layout" svg:width="24.012cm" svg:height="9.131cm" svg:x="0.694cm" svg:y="6.68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2">
              <table:table-cell table:style-name="ce8">
                <text:p><text:span text:style-name="T4">Function</text:span></text:p>
              </table:table-cell>
              <table:table-cell>
                <text:p text:style-name="P6"><text:span text:style-name="T4">C+I</text:span></text:p>
              </table:table-cell>
              <table:table-cell>
                <text:p text:style-name="P6"><text:span text:style-name="T4">Slicing</text:span></text:p>
              </table:table-cell>
              <table:table-cell>
                <text:p text:style-name="P6"><text:span text:style-name="T4">SE</text:span></text:p>
              </table:table-cell>
              <table:table-cell>
                <text:p text:style-name="P6"><text:span text:style-name="T4">Total</text:span></text:p>
              </table:table-cell>
              <table:table-cell>
                <text:p text:style-name="P6"><text:span text:style-name="T4">Sliced</text:span></text:p>
              </table:table-cell>
              <table:table-cell>
                <text:p text:style-name="P6"><text:span text:style-name="T4">Result</text:span></text:p>
              </table:table-cell>
              <table:table-cell>
                <text:p text:style-name="P6"><text:span text:style-name="T4">Factual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44">jfs_quota_write</text:span></text:p>
              </table:table-cell>
              <table:table-cell>
                <text:p text:style-name="P6">1.4</text:p>
              </table:table-cell>
              <table:table-cell>
                <text:p text:style-name="P6">0.2</text:p>
              </table:table-cell>
              <table:table-cell>
                <text:p text:style-name="P6">5.1</text:p>
              </table:table-cell>
              <table:table-cell>
                <text:p text:style-name="P6">6.7</text:p>
              </table:table-cell>
              <table:table-cell>
                <text:p text:style-name="P6">68%</text:p>
              </table:table-cell>
              <table:table-cell>
                <text:p text:style-name="P6">BUG</text:p>
              </table:table-cell>
              <table:table-cell>
                <text:p text:style-name="P6">BUG</text:p>
              </table:table-cell>
            </table:table-row>
            <table:table-row table:style-name="ro1" table:default-cell-style-name="ce10">
              <table:table-cell table:style-name="ce9">
                <text:p><text:span text:style-name="T44">qlge_set_mac_</text:span><text:span text:style-name="T44"><text:line-break/></text:span><text:span text:style-name="T44">address</text:span></text:p>
              </table:table-cell>
              <table:table-cell>
                <text:p text:style-name="P6">3.4</text:p>
              </table:table-cell>
              <table:table-cell>
                <text:p text:style-name="P6">26.8</text:p>
              </table:table-cell>
              <table:table-cell>
                <text:p text:style-name="P6">13.3</text:p>
              </table:table-cell>
              <table:table-cell>
                <text:p text:style-name="P6">43.5</text:p>
              </table:table-cell>
              <table:table-cell>
                <text:p text:style-name="P6">67%</text:p>
              </table:table-cell>
              <table:table-cell>
                <text:p text:style-name="P6">BUG</text:p>
              </table:table-cell>
              <table:table-cell>
                <text:p text:style-name="P6">BUG</text:p>
              </table:table-cell>
            </table:table-row>
            <table:table-row table:style-name="ro1" table:default-cell-style-name="ce10">
              <table:table-cell table:style-name="ce9">
                <text:p><text:span text:style-name="T44">hidraw_read</text:span></text:p>
              </table:table-cell>
              <table:table-cell>
                <text:p text:style-name="P6">1.2</text:p>
              </table:table-cell>
              <table:table-cell>
                <text:p text:style-name="P6">0.1</text:p>
              </table:table-cell>
              <table:table-cell table:number-columns-spanned="2">
                <text:p text:style-name="P6">Timeout</text:p>
              </table:table-cell>
              <table:covered-table-cell/>
              <table:table-cell>
                <text:p text:style-name="P6">67%</text:p>
              </table:table-cell>
              <table:table-cell>
                <text:p text:style-name="P6">TO</text:p>
              </table:table-cell>
              <table:table-cell>
                <text:p text:style-name="P6">BUG</text:p>
              </table:table-cell>
            </table:table-row>
            <table:table-row table:style-name="ro1" table:default-cell-style-name="ce10">
              <table:table-cell table:style-name="ce9">
                <text:p><text:span text:style-name="T44">queue_refill</text:span></text:p>
              </table:table-cell>
              <table:table-cell>
                <text:p text:style-name="P6">2.1</text:p>
              </table:table-cell>
              <table:table-cell>
                <text:p text:style-name="P6">1.7</text:p>
              </table:table-cell>
              <table:table-cell>
                <text:p text:style-name="P6">0.6</text:p>
              </table:table-cell>
              <table:table-cell>
                <text:p text:style-name="P6">4.4</text:p>
              </table:table-cell>
              <table:table-cell>
                <text:p text:style-name="P6">73%</text:p>
              </table:table-cell>
              <table:table-cell>
                <text:p text:style-name="P6">FP</text:p>
              </table:table-cell>
              <table:table-cell>
                <text:p text:style-name="P6">FP</text:p>
              </table:table-cell>
            </table:table-row>
            <table:table-row table:style-name="ro1" table:default-cell-style-name="ce10">
              <table:table-cell table:style-name="ce9">
                <text:p><text:span text:style-name="T44">sisusbcon_set_</text:span><text:span text:style-name="T44"><text:line-break/></text:span><text:span text:style-name="T44">palette</text:span></text:p>
              </table:table-cell>
              <table:table-cell>
                <text:p text:style-name="P6">1.7</text:p>
              </table:table-cell>
              <table:table-cell>
                <text:p text:style-name="P6">0.3</text:p>
              </table:table-cell>
              <table:table-cell>
                <text:p text:style-name="P6">17.2</text:p>
              </table:table-cell>
              <table:table-cell>
                <text:p text:style-name="P6">19.2</text:p>
              </table:table-cell>
              <table:table-cell>
                <text:p text:style-name="P6">76%</text:p>
              </table:table-cell>
              <table:table-cell>
                <text:p text:style-name="P6">FP</text:p>
              </table:table-cell>
              <table:table-cell>
                <text:p text:style-name="P6">FP</text:p>
              </table:table-cell>
            </table:table-row>
            <table:table-row table:style-name="ro1" table:default-cell-style-name="ce10">
              <table:table-cell table:style-name="ce9">
                <text:p><text:span text:style-name="T44">jffs2_reserve_</text:span><text:span text:style-name="T44"><text:line-break/></text:span><text:span text:style-name="T44">space</text:span></text:p>
              </table:table-cell>
              <table:table-cell>
                <text:p text:style-name="P6">1.2</text:p>
              </table:table-cell>
              <table:table-cell>
                <text:p text:style-name="P6">0.2</text:p>
              </table:table-cell>
              <table:table-cell table:number-columns-spanned="2">
                <text:p text:style-name="P6">Timeout</text:p>
              </table:table-cell>
              <table:covered-table-cell/>
              <table:table-cell>
                <text:p text:style-name="P6">47%</text:p>
              </table:table-cell>
              <table:table-cell>
                <text:p text:style-name="P6">TO</text:p>
              </table:table-cell>
              <table:table-cell>
                <text:p text:style-name="P6">FP</text:p>
              </table:table-cell>
            </table:table-row>
            <table:table-row table:style-name="ro1" table:default-cell-style-name="ce10">
              <table:table-cell table:style-name="ce9">
                <text:p><text:span text:style-name="T44">pre_handler_</text:span><text:span text:style-name="T44"><text:line-break/></text:span><text:span text:style-name="T44">kretprobe</text:span></text:p>
              </table:table-cell>
              <table:table-cell>
                <text:p text:style-name="P6">0.4</text:p>
              </table:table-cell>
              <table:table-cell>
                <text:p text:style-name="P6">0.5</text:p>
              </table:table-cell>
              <table:table-cell>
                <text:p text:style-name="P6">2.4</text:p>
              </table:table-cell>
              <table:table-cell>
                <text:p text:style-name="P6">3.3</text:p>
              </table:table-cell>
              <table:table-cell>
                <text:p text:style-name="P6">66%</text:p>
              </table:table-cell>
              <table:table-cell>
                <text:p text:style-name="P6">ME</text:p>
              </table:table-cell>
              <table:table-cell>
                <text:p text:style-name="P6">FP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amples<text:line-break/><text:span text:style-name="T45">Verified error</text:span></text:p>
          </draw:text-box>
        </draw:frame>
        <draw:frame draw:style-name="gr17" draw:text-style-name="P13" draw:layer="layout" svg:width="20.146cm" svg:height="13.67cm" svg:x="2.627cm" svg:y="3.705cm">
          <draw:text-box>
            <text:p text:style-name="P12"><text:span text:style-name="T12">ssize_t</text:span><text:span text:style-name="T11"> </text:span><text:span text:style-name="T12">ext2_quota_write(</text:span><text:span text:style-name="T10">struct</text:span><text:span text:style-name="T11"> </text:span><text:span text:style-name="T12">super_block</text:span><text:span text:style-name="T11"> </text:span><text:span text:style-name="T12">*sb,</text:span><text:span text:style-name="T11"> </text:span><text:span text:style-name="T10">int</text:span><text:span text:style-name="T11"> </text:span><text:span text:style-name="T12">type,</text:span></text:p>
            <text:p text:style-name="P12"><text:span text:style-name="T11"><text:s text:c="8"/></text:span><text:span text:style-name="T10">const char</text:span><text:span text:style-name="T11"> </text:span><text:span text:style-name="T12">*data,</text:span><text:span text:style-name="T11"> </text:span><text:span text:style-name="T10">size_t</text:span><text:span text:style-name="T11"> </text:span><text:span text:style-name="T12">len,</text:span><text:span text:style-name="T11"> </text:span><text:span text:style-name="T12">loff_t off)</text:span></text:p>
            <text:p text:style-name="P12"><text:span text:style-name="T12">{</text:span></text:p>
            <text:p text:style-name="P12"><text:span text:style-name="T11"><text:s text:c="2"/></text:span><text:span text:style-name="T10">struct</text:span><text:span text:style-name="T11"> </text:span><text:span text:style-name="T12">inode</text:span><text:span text:style-name="T11"> </text:span><text:span text:style-name="T12">*inode</text:span><text:span text:style-name="T11"> </text:span><text:span text:style-name="T12">=</text:span><text:span text:style-name="T11"> </text:span><text:span text:style-name="T12">sb_dqopt(sb)-&gt;files[type];</text:span></text:p>
            <text:p text:style-name="P12"><text:span text:style-name="T11"><text:s text:c="2"/></text:span><text:span text:style-name="T10">int</text:span><text:span text:style-name="T11"> </text:span><text:span text:style-name="T12">err</text:span><text:span text:style-name="T11"> </text:span><text:span text:style-name="T12">=</text:span><text:span text:style-name="T11"> </text:span><text:span text:style-name="T46">0</text:span><text:span text:style-name="T12">;</text:span></text:p>
            <text:p text:style-name="P12"><text:span text:style-name="T11"><text:s text:c="2"/></text:span><text:span text:style-name="T10">int</text:span><text:span text:style-name="T11"> </text:span><text:span text:style-name="T12">tocopy;</text:span></text:p>
            <text:p text:style-name="P12"><text:span text:style-name="T11"><text:s text:c="2"/></text:span><text:span text:style-name="T10">size_t</text:span><text:span text:style-name="T11"> </text:span><text:span text:style-name="T12">towrite</text:span><text:span text:style-name="T11"> </text:span><text:span text:style-name="T12">=</text:span><text:span text:style-name="T11"> </text:span><text:span text:style-name="T12">len;</text:span></text:p>
            <text:p text:style-name="P12"><text:span text:style-name="T11"/></text:p>
            <text:p text:style-name="P12"><text:span text:style-name="T11"><text:s text:c="2"/></text:span><text:span text:style-name="T12">mutex_lock_nested(&amp;inode-&gt;i_mutex,</text:span><text:span text:style-name="T11"> </text:span><text:span text:style-name="T12">I_MUTEX_QUOTA);</text:span></text:p>
            <text:p text:style-name="P12"><text:span text:style-name="T11"><text:s text:c="2"/></text:span><text:span text:style-name="T41">while</text:span><text:span text:style-name="T11"> </text:span><text:span text:style-name="T12">(towrite</text:span><text:span text:style-name="T11"> </text:span><text:span text:style-name="T12">&gt;</text:span><text:span text:style-name="T11"> </text:span><text:span text:style-name="T46">0</text:span><text:span text:style-name="T12">) {</text:span></text:p>
            <text:p text:style-name="P12"><text:span text:style-name="T11"><text:s text:c="4"/></text:span><text:span text:style-name="T12">...</text:span></text:p>
            <text:p text:style-name="P12"><text:span text:style-name="T12"><text:s text:c="4"/></text:span><text:span text:style-name="T12">towrite</text:span><text:span text:style-name="T11"> </text:span><text:span text:style-name="T12">-=</text:span><text:span text:style-name="T11"> </text:span><text:span text:style-name="T12">tocopy;</text:span></text:p>
            <text:p text:style-name="P12"><text:span text:style-name="T12"><text:s text:c="4"/></text:span><text:span text:style-name="T12">data</text:span><text:span text:style-name="T11"> </text:span><text:span text:style-name="T12">+=</text:span><text:span text:style-name="T11"> </text:span><text:span text:style-name="T12">tocopy;</text:span></text:p>
            <text:p text:style-name="P12"><text:span text:style-name="T11"><text:s text:c="2"/></text:span><text:span text:style-name="T12">}</text:span></text:p>
            <text:p text:style-name="P12"><text:span text:style-name="T12">out:</text:span></text:p>
            <text:p text:style-name="P12"><text:span text:style-name="T11"><text:s text:c="2"/></text:span><text:span text:style-name="T41">if</text:span><text:span text:style-name="T11"> </text:span><text:span text:style-name="T12">(len</text:span><text:span text:style-name="T11"> </text:span><text:span text:style-name="T12">==</text:span><text:span text:style-name="T11"> </text:span><text:span text:style-name="T12">towrite)</text:span></text:p>
            <text:p text:style-name="P12"><text:span text:style-name="T11"><text:s text:c="4"/></text:span><text:span text:style-name="T41">return</text:span><text:span text:style-name="T11"> </text:span><text:span text:style-name="T12">err; </text:span><text:span text:style-name="T14">// ERROR</text:span></text:p>
            <text:p text:style-name="P12"><text:span text:style-name="T11"><text:s text:c="2"/></text:span><text:span text:style-name="T12">...</text:span></text:p>
            <text:p text:style-name="P12"><text:span text:style-name="T11"><text:s text:c="2"/></text:span><text:span text:style-name="T12">mutex_unlock(&amp;inode-&gt;i_mutex);</text:span></text:p>
            <text:p text:style-name="P12"><text:span text:style-name="T11"><text:s text:c="2"/></text:span><text:span text:style-name="T41">return</text:span><text:span text:style-name="T11"> </text:span><text:span text:style-name="T12">len</text:span><text:span text:style-name="T11"> </text:span><text:span text:style-name="T12">-</text:span><text:span text:style-name="T11"> </text:span><text:span text:style-name="T12">towrite;</text:span></text:p>
            <text:p text:style-name="P12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amples<text:line-break/><text:span text:style-name="T45">Pruned false-positive in queue_refill</text:span></text:p>
          </draw:text-box>
        </draw:frame>
        <draw:frame draw:style-name="gr18" draw:text-style-name="P13" draw:layer="layout" svg:width="22.515cm" svg:height="13.67cm" svg:x="1.458cm" svg:y="3.874cm">
          <draw:text-box>
            <text:p text:style-name="P12"><text:span text:style-name="T10">int</text:span><text:span text:style-name="T11"> </text:span><text:span text:style-name="T12">rx_refill(</text:span><text:span text:style-name="T10">struct</text:span><text:span text:style-name="T11"> </text:span><text:span text:style-name="T12">net_device</text:span><text:span text:style-name="T11"> </text:span><text:span text:style-name="T12">*ndev,</text:span><text:span text:style-name="T11"> </text:span><text:span text:style-name="T12">gfp_t gfp)</text:span></text:p>
            <text:p text:style-name="P12"><text:span text:style-name="T12">{</text:span></text:p>
            <text:p text:style-name="P12"><text:span text:style-name="T11"><text:s text:c="2"/></text:span><text:span text:style-name="T10">struct</text:span><text:span text:style-name="T11"> </text:span><text:span text:style-name="T12">ns83820</text:span><text:span text:style-name="T11"> </text:span><text:span text:style-name="T12">*dev</text:span><text:span text:style-name="T11"> </text:span><text:span text:style-name="T12">=</text:span><text:span text:style-name="T11"> </text:span><text:span text:style-name="T12">PRIV(ndev);</text:span></text:p>
            <text:p text:style-name="P12"><text:span text:style-name="T11"><text:s text:c="2"/></text:span><text:span text:style-name="T10">unsigned</text:span><text:span text:style-name="T11"> </text:span><text:span text:style-name="T12">i;</text:span></text:p>
            <text:p text:style-name="P12"><text:span text:style-name="T11"><text:s text:c="2"/></text:span><text:span text:style-name="T10">unsigned long</text:span><text:span text:style-name="T11"> </text:span><text:span text:style-name="T12">flags</text:span><text:span text:style-name="T11"> </text:span><text:span text:style-name="T12">=</text:span><text:span text:style-name="T11"> </text:span><text:span text:style-name="T46">0</text:span><text:span text:style-name="T12">;</text:span></text:p>
            <text:p text:style-name="P12"><text:span text:style-name="T11"><text:s text:c="2"/></text:span><text:span text:style-name="T12">...</text:span></text:p>
            <text:p text:style-name="P12"><text:span text:style-name="T11"><text:s text:c="2"/></text:span><text:span text:style-name="T41">if</text:span><text:span text:style-name="T11"> </text:span><text:span text:style-name="T12">(gfp</text:span><text:span text:style-name="T11"> </text:span><text:span text:style-name="T12">==</text:span><text:span text:style-name="T11"> </text:span><text:span text:style-name="T12">GFP_ATOMIC)</text:span></text:p>
            <text:p text:style-name="P12"><text:span text:style-name="T11"><text:s text:c="4"/></text:span><text:span text:style-name="T12">spin_lock_irqsave(&amp;dev-&gt;rx_info.lock,</text:span><text:span text:style-name="T11"> </text:span><text:span text:style-name="T12">flags); </text:span><text:span text:style-name="T14">// ERROR</text:span></text:p>
            <text:p text:style-name="P12"><text:span text:style-name="T11"><text:s text:c="2"/></text:span><text:span text:style-name="T41">for</text:span><text:span text:style-name="T11"> </text:span><text:span text:style-name="T12">(i=</text:span><text:span text:style-name="T46">0</text:span><text:span text:style-name="T12">;</text:span><text:span text:style-name="T11"> </text:span><text:span text:style-name="T12">i&lt;NR_RX_DESC;</text:span><text:span text:style-name="T11"> </text:span><text:span text:style-name="T12">i++) {</text:span></text:p>
            <text:p text:style-name="P12"><text:span text:style-name="T11"><text:s text:c="4"/></text:span><text:span text:style-name="T12">...</text:span></text:p>
            <text:p text:style-name="P12"><text:span text:style-name="T11"><text:s text:c="4"/></text:span><text:span text:style-name="T41">if</text:span><text:span text:style-name="T11"> </text:span><text:span text:style-name="T12">(gfp</text:span><text:span text:style-name="T11"> </text:span><text:span text:style-name="T12">!=</text:span><text:span text:style-name="T11"> </text:span><text:span text:style-name="T12">GFP_ATOMIC)</text:span></text:p>
            <text:p text:style-name="P12"><text:span text:style-name="T11"><text:s text:c="6"/></text:span><text:span text:style-name="T12">spin_lock_irqsave(&amp;dev-&gt;rx_info.lock,</text:span><text:span text:style-name="T11"> </text:span><text:span text:style-name="T12">flags); </text:span><text:span text:style-name="T14">// ERROR</text:span></text:p>
            <text:p text:style-name="P12"><text:span text:style-name="T12"><text:s text:c="4"/></text:span><text:span text:style-name="T12">res</text:span><text:span text:style-name="T11"> </text:span><text:span text:style-name="T12">=</text:span><text:span text:style-name="T11"> </text:span><text:span text:style-name="T12">ns83820_add_rx_skb(dev,</text:span><text:span text:style-name="T11"> </text:span><text:span text:style-name="T12">skb);</text:span></text:p>
            <text:p text:style-name="P12"><text:span text:style-name="T11"><text:s text:c="4"/></text:span><text:span text:style-name="T41">if</text:span><text:span text:style-name="T11"> </text:span><text:span text:style-name="T12">(gfp</text:span><text:span text:style-name="T11"> </text:span><text:span text:style-name="T12">!=</text:span><text:span text:style-name="T11"> </text:span><text:span text:style-name="T12">GFP_ATOMIC)</text:span></text:p>
            <text:p text:style-name="P12"><text:span text:style-name="T11"><text:s text:c="6"/></text:span><text:span text:style-name="T12">spin_unlock_irqrestore(&amp;dev-&gt;rx_info.lock,</text:span><text:span text:style-name="T11"> </text:span><text:span text:style-name="T12">flags); </text:span><text:span text:style-name="T14">// ERROR</text:span></text:p>
            <text:p text:style-name="P12"><text:span text:style-name="T11"><text:s text:c="4"/></text:span><text:span text:style-name="T12">...</text:span></text:p>
            <text:p text:style-name="P12"><text:span text:style-name="T11"><text:s text:c="2"/></text:span><text:span text:style-name="T12">}</text:span></text:p>
            <text:p text:style-name="P12"><text:span text:style-name="T11"><text:s text:c="2"/></text:span><text:span text:style-name="T41">if</text:span><text:span text:style-name="T11"> </text:span><text:span text:style-name="T12">(gfp</text:span><text:span text:style-name="T11"> </text:span><text:span text:style-name="T12">==</text:span><text:span text:style-name="T11"> </text:span><text:span text:style-name="T12">GFP_ATOMIC)</text:span></text:p>
            <text:p text:style-name="P12"><text:span text:style-name="T11"><text:s text:c="4"/></text:span><text:span text:style-name="T12">spin_unlock_irqrestore(&amp;dev-&gt;rx_info.lock,</text:span><text:span text:style-name="T11"> </text:span><text:span text:style-name="T12">flags); </text:span><text:span text:style-name="T14">// ERROR</text:span></text:p>
            <text:p text:style-name="P12"><text:span text:style-name="T11"><text:s text:c="2"/></text:span><text:span text:style-name="T12">...</text:span></text:p>
            <text:p text:style-name="P12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Other Application of the Techniqu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So far verification of the output of static analysis</text:p>
                <text:list>
                  <text:list-item>
                    <text:p>Reveal false-positives</text:p>
                  </text:list-item>
                  <text:list-item>
                    <text:p>No need to execute whole project</text:p>
                  </text:list-item>
                  <text:list-item>
                    <text:p>Three-state output: real bug, false-positive, unknown</text:p>
                  </text:list-item>
                </text:list>
              </text:list-item>
              <text:list-item>
                <text:p>Self-contained tool for bug-finding</text:p>
                <text:list>
                  <text:list-item>
                    <text:p>More accurate</text:p>
                  </text:list-item>
                  <text:list-item>
                    <text:p>Does not necessarily find all errors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Conclusion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Combination of three techniques: Instrumentation, Slicing and Symbolic Execution</text:p>
                <text:list>
                  <text:list-item>
                    <text:p>Instrumentation provides us with slicing criteria</text:p>
                  </text:list-item>
                  <text:list-item>
                    <text:p>Slicing improves performance of Symbolic Execution</text:p>
                  </text:list-item>
                  <text:list-item>
                    <text:p>Symbolic Execution is still a bottleneck</text:p>
                  </text:list-item>
                </text:list>
              </text:list-item>
              <text:list-item>
                <text:p xml:id="id38" text:id="id38">Future work</text:p>
                <text:list>
                  <text:list-item>
                    <text:p xml:id="id39" text:id="id39">Reduce pitfalls in symbolic execution</text:p>
                  </text:list-item>
                  <text:list-item>
                    <text:p xml:id="id40" text:id="id40">More complex experimental evalu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all_20_to_20_Action" presentation:presentation-page-layout-name="AL3T19">
        <office:forms form:automatic-focus="false" form:apply-design-mode="false"/>
        <draw:custom-shape draw:name="TextBox 1" draw:style-name="gr19" draw:text-style-name="P21" draw:layer="layout" svg:width="18.188cm" svg:height="4.502cm" svg:x="4.386cm" svg:y="3.616cm">
          <text:p text:style-name="P20"><text:span text:style-name="T47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4cm" svg:height="1.396cm" svg:x="3.36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72cm" svg:height="1.396cm" svg:x="15.21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28cm" svg:height="1.396cm" svg:x="3.47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98cm" svg:height="1.396cm" svg:x="15.855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15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8-27T13:50:11</dc:date>
    <meta:editing-duration>P2DT12H3M54S</meta:editing-duration>
    <meta:editing-cycles>182</meta:editing-cycles>
    <meta:generator>LibreOffice/3.5$Linux_X86_64 LibreOffice_project/350m1$Build-403</meta:generator>
    <dc:title>SUSE Template v17: 8/12/11</dc:title>
    <meta:document-statistic meta:object-count="208"/>
    <meta:user-defined meta:name="Info 1"/>
    <meta:user-defined meta:name="Info 2"/>
    <meta:user-defined meta:name="Info 3"/>
    <meta:user-defined meta:name="Info 4"/>
  </office:meta>
</office:document-meta>
</file>