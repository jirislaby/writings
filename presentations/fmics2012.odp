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29e1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189cm" fo:min-width="1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000000" draw:auto-grow-width="false" fo:min-height="3.84cm" fo:min-width="5.074cm"/>
    </style:style>
    <style:style style:name="gr8" style:family="graphic" style:parent-style-name="standard">
      <style:graphic-properties draw:stroke="none" draw:fill="solid" draw:fill-color="#000000" fo:min-height="2.539cm" fo:min-width="7.11cm"/>
    </style:style>
    <style:style style:name="gr9" style:family="graphic" style:parent-style-name="standard">
      <style:graphic-properties draw:stroke="none" draw:fill="solid" draw:fill-color="#000000" fo:min-height="2.934cm" fo:min-width="4.374cm"/>
    </style:style>
    <style:style style:name="gr10" style:family="graphic" style:parent-style-name="standard">
      <style:graphic-properties draw:stroke="none" draw:fill="solid" draw:fill-color="#000000" fo:min-height="4.429cm" fo:min-width="4.4cm"/>
    </style:style>
    <style:style style:name="gr11" style:family="graphic" style:parent-style-name="standard">
      <style:graphic-properties draw:stroke="none" draw:fill="solid" draw:fill-color="#000000" fo:min-height="8.103cm" fo:min-width="11.773cm"/>
    </style:style>
    <style:style style:name="gr12" style:family="graphic" style:parent-style-name="standard">
      <style:graphic-properties draw:stroke="none" draw:fill="solid" draw:fill-color="#000000" fo:min-height="8.911cm" fo:min-width="12.826cm"/>
    </style:style>
    <style:style style:name="gr13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2.623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No-Logo_20_Content-title">
      <style:graphic-properties fo:min-height="2.743cm" fo:min-width="20.43cm"/>
    </style:style>
    <style:style style:name="pr8" style:family="presentation" style:parent-style-name="No-Logo_20_Content-outline1">
      <style:graphic-properties fo:min-height="12.323cm" fo:min-width="20.43cm"/>
    </style:style>
    <style:style style:name="pr9" style:family="presentation" style:parent-style-name="No-Logo_20_Content-notes">
      <style:graphic-properties draw:fill-color="#ffffff" fo:min-height="12.572cm" fo:min-width="16.771cm"/>
    </style:style>
    <style:style style:name="pr10" style:family="presentation" style:parent-style-name="Break-title">
      <style:graphic-properties fo:min-height="3.18cm" fo:min-width="20.384cm"/>
    </style:style>
    <style:style style:name="pr11" style:family="presentation" style:parent-style-name="Break-notes">
      <style:graphic-properties draw:fill-color="#ffffff" draw:auto-grow-height="true" fo:min-height="12.572cm" fo:min-width="16.771cm"/>
    </style:style>
    <style:style style:name="pr12" style:family="presentation" style:parent-style-name="Logo_20_Content-title">
      <style:graphic-properties fo:min-height="2.743cm" fo:min-width="20.43cm"/>
    </style:style>
    <style:style style:name="pr13" style:family="presentation" style:parent-style-name="Logo_20_Content-outline1">
      <style:graphic-properties fo:min-height="12.323cm" fo:min-width="20.43cm"/>
    </style:style>
    <style:style style:name="pr14" style:family="presentation" style:parent-style-name="Logo_20_Content-notes">
      <style:graphic-properties draw:fill-color="#ffffff" fo:min-height="12.572cm" fo:min-width="16.771cm"/>
    </style:style>
    <style:style style:name="pr15" style:family="presentation" style:parent-style-name="Call_20_to_20_Action-notes">
      <style:graphic-properties draw:fill-color="#ffffff" draw:auto-grow-height="true" fo:min-height="12.572cm" fo:min-width="16.771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708cm" style:use-optimal-column-width="false"/>
    </style:style>
    <style:style style:name="co4" style:family="table-column">
      <style:table-column-properties style:column-width="2.316cm" style:use-optimal-column-width="false"/>
    </style:style>
    <style:style style:name="co5" style:family="table-column">
      <style:table-column-properties style:column-width="2.315cm" style:use-optimal-column-width="false"/>
    </style:style>
    <style:style style:name="co6" style:family="table-column">
      <style:table-column-properties style:column-width="5.538cm" style:use-optimal-column-width="false"/>
    </style:style>
    <style:style style:name="co7" style:family="table-column">
      <style:table-column-properties style:column-width="5.3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end"/>
    </style:style>
    <style:style style:name="ce7" style:family="table-cell">
      <style:graphic-properties style:repeat="repeat"/>
      <style:paragraph-properties fo:text-align="end"/>
      <style:text-properties fo:color="#e00000"/>
    </style:style>
    <style:style style:name="ce8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language="en" fo:country="GB"/>
    </style:style>
    <style:style style:name="P3" style:family="paragraph">
      <style:paragraph-properties fo:margin-top="0cm" fo:margin-bottom="0.152cm" fo:text-align="start"/>
    </style:style>
    <style:style style:name="P4" style:family="paragraph">
      <style:text-properties fo:font-size="24pt" fo:language="en" fo:country="GB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end"/>
    </style:style>
    <style:style style:name="P16" style:family="paragraph">
      <style:text-properties fo:color="#333333" fo:font-size="14pt" style:font-size-asian="14pt" style:font-size-complex="14pt"/>
    </style:style>
    <style:style style:name="P17" style:family="paragraph">
      <style:paragraph-properties fo:margin-top="0cm" fo:margin-bottom="0cm" fo:line-height="93%" fo:text-align="start"/>
    </style:style>
    <style:style style:name="P18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4pt" fo:language="en" fo:country="GB" style:font-size-asian="32pt" style:font-size-complex="3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" style:family="text">
      <style:text-properties fo:color="#ffff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ff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5" style:family="text">
      <style:text-properties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6" style:family="text">
      <style:text-properties fo:color="#ffffff" style:text-line-through-style="none" fo:font-family="'Courier New'" style:font-family-generic="modern" style:font-pitch="fixed" fo:font-size="16pt" fo:text-shadow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7" style:family="text">
      <style:text-properties fo:color="#00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9" style:family="text">
      <style:text-properties fo:color="#ffffff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0" style:family="text">
      <style:text-properties fo:color="#ffff00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color="#ff3366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2" style:family="text">
      <style:text-properties fo:color="#4c4c4c" fo:font-size="32pt" style:font-size-asian="32pt" style:font-size-complex="32pt"/>
    </style:style>
    <style:style style:name="T23" style:family="text">
      <style:text-properties fo:color="#4c4c4c" fo:font-size="20pt" style:font-size-asian="20pt" style:font-size-complex="20pt"/>
    </style:style>
    <style:style style:name="T24" style:family="text">
      <style:text-properties fo:color="#ff3366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5" style:family="text">
      <style:text-properties fo:color="#ff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6" style:family="text">
      <style:text-properties fo:color="#ffffff" style:text-line-through-style="solid" style:text-line-through-width="bold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" style:family="text">
      <style:text-properties fo:color="#3c3c41" fo:font-size="22pt" style:font-size-asian="22pt" style:font-size-complex="22pt"/>
    </style:style>
    <style:style style:name="T28" style:family="text">
      <style:text-properties fo:color="#3c3c41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style:text-position="super 58%" fo:font-size="18pt" style:font-size-asian="18pt" style:font-size-complex="18pt"/>
    </style:style>
    <style:style style:name="T32" style:family="text">
      <style:text-properties fo:color="#e00000"/>
    </style:style>
    <style:style style:name="T33" style:family="text">
      <style:text-properties fo:color="#333333" fo:font-size="14pt" style:font-size-asian="14pt" style:font-size-complex="14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7ac142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1.558cm" svg:height="3.938cm" svg:x="2.286cm" svg:y="6.883cm" presentation:class="title" presentation:user-transformed="true">
          <draw:text-box>
            <text:p text:style-name="P1"><text:span text:style-name="T1">Checking Properties Described by State Machines</text:span><text:span text:style-name="T2"><text:line-break/></text:span><text:span text:style-name="T3">On Synergy of Instrumentation, Slicing, and Symbolic Execution</text:span></text:p>
          </draw:text-box>
        </draw:frame>
        <draw:frame presentation:style-name="pr2" draw:text-style-name="P3" draw:layer="layout" svg:width="10.566cm" svg:height="3.193cm" svg:x="2.261cm" svg:y="13.081cm" presentation:class="subtitle" presentation:user-transformed="true">
          <draw:text-box>
            <text:p text:style-name="P3"><text:span text:style-name="T4">Jiri Slaby</text:span><text:span text:style-name="T5">, </text:span><text:span text:style-name="T6">Jan Strejcek, Marek Trtik</text:span></text:p>
            <text:p text:style-name="P3"><text:span text:style-name="T6">Masaryk University</text:span></text:p>
            <text:p text:style-name="P3"><text:span text:style-name="T6">Brno, Czech Republ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Presentation Outline</text:p>
          </draw:text-box>
        </draw:frame>
        <draw:frame presentation:style-name="pr5" draw:text-style-name="P4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<text:span text:style-name="T7">Introduction and motivation</text:span></text:p>
                <text:list>
                  <text:list-item>
                    <text:p><text:span text:style-name="T7">Classical Static Analysis vs. Symbolic Execution</text:span></text:p>
                  </text:list-item>
                </text:list>
              </text:list-item>
              <text:list-item>
                <text:p><text:span text:style-name="T7">Elimination of false positiv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Classical Static Analysis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Cousot&amp;Cousot in 1970s</text:p>
              </text:list-item>
              <text:list-item>
                <text:p xml:id="id4" text:id="id4">Used in many tools</text:p>
                <text:list>
                  <text:list-item>
                    <text:p xml:id="id5" text:id="id5">Coverity, Stanse…</text:p>
                  </text:list-item>
                </text:list>
              </text:list-item>
              <text:list-item>
                <text:p xml:id="id6" text:id="id6">Pros</text:p>
                <text:list>
                  <text:list-item>
                    <text:p xml:id="id7" text:id="id7">Configurable</text:p>
                  </text:list-item>
                  <text:list-item>
                    <text:p xml:id="id8" text:id="id8">Speed</text:p>
                  </text:list-item>
                  <text:list-item>
                    <text:p xml:id="id9" text:id="id9">Possibly provable program correctness</text:p>
                  </text:list-item>
                </text:list>
              </text:list-item>
              <text:list-item>
                <text:p xml:id="id10" text:id="id10">Cons</text:p>
                <text:list>
                  <text:list-item>
                    <text:p xml:id="id11" text:id="id11">False positiv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Locking Errors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Well-describable by finite automata</text:p>
              </text:list-item>
              <text:list-item>
                <text:p>Syntactic constructs change states</text:p>
                <text:list>
                  <text:list-item>
                    <text:p>Configuration tells which and how</text:p>
                  </text:list-item>
                </text:list>
              </text:list-item>
            </text:list>
          </draw:text-box>
        </draw:frame>
        <draw:g xml:id="id13" draw:id="id13">
          <draw:custom-shape draw:style-name="gr2" draw:text-style-name="P7" xml:id="id2" draw:id="id2" draw:layer="layout" svg:width="3.622cm" svg:height="1.469cm" svg:x="2.022cm" svg:y="10.368cm">
            <draw:glue-point draw:id="4" svg:x="5.024cm" svg:y="-2.45cm" draw:escape-direction="right"/>
            <draw:glue-point draw:id="5" svg:x="1.802cm" svg:y="0.306cm" draw:align="center"/>
            <text:p text:style-name="P6"><text:span text:style-name="T8">Unlock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" draw:id="id1" draw:layer="layout" svg:width="3.622cm" svg:height="1.469cm" svg:x="9.926cm" svg:y="10.368cm">
            <draw:glue-point draw:id="4" svg:x="-4.958cm" svg:y="-2.328cm"/>
            <draw:glue-point draw:id="5" svg:x="-1.811cm" svg:y="0.332cm" draw:align="center" draw:escape-direction="left"/>
            <text:p text:style-name="P6">Lock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6" draw:layer="layout" draw:type="line" svg:x1="9.926cm" svg:y1="11.434cm" svg:x2="5.635cm" svg:y2="11.408cm" draw:start-shape="id1" draw:start-glue-point="5" draw:end-shape="id2" draw:end-glue-point="5" svg:d="m9926 11434-4291-26">
            <text:p/>
          </draw:connector>
          <draw:custom-shape draw:style-name="gr4" draw:text-style-name="P8" xml:id="id3" draw:id="id3" draw:layer="layout" svg:width="3.622cm" svg:height="1.469cm" svg:x="5.969cm" svg:y="13.263cm">
            <draw:glue-point draw:id="4" svg:x="5.024cm" svg:y="-2.45cm" draw:escape-direction="right"/>
            <draw:glue-point draw:id="5" svg:x="-1.821cm" svg:y="-0.347cm" draw:align="center"/>
            <text:p text:style-name="P6"><text:span text:style-name="T4">Err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6" draw:layer="layout" draw:type="line" svg:x1="5.644cm" svg:y1="10.743cm" svg:x2="9.942cm" svg:y2="10.761cm" draw:start-shape="id2" draw:start-glue-point="4" draw:end-shape="id1" draw:end-glue-point="4" svg:d="m5644 10743 4298 18">
            <text:p/>
          </draw:connector>
          <draw:frame draw:style-name="gr5" draw:text-style-name="P9" draw:layer="layout" svg:width="2.28cm" svg:height="0.818cm" svg:x="6.653cm" svg:y="9.928cm">
            <draw:text-box>
              <text:p><text:span text:style-name="T9">lock()</text:span></text:p>
            </draw:text-box>
          </draw:frame>
          <draw:frame draw:style-name="gr6" draw:text-style-name="P10" draw:layer="layout" svg:width="2.873cm" svg:height="0.818cm" svg:x="6.344cm" svg:y="11.511cm">
            <draw:text-box>
              <text:p><text:span text:style-name="T9">unlock()</text:span></text:p>
            </draw:text-box>
          </draw:frame>
          <draw:frame draw:style-name="gr6" draw:text-style-name="P10" draw:layer="layout" svg:width="2.873cm" svg:height="0.818cm" svg:x="2.208cm" svg:y="12.545cm">
            <draw:text-box>
              <text:p><text:span text:style-name="T9">unlock()</text:span></text:p>
            </draw:text-box>
          </draw:frame>
          <draw:frame draw:style-name="gr6" draw:text-style-name="P10" draw:layer="layout" svg:width="2.28cm" svg:height="0.818cm" svg:x="10.561cm" svg:y="12.545cm">
            <draw:text-box>
              <text:p><text:span text:style-name="T9">lock()</text:span></text:p>
            </draw:text-box>
          </draw:frame>
          <draw:connector draw:style-name="gr3" draw:text-style-name="P6" draw:layer="layout" draw:type="line" svg:x1="11.737cm" svg:y1="11.837cm" svg:x2="9.591cm" svg:y2="13.638cm" draw:start-shape="id1" draw:start-glue-point="2" draw:end-shape="id3" draw:end-glue-point="4" svg:d="m11737 11837-2146 1801">
            <text:p/>
          </draw:connector>
          <draw:connector draw:style-name="gr3" draw:text-style-name="P6" draw:layer="layout" draw:type="line" svg:x1="3.833cm" svg:y1="11.837cm" svg:x2="5.969cm" svg:y2="13.65cm" draw:start-shape="id2" draw:start-glue-point="2" draw:end-shape="id3" draw:end-glue-point="5" svg:d="m3833 11837 2136 1813">
            <text:p/>
          </draw:connector>
        </draw:g>
        <draw:frame draw:style-name="gr7" draw:text-style-name="P12" xml:id="id12" draw:id="id12" draw:layer="layout" svg:width="8cm" svg:height="4.09cm" svg:x="15.278cm" svg:y="10.625cm">
          <draw:text-box>
            <text:p text:style-name="P11"><text:span text:style-name="T10">void</text:span><text:span text:style-name="T11"> </text:span><text:span text:style-name="T12">double_lock() {</text:span></text:p>
            <text:p text:style-name="P11"><text:span text:style-name="T11"><text:s text:c="2"/></text:span><text:span text:style-name="T12">lock();</text:span><text:span text:style-name="T13"> </text:span><text:span text:style-name="T14">// U → L</text:span></text:p>
            <text:p text:style-name="P11"><text:span text:style-name="T15"><text:s text:c="2"/></text:span><text:span text:style-name="T16">stuff();</text:span></text:p>
            <text:p text:style-name="P11"><text:span text:style-name="T15"><text:s text:c="2"/></text:span><text:span text:style-name="T16">more_stuff();</text:span></text:p>
            <text:p text:style-name="P11"><text:span text:style-name="T11"><text:s text:c="2"/></text:span><text:span text:style-name="T12">lock(); </text:span><text:span text:style-name="T14">// L → ERROR</text:span></text:p>
            <text:p text:style-name="P11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ample</text:p>
          </draw:text-box>
        </draw:frame>
        <draw:frame draw:style-name="gr8" draw:text-style-name="P13" draw:layer="layout" svg:width="17.268cm" svg:height="6.383cm" svg:x="4.129cm" svg:y="5.376cm">
          <draw:text-box>
            <text:p text:style-name="P11"><text:span text:style-name="T17">void</text:span><text:span text:style-name="T18"> </text:span><text:span text:style-name="T19">fun(</text:span><text:span text:style-name="T17">int</text:span><text:span text:style-name="T18"> </text:span><text:span text:style-name="T19">x) {</text:span><text:span text:style-name="T18"> </text:span><text:span text:style-name="T20">// AUTOMATON STATE</text:span></text:p>
            <text:p text:style-name="P11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U</text:span></text:p>
            <text:p text:style-name="P11"><text:span text:style-name="T18"><text:s text:c="4"/></text:span><text:span text:style-name="T19">lock();</text:span><text:span text:style-name="T18"> <text:s text:c="6"/></text:span><text:span text:style-name="T20">// L</text:span></text:p>
            <text:p text:style-name="P11"><text:span text:style-name="T18"><text:s text:c="2"/></text:span><text:span text:style-name="T19">stuff();</text:span><text:span text:style-name="T18"> <text:s text:c="7"/></text:span><text:span text:style-name="T20">// U or L</text:span></text:p>
            <text:p text:style-name="P11"><text:span text:style-name="T18"><text:s text:c="2"/></text:span><text:span text:style-name="T21">if</text:span><text:span text:style-name="T18"> </text:span><text:span text:style-name="T19">(x)</text:span><text:span text:style-name="T18"> <text:s text:c="9"/></text:span><text:span text:style-name="T20">// U or L</text:span></text:p>
            <text:p text:style-name="P11"><text:span text:style-name="T18"><text:s text:c="4"/></text:span><text:span text:style-name="T19">unlock();</text:span><text:span text:style-name="T18"> <text:s text:c="4"/></text:span><text:span text:style-name="T20">// ERROR or U</text:span></text:p>
            <text:p text:style-name="P11"><text:span text:style-name="T19">}</text:span></text:p>
          </draw:text-box>
        </draw:frame>
        <draw:frame presentation:style-name="pr7" draw:text-style-name="P14" draw:layer="layout" svg:width="20.93cm" svg:height="2.743cm" svg:x="2.235cm" svg:y="13.701cm" presentation:class="title" presentation:user-transformed="true">
          <draw:text-box>
            <text:p xml:id="id14" text:id="id14" text:style-name="P6"><text:span text:style-name="T22">61 per cent of reports are false</text:span><text:span text:style-name="T22"><text:line-break/></text:span><text:span text:style-name="T23">(with no use of elimination techniqu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eak" presentation:presentation-page-layout-name="AL3T19">
        <office:forms form:automatic-focus="false" form:apply-design-mode="false"/>
        <draw:frame presentation:style-name="pr10" draw:layer="layout" svg:width="20.884cm" svg:height="3.18cm" svg:x="2.286cm" svg:y="7.62cm" presentation:class="title" presentation:user-transformed="true">
          <draw:text-box>
            <text:p>False Positives Elimi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Novel Techniqu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utomata</text:p>
                <text:list>
                  <text:list-item>
                    <text:p>The same as in classical approach</text:p>
                  </text:list-item>
                </text:list>
              </text:list-item>
              <text:list-item>
                <text:p>Over LLVM bitcode</text:p>
              </text:list-item>
              <text:list-item>
                <text:p>Slicing</text:p>
              </text:list-item>
              <text:list-item>
                <text:p>Symbolic execu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Automata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Instrumentation</text:p>
              </text:list-item>
              <text:list-item>
                <text:p>Syntactic</text:p>
                <text:list>
                  <text:list-item>
                    <text:p>Transition by code constructs</text:p>
                  </text:list-item>
                  <text:list-item>
                    <text:p>The same as Coverity or Stanse</text:p>
                  </text:list-item>
                </text:list>
              </text:list-item>
              <text:list-item>
                <text:p>Semantic</text:p>
                <text:list>
                  <text:list-item>
                    <text:p>The same as real execution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8.631cm" svg:height="7.919cm" svg:x="15.244cm" svg:y="5.566cm">
          <draw:text-box>
            <text:p text:style-name="P11"><text:span text:style-name="T10">void</text:span><text:span text:style-name="T11"> </text:span><text:span text:style-name="T12">fun(List node) {</text:span></text:p>
            <text:p text:style-name="P11"><text:span text:style-name="T12"><text:s text:c="2"/></text:span><text:span text:style-name="T12">List node1</text:span><text:span text:style-name="T11"> </text:span><text:span text:style-name="T12">=</text:span><text:span text:style-name="T11"> </text:span><text:span text:style-name="T12">node;</text:span></text:p>
            <text:p text:style-name="P11"><text:span text:style-name="T24"><text:s text:c="2"/></text:span><text:span text:style-name="T24">while</text:span><text:span text:style-name="T11"> </text:span><text:span text:style-name="T12">(node1) {</text:span></text:p>
            <text:p text:style-name="P11"><text:span text:style-name="T11"><text:s text:c="4"/></text:span><text:span text:style-name="T12">lock(node1-&gt;lock);</text:span></text:p>
            <text:p text:style-name="P11"><text:span text:style-name="T12"><text:s text:c="4"/></text:span><text:span text:style-name="T12">node1</text:span><text:span text:style-name="T11"> </text:span><text:span text:style-name="T12">=</text:span><text:span text:style-name="T11"> </text:span><text:span text:style-name="T12">node1-&gt;next;</text:span></text:p>
            <text:p text:style-name="P11"><text:span text:style-name="T12"><text:s text:c="2"/></text:span><text:span text:style-name="T12">}</text:span></text:p>
            <text:p text:style-name="P11"><text:span text:style-name="T12"><text:s text:c="2"/></text:span><text:span text:style-name="T12">stuff();</text:span></text:p>
            <text:p text:style-name="P11"><text:span text:style-name="T24"><text:s text:c="2"/></text:span><text:span text:style-name="T24">while</text:span><text:span text:style-name="T11"> </text:span><text:span text:style-name="T12">(node) {</text:span></text:p>
            <text:p text:style-name="P11"><text:span text:style-name="T11"><text:s text:c="4"/></text:span><text:span text:style-name="T12">unlock(node-&gt;lock);</text:span></text:p>
            <text:p text:style-name="P11"><text:span text:style-name="T12"><text:s text:c="4"/></text:span><text:span text:style-name="T12">node</text:span><text:span text:style-name="T11"> </text:span><text:span text:style-name="T12">=</text:span><text:span text:style-name="T11"> </text:span><text:span text:style-name="T12">node-&gt;next;</text:span></text:p>
            <text:p text:style-name="P11"><text:span text:style-name="T12"><text:s text:c="2"/></text:span><text:span text:style-name="T12">}</text:span></text:p>
            <text:p text:style-name="P11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Slicing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Technique from 1970s (Weiser)</text:p>
              </text:list-item>
              <text:list-item>
                <text:p>Remove irrelevant code</text:p>
                <text:list>
                  <text:list-item>
                    <text:p>No change to meaning of substantial</text:p>
                  </text:list-item>
                </text:list>
              </text:list-item>
              <text:list-item>
                <text:p>Inter-procedural extension</text:p>
              </text:list-item>
            </text:list>
          </draw:text-box>
        </draw:frame>
        <draw:frame draw:style-name="gr10" draw:text-style-name="P12" draw:layer="layout" svg:width="8.63cm" svg:height="6.641cm" svg:x="8.388cm" svg:y="10.071cm">
          <draw:text-box>
            <text:p text:style-name="P11"><text:span text:style-name="T10">void</text:span><text:span text:style-name="T11"> </text:span><text:span text:style-name="T12">fun(</text:span><text:span text:style-name="T10">int</text:span><text:span text:style-name="T11"> </text:span><text:span text:style-name="T12">x) {</text:span></text:p>
            <text:p text:style-name="P11"><text:span text:style-name="T11"><text:s text:c="2"/></text:span><text:span text:style-name="T24">if</text:span><text:span text:style-name="T11"> </text:span><text:span text:style-name="T12">(x) {</text:span></text:p>
            <text:p text:style-name="P11"><text:span text:style-name="T12"><text:s text:c="4"/></text:span><text:span text:style-name="T12">print(“locking...“);</text:span></text:p>
            <text:p text:style-name="P11"><text:span text:style-name="T11"><text:s text:c="4"/></text:span><text:span text:style-name="T12">lock();</text:span></text:p>
            <text:p text:style-name="P11"><text:span text:style-name="T12"><text:s text:c="4"/></text:span><text:span text:style-name="T12">locked</text:span><text:span text:style-name="T11"> </text:span><text:span text:style-name="T12">=</text:span><text:span text:style-name="T11"> </text:span><text:span text:style-name="T25">1</text:span><text:span text:style-name="T12">;</text:span></text:p>
            <text:p text:style-name="P11"><text:span text:style-name="T11"><text:s text:c="2"/></text:span><text:span text:style-name="T12">}</text:span></text:p>
            <text:p text:style-name="P11"><text:span text:style-name="T11"><text:s text:c="2"/></text:span><text:span text:style-name="T12">stuff();</text:span></text:p>
            <text:p text:style-name="P11"><text:span text:style-name="T11"><text:s text:c="2"/></text:span><text:span text:style-name="T24">if</text:span><text:span text:style-name="T11"> </text:span><text:span text:style-name="T12">(locked)</text:span></text:p>
            <text:p text:style-name="P11"><text:span text:style-name="T11"><text:s text:c="4"/></text:span><text:span text:style-name="T12">unlock();</text:span></text:p>
            <text:p text:style-name="P11"><text:span text:style-name="T12">}</text:span></text:p>
          </draw:text-box>
        </draw:frame>
        <draw:frame draw:style-name="gr10" draw:text-style-name="P12" xml:id="id15" draw:id="id15" draw:layer="layout" svg:width="8.63cm" svg:height="6.641cm" svg:x="8.388cm" svg:y="10.072cm">
          <draw:text-box>
            <text:p text:style-name="P11"><text:span text:style-name="T10">void</text:span><text:span text:style-name="T11"> </text:span><text:span text:style-name="T12">fun(</text:span><text:span text:style-name="T10">int</text:span><text:span text:style-name="T11"> </text:span><text:span text:style-name="T12">x) {</text:span></text:p>
            <text:p text:style-name="P11"><text:span text:style-name="T11"><text:s text:c="2"/></text:span><text:span text:style-name="T24">if</text:span><text:span text:style-name="T11"> </text:span><text:span text:style-name="T12">(x) {</text:span></text:p>
            <text:p text:style-name="P11"><text:span text:style-name="T12"><text:s text:c="4"/></text:span><text:span text:style-name="T26">print(“locking...“);</text:span></text:p>
            <text:p text:style-name="P11"><text:span text:style-name="T11"><text:s text:c="4"/></text:span><text:span text:style-name="T12">lock();</text:span></text:p>
            <text:p text:style-name="P11"><text:span text:style-name="T12"><text:s text:c="4"/></text:span><text:span text:style-name="T12">locked</text:span><text:span text:style-name="T11"> </text:span><text:span text:style-name="T12">=</text:span><text:span text:style-name="T11"> </text:span><text:span text:style-name="T25">1</text:span><text:span text:style-name="T12">;</text:span></text:p>
            <text:p text:style-name="P11"><text:span text:style-name="T11"><text:s text:c="2"/></text:span><text:span text:style-name="T12">}</text:span></text:p>
            <text:p text:style-name="P11"><text:span text:style-name="T11"><text:s text:c="2"/></text:span><text:span text:style-name="T26">stuff();</text:span></text:p>
            <text:p text:style-name="P11"><text:span text:style-name="T11"><text:s text:c="2"/></text:span><text:span text:style-name="T24">if</text:span><text:span text:style-name="T11"> </text:span><text:span text:style-name="T12">(locked)</text:span></text:p>
            <text:p text:style-name="P11"><text:span text:style-name="T11"><text:s text:c="4"/></text:span><text:span text:style-name="T12">unlock();</text:span></text:p>
            <text:p text:style-name="P11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ogo_20_Content" presentation:presentation-page-layout-name="AL2T1">
        <office:forms form:automatic-focus="false" form:apply-design-mode="false"/>
        <draw:frame presentation:style-name="pr12" draw:layer="layout" svg:width="20.93cm" svg:height="2.743cm" svg:x="2.286cm" svg:y="0.711cm" presentation:class="title" presentation:user-transformed="true">
          <draw:text-box>
            <text:p>Účinek slicování<text:line-break/><text:span text:style-name="T27">N</text:span><text:span text:style-name="T28">a funkcích se zámky jádra 2.6.28</text:span></text:p>
          </draw:text-box>
        </draw:frame>
        <draw:frame presentation:style-name="pr13" draw:layer="layout" svg:width="20.93cm" svg:height="12.573cm" svg:x="2.36cm" svg:y="4.088cm" presentation:class="outline" presentation:user-transformed="true">
          <draw:text-box>
            <text:list text:style-name="L3">
              <text:list-item>
                <text:p>Doba zpracování: 2 h 2 min</text:p>
              </text:list-item>
            </text:list>
          </draw:text-box>
        </draw:frame>
        <draw:frame draw:style-name="standard" draw:layer="layout" svg:width="17.649cm" svg:height="7.799cm" svg:x="3.877cm" svg:y="6.9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><text:span text:style-name="T29">Počet funkcí</text:span></text:p>
              </table:table-cell>
              <table:table-cell table:number-columns-spanned="2">
                <text:p text:style-name="P6"><text:span text:style-name="T29">Před slicováním</text:span></text:p>
              </table:table-cell>
              <table:covered-table-cell table:style-name="ce3"/>
              <table:table-cell table:number-columns-spanned="2">
                <text:p text:style-name="P6"><text:span text:style-name="T29">Po slicování</text:span></text:p>
              </table:table-cell>
              <table:covered-table-cell table:style-name="ce3"/>
            </table:table-row>
            <table:table-row table:style-name="ro1" table:default-cell-style-name="ce3">
              <table:covered-table-cell table:style-name="ce4"/>
              <table:table-cell>
                <text:p text:style-name="P6">počet</text:p>
              </table:table-cell>
              <table:table-cell>
                <text:p text:style-name="P6">%</text:p>
              </table:table-cell>
              <table:table-cell>
                <text:p text:style-name="P6">počet</text:p>
              </table:table-cell>
              <table:table-cell>
                <text:p text:style-name="P6">%</text:p>
              </table:table-cell>
            </table:table-row>
            <table:table-row table:style-name="ro1" table:default-cell-style-name="ce6">
              <table:table-cell table:style-name="ce5">
                <text:p><text:span text:style-name="T30">S assemblerem</text:span></text:p>
              </table:table-cell>
              <table:table-cell>
                <text:p text:style-name="P15">477</text:p>
              </table:table-cell>
              <table:table-cell>
                <text:p text:style-name="P15">2,8</text:p>
              </table:table-cell>
              <table:table-cell>
                <text:p text:style-name="P15"><text:span text:style-name="T30">0</text:span><text:span text:style-name="T31">†</text:span></text:p>
              </table:table-cell>
              <table:table-cell>
                <text:p text:style-name="P15">0,0</text:p>
              </table:table-cell>
            </table:table-row>
            <table:table-row table:style-name="ro1" table:default-cell-style-name="ce6">
              <table:table-cell table:style-name="ce5">
                <text:p><text:span text:style-name="T30">S externím voláním</text:span></text:p>
              </table:table-cell>
              <table:table-cell>
                <text:p text:style-name="P15">13760</text:p>
              </table:table-cell>
              <table:table-cell>
                <text:p text:style-name="P15">80,6</text:p>
              </table:table-cell>
              <table:table-cell>
                <text:p text:style-name="P15">6174</text:p>
              </table:table-cell>
              <table:table-cell>
                <text:p text:style-name="P15">36,2</text:p>
              </table:table-cell>
            </table:table-row>
            <table:table-row table:style-name="ro1" table:default-cell-style-name="ce6">
              <table:table-cell table:style-name="ce5">
                <text:p><text:span text:style-name="T30">S cyklem</text:span></text:p>
              </table:table-cell>
              <table:table-cell>
                <text:p text:style-name="P15">11243</text:p>
              </table:table-cell>
              <table:table-cell>
                <text:p text:style-name="P15">65,9</text:p>
              </table:table-cell>
              <table:table-cell>
                <text:p text:style-name="P15">6207</text:p>
              </table:table-cell>
              <table:table-cell>
                <text:p text:style-name="P15">36,4</text:p>
              </table:table-cell>
            </table:table-row>
            <table:table-row table:style-name="ro1" table:default-cell-style-name="ce6">
              <table:table-cell table:style-name="ce5">
                <text:p><text:span text:style-name="T30">Bez ASM a volání</text:span></text:p>
              </table:table-cell>
              <table:table-cell>
                <text:p text:style-name="P15">3269</text:p>
              </table:table-cell>
              <table:table-cell table:style-name="ce7">
                <text:p text:style-name="P15"><text:span text:style-name="T32">19,2</text:span></text:p>
              </table:table-cell>
              <table:table-cell>
                <text:p text:style-name="P15">10882</text:p>
              </table:table-cell>
              <table:table-cell table:style-name="ce7">
                <text:p text:style-name="P15"><text:span text:style-name="T32">63,8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30">Bez ASM, volání a cyklů</text:span></text:p>
              </table:table-cell>
              <table:table-cell>
                <text:p text:style-name="P15">1855</text:p>
              </table:table-cell>
              <table:table-cell table:style-name="ce7">
                <text:p text:style-name="P15"><text:span text:style-name="T32">10,9</text:span></text:p>
              </table:table-cell>
              <table:table-cell>
                <text:p text:style-name="P15">8655</text:p>
              </table:table-cell>
              <table:table-cell table:style-name="ce7">
                <text:p text:style-name="P15"><text:span text:style-name="T32">50,7</text:span></text:p>
              </table:table-cell>
            </table:table-row>
            <table:table-row table:style-name="ro1" table:default-cell-style-name="ce5">
              <table:table-cell>
                <text:p>Celkem</text:p>
              </table:table-cell>
              <table:table-cell table:style-name="ce6" table:number-columns-spanned="4">
                <text:p text:style-name="P6">17069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3.343cm" svg:height="0.806cm" svg:x="1.055cm" svg:y="16.884cm">
          <draw:text-box>
            <text:p><text:span text:style-name="T33">† </text:span><text:span text:style-name="T33">ignoruje 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Kle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ymbolický exekutor</text:p>
              </text:list-item>
              <text:list-item>
                <text:p>Existující a udržovaný kód</text:p>
              </text:list-item>
              <text:list-item>
                <text:p>Funguje nad LLVM</text:p>
              </text:list-item>
              <text:list-item>
                <text:p>Open Source</text:p>
              </text:list-item>
              <text:list-item>
                <text:p xml:id="id16" text:id="id16">Špatné heuristiky</text:p>
                <text:list>
                  <text:list-item>
                    <text:p xml:id="id17" text:id="id17">Cykly jsou smrtící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Úskalí symbolické exekuce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Assembler</text:p>
                <text:list>
                  <text:list-item>
                    <text:p>Optimalizace</text:p>
                  </text:list-item>
                  <text:list-item>
                    <text:p>Většinu lze nahradit C/LLVM kódem</text:p>
                  </text:list-item>
                </text:list>
              </text:list-item>
              <text:list-item>
                <text:p>Externí volání</text:p>
                <text:list>
                  <text:list-item>
                    <text:p>Celý projekt i se závislostmi</text:p>
                  </text:list-item>
                </text:list>
              </text:list-item>
              <text:list-item>
                <text:p>Cykly</text:p>
                <text:list>
                  <text:list-item>
                    <text:p>Heuristi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>
          <draw:text-box>
            <text:p>Použití techniky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Ověřování výstupu statické analýzy</text:p>
                <text:list>
                  <text:list-item>
                    <text:p>Odhalí falešná hlášení</text:p>
                  </text:list-item>
                  <text:list-item>
                    <text:p>Nemusí procházet celý projekt</text:p>
                  </text:list-item>
                </text:list>
              </text:list-item>
              <text:list-item>
                <text:p xml:id="id18" text:id="id18">Samostatný nástroj na hledání chyb</text:p>
                <text:list>
                  <text:list-item>
                    <text:p xml:id="id19" text:id="id19">Přesnější</text:p>
                  </text:list-item>
                  <text:list-item>
                    <text:p xml:id="id20" text:id="id20">Nemusí najít chyb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-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Experiments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Linux kernel</text:p>
                <text:list>
                  <text:list-item>
                    <text:p>Rozsáhlý kód</text:p>
                  </text:list-item>
                  <text:list-item>
                    <text:p>Assembler</text:p>
                  </text:list-item>
                  <text:list-item>
                    <text:p>Neexistuje externí volání</text:p>
                    <text:list>
                      <text:list-item>
                        <text:p>Máme všechen kód, ale ne v C</text:p>
                      </text:list-item>
                    </text:list>
                  </text:list-item>
                </text:list>
              </text:list-item>
              <text:list-item>
                <text:p xml:id="id21" text:id="id21">Version 2.6.28</text:p>
                <text:list>
                  <text:list-item>
                    <text:p xml:id="id22" text:id="id22">Označené chyby a falešná hlášení</text:p>
                  </text:list-item>
                  <text:list-item>
                    <text:p xml:id="id23" text:id="id23">Lze porovnat s jinými nástroj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Running Time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Podmínky</text:p>
                <text:list>
                  <text:list-item>
                    <text:p>CPU: Core 2 Duo 3 GHz</text:p>
                  </text:list-item>
                  <text:list-item>
                    <text:p>Paměť: 6 GiB</text:p>
                  </text:list-item>
                </text:list>
              </text:list-item>
              <text:list-item>
                <text:p xml:id="id24" text:id="id24">Stanse: 1 h 54 min</text:p>
              </text:list-item>
              <text:list-item>
                <text:p xml:id="id25" text:id="id25">Nová technika</text:p>
                <text:list>
                  <text:list-item>
                    <text:p xml:id="id26" text:id="id26">Instrumentace a překlad do LLVM: 3 h 21 min</text:p>
                  </text:list-item>
                  <text:list-item>
                    <text:p xml:id="id27" text:id="id27">Slicing: 2 h 2 min</text:p>
                  </text:list-item>
                  <text:list-item>
                    <text:p xml:id="id28" text:id="id28">Klee: 9 dní (odha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Čas běhu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Timeout nastaven na 20 s</text:p>
                <text:list>
                  <text:list-item>
                    <text:p xml:id="id29" text:id="id29">Dopočítá 21 % funkcí</text:p>
                  </text:list-item>
                  <text:list-item>
                    <text:p>Bez slicování: &lt; 1 %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Memory Consumption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Stanse: 1 GiB</text:p>
              </text:list-item>
              <text:list-item>
                <text:p xml:id="id30" text:id="id30">Nová technika</text:p>
                <text:list>
                  <text:list-item>
                    <text:p xml:id="id31" text:id="id31">Instrumentace a překlad do LLVM: 300 MiB</text:p>
                  </text:list-item>
                  <text:list-item>
                    <text:p xml:id="id32" text:id="id32">Slicing: 200 MiB</text:p>
                  </text:list-item>
                  <text:list-item>
                    <text:p xml:id="id33" text:id="id33">Klee: 1,2 GiB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Results<text:line-break/><text:span text:style-name="T34">Locking Errors</text:span></text:p>
          </draw:text-box>
        </draw:frame>
        <draw:frame draw:style-name="standard" draw:layer="layout" svg:width="16.177cm" svg:height="2.915cm" svg:x="4.612cm" svg:y="10.268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1" table:default-cell-style-name="ce8">
              <table:table-cell>
                <text:p><text:span text:style-name="T4">Nástroj</text:span></text:p>
              </table:table-cell>
              <table:table-cell>
                <text:p><text:span text:style-name="T4">Falešná hlášení</text:span></text:p>
              </table:table-cell>
              <table:table-cell>
                <text:p><text:span text:style-name="T4">Reálné chyby</text:span></text:p>
              </table:table-cell>
            </table:table-row>
            <table:table-row table:style-name="ro1" table:default-cell-style-name="ce6">
              <table:table-cell table:style-name="ce5">
                <text:p>Stanse</text:p>
              </table:table-cell>
              <table:table-cell>
                <text:p text:style-name="P15">105</text:p>
              </table:table-cell>
              <table:table-cell>
                <text:p text:style-name="P15">49</text:p>
              </table:table-cell>
            </table:table-row>
            <table:table-row table:style-name="ro1" table:default-cell-style-name="ce6">
              <table:table-cell table:style-name="ce5">
                <text:p>Slicing a exekuce</text:p>
              </table:table-cell>
              <table:table-cell>
                <text:p text:style-name="P15">11</text:p>
              </table:table-cell>
              <table:table-cell>
                <text:p text:style-name="P15">6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0.93cm" svg:height="12.573cm" svg:x="2.286cm" svg:y="4.04cm" presentation:class="outline" presentation:user-transformed="true">
          <draw:text-box>
            <text:list text:style-name="L2">
              <text:list-item>
                <text:p>Experimental implementation</text:p>
                <text:list>
                  <text:list-item>
                    <text:p>Čísla nejsou příliš směrodatn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>
          <draw:text-box>
            <text:p>Příklady<text:line-break/><text:span text:style-name="T34">Ověřená chyba</text:span></text:p>
          </draw:text-box>
        </draw:frame>
        <draw:frame draw:style-name="gr11" draw:text-style-name="P12" draw:layer="layout" svg:width="20.146cm" svg:height="13.67cm" svg:x="2.627cm" svg:y="3.705cm">
          <draw:text-box>
            <text:p text:style-name="P11"><text:span text:style-name="T12">ssize_t</text:span><text:span text:style-name="T11"> </text:span><text:span text:style-name="T12">ext2_quota_write(</text:span><text:span text:style-name="T10">struct</text:span><text:span text:style-name="T11"> </text:span><text:span text:style-name="T12">super_block</text:span><text:span text:style-name="T11"> </text:span><text:span text:style-name="T12">*sb,</text:span><text:span text:style-name="T11"> </text:span><text:span text:style-name="T10">int</text:span><text:span text:style-name="T11"> </text:span><text:span text:style-name="T12">type,</text:span></text:p>
            <text:p text:style-name="P11"><text:span text:style-name="T11"><text:s text:c="8"/></text:span><text:span text:style-name="T10">const char</text:span><text:span text:style-name="T11"> </text:span><text:span text:style-name="T12">*data,</text:span><text:span text:style-name="T11"> </text:span><text:span text:style-name="T10">size_t</text:span><text:span text:style-name="T11"> </text:span><text:span text:style-name="T12">len,</text:span><text:span text:style-name="T11"> </text:span><text:span text:style-name="T12">loff_t off)</text:span></text:p>
            <text:p text:style-name="P11"><text:span text:style-name="T12">{</text:span></text:p>
            <text:p text:style-name="P11"><text:span text:style-name="T11"><text:s text:c="2"/></text:span><text:span text:style-name="T10">struct</text:span><text:span text:style-name="T11"> </text:span><text:span text:style-name="T12">inode</text:span><text:span text:style-name="T11"> </text:span><text:span text:style-name="T12">*inode</text:span><text:span text:style-name="T11"> </text:span><text:span text:style-name="T12">=</text:span><text:span text:style-name="T11"> </text:span><text:span text:style-name="T12">sb_dqopt(sb)-&gt;files[type];</text:span></text:p>
            <text:p text:style-name="P11"><text:span text:style-name="T11"><text:s text:c="2"/></text:span><text:span text:style-name="T10">int</text:span><text:span text:style-name="T11"> </text:span><text:span text:style-name="T12">err</text:span><text:span text:style-name="T11"> </text:span><text:span text:style-name="T12">=</text:span><text:span text:style-name="T11"> </text:span><text:span text:style-name="T25">0</text:span><text:span text:style-name="T12">;</text:span></text:p>
            <text:p text:style-name="P11"><text:span text:style-name="T11"><text:s text:c="2"/></text:span><text:span text:style-name="T10">int</text:span><text:span text:style-name="T11"> </text:span><text:span text:style-name="T12">tocopy;</text:span></text:p>
            <text:p text:style-name="P11"><text:span text:style-name="T11"><text:s text:c="2"/></text:span><text:span text:style-name="T10">size_t</text:span><text:span text:style-name="T11"> </text:span><text:span text:style-name="T12">towrite</text:span><text:span text:style-name="T11"> </text:span><text:span text:style-name="T12">=</text:span><text:span text:style-name="T11"> </text:span><text:span text:style-name="T12">len;</text:span></text:p>
            <text:p text:style-name="P11"><text:span text:style-name="T11"/></text:p>
            <text:p text:style-name="P11"><text:span text:style-name="T11"><text:s text:c="2"/></text:span><text:span text:style-name="T12">mutex_lock_nested(&amp;inode-&gt;i_mutex,</text:span><text:span text:style-name="T11"> </text:span><text:span text:style-name="T12">I_MUTEX_QUOTA);</text:span></text:p>
            <text:p text:style-name="P11"><text:span text:style-name="T11"><text:s text:c="2"/></text:span><text:span text:style-name="T24">while</text:span><text:span text:style-name="T11"> </text:span><text:span text:style-name="T12">(towrite</text:span><text:span text:style-name="T11"> </text:span><text:span text:style-name="T12">&gt;</text:span><text:span text:style-name="T11"> </text:span><text:span text:style-name="T25">0</text:span><text:span text:style-name="T12">) {</text:span></text:p>
            <text:p text:style-name="P11"><text:span text:style-name="T11"><text:s text:c="4"/></text:span><text:span text:style-name="T12">...</text:span></text:p>
            <text:p text:style-name="P11"><text:span text:style-name="T12"><text:s text:c="4"/></text:span><text:span text:style-name="T12">towrite</text:span><text:span text:style-name="T11"> </text:span><text:span text:style-name="T12">-=</text:span><text:span text:style-name="T11"> </text:span><text:span text:style-name="T12">tocopy;</text:span></text:p>
            <text:p text:style-name="P11"><text:span text:style-name="T12"><text:s text:c="4"/></text:span><text:span text:style-name="T12">data</text:span><text:span text:style-name="T11"> </text:span><text:span text:style-name="T12">+=</text:span><text:span text:style-name="T11"> </text:span><text:span text:style-name="T12">tocopy;</text:span></text:p>
            <text:p text:style-name="P11"><text:span text:style-name="T11"><text:s text:c="2"/></text:span><text:span text:style-name="T12">}</text:span></text:p>
            <text:p text:style-name="P11"><text:span text:style-name="T12">out:</text:span></text:p>
            <text:p text:style-name="P11"><text:span text:style-name="T11"><text:s text:c="2"/></text:span><text:span text:style-name="T24">if</text:span><text:span text:style-name="T11"> </text:span><text:span text:style-name="T12">(len</text:span><text:span text:style-name="T11"> </text:span><text:span text:style-name="T12">==</text:span><text:span text:style-name="T11"> </text:span><text:span text:style-name="T12">towrite)</text:span></text:p>
            <text:p text:style-name="P11"><text:span text:style-name="T11"><text:s text:c="4"/></text:span><text:span text:style-name="T24">return</text:span><text:span text:style-name="T11"> </text:span><text:span text:style-name="T12">err; </text:span><text:span text:style-name="T14">// ERROR</text:span></text:p>
            <text:p text:style-name="P11"><text:span text:style-name="T11"><text:s text:c="2"/></text:span><text:span text:style-name="T12">...</text:span></text:p>
            <text:p text:style-name="P11"><text:span text:style-name="T11"><text:s text:c="2"/></text:span><text:span text:style-name="T12">mutex_unlock(&amp;inode-&gt;i_mutex);</text:span></text:p>
            <text:p text:style-name="P11"><text:span text:style-name="T11"><text:s text:c="2"/></text:span><text:span text:style-name="T24">return</text:span><text:span text:style-name="T11"> </text:span><text:span text:style-name="T12">len</text:span><text:span text:style-name="T11"> </text:span><text:span text:style-name="T12">-</text:span><text:span text:style-name="T11"> </text:span><text:span text:style-name="T12">towrite;</text:span></text:p>
            <text:p text:style-name="P11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>
          <draw:text-box>
            <text:p>Příklady<text:line-break/><text:span text:style-name="T34">Vyvrácené falešné hlášení</text:span></text:p>
          </draw:text-box>
        </draw:frame>
        <draw:frame draw:style-name="gr12" draw:text-style-name="P12" draw:layer="layout" svg:width="22.515cm" svg:height="13.67cm" svg:x="1.458cm" svg:y="3.874cm">
          <draw:text-box>
            <text:p text:style-name="P11"><text:span text:style-name="T10">int</text:span><text:span text:style-name="T11"> </text:span><text:span text:style-name="T12">rx_refill(</text:span><text:span text:style-name="T10">struct</text:span><text:span text:style-name="T11"> </text:span><text:span text:style-name="T12">net_device</text:span><text:span text:style-name="T11"> </text:span><text:span text:style-name="T12">*ndev,</text:span><text:span text:style-name="T11"> </text:span><text:span text:style-name="T12">gfp_t gfp)</text:span></text:p>
            <text:p text:style-name="P11"><text:span text:style-name="T12">{</text:span></text:p>
            <text:p text:style-name="P11"><text:span text:style-name="T11"><text:s text:c="2"/></text:span><text:span text:style-name="T10">struct</text:span><text:span text:style-name="T11"> </text:span><text:span text:style-name="T12">ns83820</text:span><text:span text:style-name="T11"> </text:span><text:span text:style-name="T12">*dev</text:span><text:span text:style-name="T11"> </text:span><text:span text:style-name="T12">=</text:span><text:span text:style-name="T11"> </text:span><text:span text:style-name="T12">PRIV(ndev);</text:span></text:p>
            <text:p text:style-name="P11"><text:span text:style-name="T11"><text:s text:c="2"/></text:span><text:span text:style-name="T10">unsigned</text:span><text:span text:style-name="T11"> </text:span><text:span text:style-name="T12">i;</text:span></text:p>
            <text:p text:style-name="P11"><text:span text:style-name="T11"><text:s text:c="2"/></text:span><text:span text:style-name="T10">unsigned long</text:span><text:span text:style-name="T11"> </text:span><text:span text:style-name="T12">flags</text:span><text:span text:style-name="T11"> </text:span><text:span text:style-name="T12">=</text:span><text:span text:style-name="T11"> </text:span><text:span text:style-name="T25">0</text:span><text:span text:style-name="T12">;</text:span></text:p>
            <text:p text:style-name="P11"><text:span text:style-name="T11"><text:s text:c="2"/></text:span><text:span text:style-name="T12">...</text:span></text:p>
            <text:p text:style-name="P11"><text:span text:style-name="T11"><text:s text:c="2"/></text:span><text:span text:style-name="T24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1"><text:span text:style-name="T11"><text:s text:c="4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1"><text:span text:style-name="T11"><text:s text:c="2"/></text:span><text:span text:style-name="T24">for</text:span><text:span text:style-name="T11"> </text:span><text:span text:style-name="T12">(i=</text:span><text:span text:style-name="T25">0</text:span><text:span text:style-name="T12">;</text:span><text:span text:style-name="T11"> </text:span><text:span text:style-name="T12">i&lt;NR_RX_DESC;</text:span><text:span text:style-name="T11"> </text:span><text:span text:style-name="T12">i++) {</text:span></text:p>
            <text:p text:style-name="P11"><text:span text:style-name="T11"><text:s text:c="4"/></text:span><text:span text:style-name="T12">...</text:span></text:p>
            <text:p text:style-name="P11"><text:span text:style-name="T11"><text:s text:c="4"/></text:span><text:span text:style-name="T24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1"><text:span text:style-name="T11"><text:s text:c="6"/></text:span><text:span text:style-name="T12">spin_lock_irqsave(&amp;dev-&gt;rx_info.lock,</text:span><text:span text:style-name="T11"> </text:span><text:span text:style-name="T12">flags); </text:span><text:span text:style-name="T14">// ERROR</text:span></text:p>
            <text:p text:style-name="P11"><text:span text:style-name="T12"><text:s text:c="4"/></text:span><text:span text:style-name="T12">res</text:span><text:span text:style-name="T11"> </text:span><text:span text:style-name="T12">=</text:span><text:span text:style-name="T11"> </text:span><text:span text:style-name="T12">ns83820_add_rx_skb(dev,</text:span><text:span text:style-name="T11"> </text:span><text:span text:style-name="T12">skb);</text:span></text:p>
            <text:p text:style-name="P11"><text:span text:style-name="T11"><text:s text:c="4"/></text:span><text:span text:style-name="T24">if</text:span><text:span text:style-name="T11"> </text:span><text:span text:style-name="T12">(gfp</text:span><text:span text:style-name="T11"> </text:span><text:span text:style-name="T12">!=</text:span><text:span text:style-name="T11"> </text:span><text:span text:style-name="T12">GFP_ATOMIC)</text:span></text:p>
            <text:p text:style-name="P11"><text:span text:style-name="T11"><text:s text:c="6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1"><text:span text:style-name="T11"><text:s text:c="4"/></text:span><text:span text:style-name="T12">...</text:span></text:p>
            <text:p text:style-name="P11"><text:span text:style-name="T11"><text:s text:c="2"/></text:span><text:span text:style-name="T12">}</text:span></text:p>
            <text:p text:style-name="P11"><text:span text:style-name="T11"><text:s text:c="2"/></text:span><text:span text:style-name="T24">if</text:span><text:span text:style-name="T11"> </text:span><text:span text:style-name="T12">(gfp</text:span><text:span text:style-name="T11"> </text:span><text:span text:style-name="T12">==</text:span><text:span text:style-name="T11"> </text:span><text:span text:style-name="T12">GFP_ATOMIC)</text:span></text:p>
            <text:p text:style-name="P11"><text:span text:style-name="T11"><text:s text:c="4"/></text:span><text:span text:style-name="T12">spin_unlock_irqrestore(&amp;dev-&gt;rx_info.lock,</text:span><text:span text:style-name="T11"> </text:span><text:span text:style-name="T12">flags); </text:span><text:span text:style-name="T14">// ERROR</text:span></text:p>
            <text:p text:style-name="P11"><text:span text:style-name="T11"><text:s text:c="2"/></text:span><text:span text:style-name="T12">...</text:span></text:p>
            <text:p text:style-name="P11"><text:span text:style-name="T1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No-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Conclusion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2">
              <text:list-item>
                <text:p>Symbolic execution</text:p>
                <text:list>
                  <text:list-item>
                    <text:p>Accurate, but slow</text:p>
                  </text:list-item>
                </text:list>
              </text:list-item>
              <text:list-item>
                <text:p>Instrumentation</text:p>
                <text:list>
                  <text:list-item>
                    <text:p>Implements automata in code</text:p>
                  </text:list-item>
                </text:list>
              </text:list-item>
              <text:list-item>
                <text:p>Slicing</text:p>
                <text:list>
                  <text:list-item>
                    <text:p>Makes SymExe useful</text:p>
                  </text:list-item>
                </text:list>
              </text:list-item>
              <text:list-item>
                <text:p xml:id="id34" text:id="id34">Future work</text:p>
                <text:list>
                  <text:list-item>
                    <text:p xml:id="id35" text:id="id35">Reduce pitfalls → speedu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all_20_to_20_Action" presentation:presentation-page-layout-name="AL3T19">
        <draw:custom-shape draw:name="TextBox 1" draw:style-name="gr13" draw:text-style-name="P18" draw:layer="layout" svg:width="18.188cm" svg:height="4.502cm" svg:x="4.386cm" svg:y="3.616cm">
          <text:p text:style-name="P17"><text:span text:style-name="T35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000000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vertical-align="top" draw:auto-grow-height="true" fo:min-height="1.281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4cm" svg:height="1.396cm" svg:x="3.3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72cm" svg:height="1.396cm" svg:x="15.21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428cm" svg:height="1.396cm" svg:x="3.47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98cm" svg:height="1.396cm" svg:x="15.855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1cm" svg:y1="18.123cm" svg:x2="2.291cm" svg:y2="19.088cm">
        <text:p/>
      </draw:line>
      <draw:line draw:name="Straight Connector 11" draw:style-name="Mgr6" draw:text-style-name="MP3" draw:layer="backgroundobjects" svg:x1="2.265cm" svg:y1="18.123cm" svg:x2="2.265cm" svg:y2="19.088cm">
        <text:p/>
      </draw:line>
      <draw:custom-shape draw:name="Text Box 4" draw:style-name="Mgr7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8" draw:text-style-name="MP5" draw:layer="backgroundobjects" svg:width="0.801cm" svg:height="0.762cm" svg:x="1.155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1.049cm" svg:x="2.286cm" svg:y="4.039cm" presentation:class="outline" presentation:placeholder="true">
        <draw:text-box/>
      </draw:frame>
      <draw:custom-shape draw:name="Rectangle 6" draw:style-name="Mgr4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2cm" svg:y1="18.124cm" svg:x2="2.292cm" svg:y2="19.089cm">
        <text:p/>
      </draw:line>
      <draw:line draw:name="Straight Connector 11" draw:style-name="Mgr6" draw:text-style-name="MP3" draw:layer="backgroundobjects" svg:x1="2.266cm" svg:y1="18.124cm" svg:x2="2.266cm" svg:y2="19.089cm">
        <text:p/>
      </draw:line>
      <draw:custom-shape draw:name="Text Box 5" draw:style-name="Mgr8" draw:text-style-name="MP5" draw:layer="backgroundobjects" svg:width="0.801cm" svg:height="0.762cm" svg:x="1.156cm" svg:y="18.233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3.295cm" svg:x="0cm" svg:y="19.316cm" presentation:class="outline" presentation:placeholder="true">
        <draw:text-box/>
      </draw:frame>
      <draw:custom-shape draw:name="Rectangle 9" draw:style-name="Mgr9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9" draw:text-style-name="MP3" draw:layer="backgroundobjects" svg:width="1.683cm" svg:height="1.833cm" svg:x="4.675cm" svg:y="9.527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0" draw:text-style-name="MP7" draw:layer="backgroundobjects" svg:width="17.492cm" svg:height="1.673cm" svg:x="3.065cm" svg:y="12.377cm">
        <text:p text:style-name="MP6"><text:span text:style-name="MT4">Thank you for your attention</text:span></text:p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5" draw:text-style-name="MP3" draw:layer="backgroundobjects" svg:x1="2.293cm" svg:y1="18.125cm" svg:x2="2.293cm" svg:y2="19.09cm">
        <text:p/>
      </draw:line>
      <draw:line draw:name="Straight Connector 11" draw:style-name="Mgr6" draw:text-style-name="MP3" draw:layer="backgroundobjects" svg:x1="2.267cm" svg:y1="18.125cm" svg:x2="2.267cm" svg:y2="19.09cm">
        <text:p/>
      </draw:line>
      <draw:custom-shape draw:name="Text Box 5" draw:style-name="Mgr8" draw:text-style-name="MP5" draw:layer="backgroundobjects" svg:width="0.801cm" svg:height="0.762cm" svg:x="1.157cm" svg:y="18.234cm">
        <text:p text:style-name="MP4"><text:span text:style-name="MT3"><text:page-number>&lt;číslo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8-10T18:29:47</dc:date>
    <meta:editing-duration>P1DT23H59M7S</meta:editing-duration>
    <meta:editing-cycles>151</meta:editing-cycles>
    <meta:generator>LibreOffice/3.5$Linux_X86_64 LibreOffice_project/350m1$Build-403</meta:generator>
    <dc:title>SUSE Template v17: 8/12/11</dc:title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