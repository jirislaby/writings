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Výchozí-subtitle">
      <style:graphic-properties draw:fill-color="#ffffff" fo:min-height="17.685cm"/>
    </style:style>
    <style:style style:name="pr2" style:family="presentation" style:parent-style-name="Výchozí-notes">
      <style:graphic-properties draw:fill-color="#ffffff" draw:auto-grow-height="true" fo:min-height="13.365cm"/>
    </style:style>
    <style:style style:name="pr3" style:family="presentation" style:parent-style-name="Výchozí-title">
      <style:graphic-properties fo:min-height="3.256cm"/>
    </style:style>
    <style:style style:name="pr4" style:family="presentation" style:parent-style-name="Výchozí-outline1" style:list-style-name="L2">
      <style:graphic-properties fo:min-height="13.609cm"/>
    </style:style>
    <style:style style:name="pr5" style:family="presentation" style:parent-style-name="Výchozí-outline1" style:list-style-name="L2">
      <style:graphic-properties fo:min-height="13.609cm"/>
    </style:style>
    <style:style style:name="pr6" style:family="presentation" style:parent-style-name="Výchozí-outline1" style:list-style-name="L2">
      <style:graphic-properties fo:min-height="13.609cm"/>
    </style:style>
    <style:style style:name="pr7" style:family="presentation" style:parent-style-name="Výchozí-outline1" style:list-style-name="L2">
      <style:graphic-properties fo:min-height="13.609cm"/>
    </style:style>
    <style:style style:name="pr8" style:family="presentation" style:parent-style-name="Výchozí-outline1" style:list-style-name="L2">
      <style:graphic-properties fo:min-height="13.609cm"/>
    </style:style>
    <style:style style:name="pr9" style:family="presentation" style:parent-style-name="Výchozí-outline1" style:list-style-name="L2">
      <style:graphic-properties fo:min-height="13.609cm"/>
    </style:style>
    <style:style style:name="pr10" style:family="presentation" style:parent-style-name="Výchozí-outline1" style:list-style-name="L2">
      <style:graphic-properties fo:min-height="13.609cm"/>
    </style:style>
    <style:style style:name="pr11" style:family="presentation" style:parent-style-name="Výchozí-outline1" style:list-style-name="L2">
      <style:graphic-properties fo:min-height="13.609cm"/>
    </style:style>
    <style:style style:name="pr12" style:family="presentation" style:parent-style-name="Výchozí-outline1" style:list-style-name="L2">
      <style:graphic-properties fo:min-height="13.609cm"/>
    </style:style>
    <style:style style:name="pr13" style:family="presentation" style:parent-style-name="Výchozí-outline1" style:list-style-name="L2">
      <style:graphic-properties fo:min-height="13.609cm"/>
    </style:style>
    <style:style style:name="pr14" style:family="presentation" style:parent-style-name="Výchozí-outline1" style:list-style-name="L2">
      <style:graphic-properties fo:min-height="13.609cm"/>
    </style:style>
    <style:style style:name="pr15" style:family="presentation" style:parent-style-name="Výchozí-outline1" style:list-style-name="L2">
      <style:graphic-properties fo:min-height="13.60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family="'Orange Kid'" style:font-pitch="variable"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deb3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deb3d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deb3d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deb3d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deb3d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deb3d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deb3d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deb3d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deb3d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deb3d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Ath5k</text:span><text:span text:style-name="T1"><text:line-break/></text:span><text:line-break/><text:span text:style-name="T2">past, present and future</text:span></text:p>
          </draw:text-box>
        </draw:frame>
        <draw:frame draw:style-name="gr1" draw:text-style-name="P1" draw:layer="layout" svg:width="10.277cm" svg:height="1.225cm" svg:x="17cm" svg:y="19cm">
          <draw:text-box>
            <text:p><text:span text:style-name="T3">Jiri Slaby &lt;jirislaby@gmail.com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resentation out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Past</text:p>
                <text:list>
                  <text:list-item>
                    <text:p>madwifi, dadwifi and derivatives</text:p>
                  </text:list-item>
                </text:list>
              </text:list-item>
              <text:list-item>
                <text:p>Present</text:p>
                <text:list>
                  <text:list-item>
                    <text:p><text:span text:style-name="T4">ath5k</text:span>, ath9k, ar9170</text:p>
                  </text:list-item>
                </text:list>
              </text:list-item>
              <text:list-item>
                <text:p>Future</text:p>
                <text:list>
                  <text:list-item>
                    <text:p><text:span text:style-name="T4">ath5k</text:span>, ath9k, ar9170, a????</text:p>
                  </text:list-item>
                </text:list>
              </text:list-item>
              <text:list-item>
                <text:p>Conclusion &amp; discus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ast I. - madwif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ands for: Multiband Atheros Driver Wireless Fidelity</text:p>
              </text:list-item>
              <text:list-item>
                <text:p>Contains whole BSD 802.11 stack</text:p>
              </text:list-item>
              <text:list-item>
                <text:p>Binary HW abstraction layer (known as HAL)</text:p>
                <text:list>
                  <text:list-item>
                    <text:p>System call wrapper, RF regulation</text:p>
                  </text:list-item>
                  <text:list-item>
                    <text:p>Provided by Atheros</text:p>
                  </text:list-item>
                </text:list>
              </text:list-item>
              <text:list-item>
                <text:p>Still used</text:p>
                <text:list>
                  <text:list-item>
                    <text:p>Stable AP mode, turbo mdoes?</text:p>
                  </text:list-item>
                  <text:list-item>
                    <text:p>Supports even new devices</text:p>
                  </text:list-item>
                </text:list>
              </text:list-item>
              <text:list-item>
                <text:p>Original author: Sam Leff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ast II. - madwifi vs. madwifi-old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heros took madwifi</text:p>
                <text:list>
                  <text:list-item>
                    <text:p>To be returned back with new features</text:p>
                  </text:list-item>
                </text:list>
              </text:list-item>
              <text:list-item>
                <text:p>Performed many changes</text:p>
                <text:list>
                  <text:list-item>
                    <text:p>Non-backportable</text:p>
                  </text:list-item>
                </text:list>
              </text:list-item>
              <text:list-item>
                <text:p>Returned back</text:p>
              </text:list-item>
              <text:list-item>
                <text:p>Meanwhile madwifi was developed</text:p>
                <text:list>
                  <text:list-item>
                    <text:p>Renamed to madwifi-old</text:p>
                  </text:list-item>
                </text:list>
              </text:list-item>
              <text:list-item>
                <text:p>Currently used madwifi is the non-ol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ast III. - madwifi-old-openha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binary HAL</text:p>
                <text:list>
                  <text:list-item>
                    <text:p>Replaced by a reverse engineered opensource version</text:p>
                    <text:list>
                      <text:list-item>
                        <text:p>Author: Reyk Floeter</text:p>
                      </text:list-item>
                    </text:list>
                  </text:list-item>
                </text:list>
              </text:list-item>
              <text:list-item>
                <text:p>First step to have an in-kernel Atheros driver</text:p>
              </text:list-item>
              <text:list-item>
                <text:p>Still a built-in BSD 802.11 stack</text:p>
              </text:list-item>
              <text:list-item>
                <text:p>Unused these days</text:p>
                <text:list>
                  <text:list-item>
                    <text:p>Unmaintained</text:p>
                  </text:list-item>
                  <text:list-item>
                    <text:p>ath5k does better</text:p>
                  </text:list-item>
                </text:list>
              </text:list-item>
              <text:list-item>
                <text:p>Improved by: Nick Kossifid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ast IV. - dadwifi(-openhal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attempt to port madwifi to d80211 (today known as mac80211)</text:p>
              </text:list-item>
              <text:list-item>
                <text:p>dadwifi is dead</text:p>
                <text:list>
                  <text:list-item>
                    <text:p>Almost nobody ever uses that</text:p>
                  </text:list-item>
                </text:list>
              </text:list-item>
              <text:list-item>
                <text:p>Written by David Whedon</text:p>
              </text:list-item>
              <text:list-item>
                <text:p>Also an openhal version</text:p>
                <text:list>
                  <text:list-item>
                    <text:p>Both upstream blockers eliminated</text:p>
                    <text:list>
                      <text:list-item>
                        <text:p>Nobody tried to merge it though</text:p>
                      </text:list-item>
                    </text:list>
                  </text:list-item>
                  <text:list-item>
                    <text:p>By Nick Kossifid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resent I. - ath5k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madwifi-old-openhal fork</text:p>
              </text:list-item>
              <text:list-item>
                <text:p>Rewritten non-HAL part from scratch</text:p>
                <text:list>
                  <text:list-item>
                    <text:p>PCI init and handling</text:p>
                  </text:list-item>
                  <text:list-item>
                    <text:p>net80211 stack removed</text:p>
                  </text:list-item>
                  <text:list-item>
                    <text:p>mac80211 ops and structures</text:p>
                  </text:list-item>
                </text:list>
              </text:list-item>
              <text:list-item>
                <text:p>Huge cleanup of the rest</text:p>
                <text:list>
                  <text:list-item>
                    <text:p>Join the two layers together</text:p>
                  </text:list-item>
                </text:list>
              </text:list-item>
              <text:list-item>
                <text:p>Merge (2.6.25)</text:p>
              </text:list-item>
              <text:list-item>
                <text:p>Done by: 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resent II. - ath5k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rted modes: STA, IBSS, monitor</text:p>
              </text:list-item>
              <text:list-item>
                <text:p>Status: poor</text:p>
                <text:list>
                  <text:list-item>
                    <text:p>R-E HAL - many missing features</text:p>
                    <text:list>
                      <text:list-item>
                        <text:p>limited HW support (some chips defunct)</text:p>
                      </text:list-item>
                    </text:list>
                  </text:list-item>
                  <text:list-item>
                    <text:p>madwifi was still better</text:p>
                  </text:list-item>
                </text:list>
              </text:list-item>
              <text:list-item>
                <text:p>madwifi developers agreed to work on upstream ath5k</text:p>
              </text:list-item>
              <text:list-item>
                <text:p>openHAL improved</text:p>
                <text:list>
                  <text:list-item>
                    <text:p>Added support for most chips</text:p>
                    <text:list>
                      <text:list-item>
                        <text:p>We got eeprom contents, further R-E of unknown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resent III. - ath5k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is Rodriguez joined Atheros</text:p>
              </text:list-item>
              <text:list-item>
                <text:p>Atheros provided specs</text:p>
                <text:list>
                  <text:list-item>
                    <text:p>Only to madwifi developers</text:p>
                  </text:list-item>
                  <text:list-item>
                    <text:p>Huge cleanup</text:p>
                  </text:list-item>
                  <text:list-item>
                    <text:p>&lt;&lt;constants&gt;&gt; got their name</text:p>
                  </text:list-item>
                </text:list>
              </text:list-item>
              <text:list-item>
                <text:p>Atheros opened HAL</text:p>
                <text:list>
                  <text:list-item>
                    <text:p>Publically available at Luis' web</text:p>
                  </text:list-item>
                  <text:list-item>
                    <text:p>Missing code copied to the openH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resent IV. - ath5k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velopment focused on ath5k</text:p>
              </text:list-item>
              <text:list-item>
                <text:p>Fixed many chip-specific issues overtaken from openHAL</text:p>
              </text:list-item>
              <text:list-item>
                <text:p>AP mode as of 2.6.29</text:p>
                <text:list>
                  <text:list-item>
                    <text:p>To be tuned up though</text:p>
                  </text:list-item>
                </text:list>
              </text:list-item>
              <text:list-item>
                <text:p>HW WEP support as of 2.6.29</text:p>
              </text:list-item>
              <text:list-item>
                <text:p>madwifi got obsoleted by ath5k</text:p>
                <text:list>
                  <text:list-item>
                    <text:p>ath5k became stable</text:p>
                  </text:list-item>
                  <text:list-item>
                    <text:p>Testers needed (feature requests, regressions against madwifi, …)</text:p>
                  </text:list-item>
                </text:list>
              </text:list-item>
              <text:list-item>
                <text:p>Status: http://madwifi-project.org/wiki/About/ath5k/Stat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Present V. - ath9k, ar9170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heros produces drivers on its own</text:p>
              </text:list-item>
              <text:list-item>
                <text:p>ar9000 chips with PCI and USB interfaces</text:p>
              </text:list-item>
              <text:list-item>
                <text:p>802.11n support</text:p>
              </text:list-item>
              <text:list-item>
                <text:p>Fully opensource</text:p>
                <text:list>
                  <text:list-item>
                    <text:p>ar9170 firmware was opened a week ago</text:p>
                  </text:list-item>
                </text:list>
              </text:list-item>
              <text:list-item>
                <text:p>They merge them</text:p>
              </text:list-item>
              <text:list-item>
                <text:p>They <text:span text:style-name="T5">support</text:span> them</text:p>
                <text:list>
                  <text:list-item>
                    <text:p>Including bugzillas craw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Future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pefully Atheros will continue in its politics</text:p>
                <text:list>
                  <text:list-item>
                    <text:p>Supported ath products in Linux</text:p>
                  </text:list-item>
                </text:list>
              </text:list-item>
              <text:list-item>
                <text:p>ath5k devices are spread</text:p>
                <text:list>
                  <text:list-item>
                    <text:p>Bugs - fix them</text:p>
                    <text:list>
                      <text:list-item>
                        <text:p>Certain circumstances, special cards, ...</text:p>
                      </text:list-item>
                    </text:list>
                  </text:list-item>
                  <text:list-item>
                    <text:p>Missing features</text:p>
                    <text:list>
                      <text:list-item>
                        <text:p>WPA en/decryption in the HW</text:p>
                      </text:list-item>
                      <text:list-item>
                        <text:p>RF kill support</text:p>
                      </text:list-item>
                      <text:list-item>
                        <text:p>LED support</text:p>
                      </text:list-item>
                      <text:list-item>
                        <text:p>Turbo r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3">$ Conclusion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lenty of fully opensource Atheros drivers out there</text:p>
                <text:list>
                  <text:list-item>
                    <text:p>ath*k, ar9170</text:p>
                  </text:list-item>
                </text:list>
              </text:list-item>
              <text:list-item>
                <text:p>ath5k will supersede madwifi</text:p>
                <text:list>
                  <text:list-item>
                    <text:p>madwifi is deserved to dismiss in the future</text:p>
                  </text:list-item>
                </text:list>
                <text:p><text:span text:style-name="T6"/></text:p>
                <text:p text:style-name="P4"><text:span text:style-name="T6">Thank you for your attention!</text:span></text:p>
                <text:p text:style-name="P4"><text:span text:style-name="T6">Question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deb3d" style:text-outline="false" style:text-line-through-style="none" fo:font-family="'Orange Kid'" style:font-style-name="Běžné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 draw:fill-image-width="0cm" draw:fill-image-height="0cm"/>
      <style:paragraph-properties fo:margin-top="0.42cm" fo:margin-bottom="0.21cm"/>
      <style:text-properties fo:color="#3deb3d" fo:font-family="Joystix" style:font-style-name="Běžné" style:font-pitch="variable" fo:font-size="3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deb3d" style:text-outline="false" style:text-line-through-style="none" fo:font-family="'Orange Kid'" style:font-style-name="Běžné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deb3d" style:text-outline="false" style:text-line-through-style="none" fo:font-family="Joystix" style:font-style-name="Běžné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deb3d" style:text-outline="false" style:text-line-through-style="none" fo:font-family="'Orange Kid'" style:font-style-name="Běžné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0T14:58:14</meta:creation-date>
    <meta:editing-duration>PT12H45M18S</meta:editing-duration>
    <meta:editing-cycles>17</meta:editing-cycles>
    <dc:date>2009-06-13T10:04:05</dc:date>
    <meta:generator>OpenOffice.org/3.1$Unix OpenOffice.org_project/310m21$Build-9319</meta:generator>
    <meta:document-statistic meta:object-count="73"/>
  </office:meta>
</office:document-meta>
</file>