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2.539cm" fo:min-width="7.11cm"/>
    </style:style>
    <style:style style:name="gr3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Break-title">
      <style:graphic-properties draw:auto-grow-height="true" fo:min-height="3.18cm" fo:min-width="20.43cm"/>
    </style:style>
    <style:style style:name="pr11" style:family="presentation" style:parent-style-name="Break-outline1">
      <style:graphic-properties fo:min-height="10.799cm" fo:min-width="20.43cm"/>
    </style:style>
    <style:style style:name="pr12" style:family="presentation" style:parent-style-name="Break-notes">
      <style:graphic-properties draw:fill-color="#ffffff" draw:auto-grow-height="true" fo:min-height="12.572cm" fo:min-width="16.771cm"/>
    </style:style>
    <style:style style:name="pr13" style:family="presentation" style:parent-style-name="No-Logo_20_Content-outline1">
      <style:graphic-properties fo:min-height="10.799cm" fo:min-width="20.43cm"/>
    </style:style>
    <style:style style:name="pr14" style:family="presentation" style:parent-style-name="Call_20_to_20_Action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text-properties fo:font-size="24pt" fo:language="en" fo:country="GB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32pt" style:font-size-asian="32pt" style:font-size-complex="32pt"/>
    </style:style>
    <style:style style:name="P10" style:family="paragraph">
      <style:paragraph-properties fo:margin-top="0cm" fo:margin-bottom="0cm" fo:line-height="93%" fo:text-align="start"/>
    </style:style>
    <style:style style:name="P11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24pt" fo:language="en" fo:country="GB" style:font-size-asian="32pt" style:font-size-complex="32pt"/>
    </style:style>
    <style:style style:name="T8" style:family="text">
      <style:text-properties fo:font-family="'LM Mono 12'" style:font-pitch="fixed"/>
    </style:style>
    <style:style style:name="T9" style:family="text">
      <style:text-properties fo:color="#00ff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0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1" style:family="text">
      <style:text-properties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" style:family="text">
      <style:text-properties fo:color="#ff3366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3" style:family="text">
      <style:text-properties style:text-line-through-style="non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4" style:family="text">
      <style:text-properties fo:color="#ffffff" style:text-line-through-style="non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5" style:family="text">
      <style:text-properties fo:color="#ff3366" style:text-line-through-style="none" fo:font-family="'Courier New'" style:font-family-generic="modern" style:font-pitch="fixed" fo:font-size="18pt" fo:text-shadow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6" style:family="text">
      <style:text-properties fo:color="#ff3366" style:text-line-through-style="solid" style:text-line-through-width="bold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7" style:family="text">
      <style:text-properties style:text-line-through-style="solid" style:text-line-through-width="bold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8" style:family="text">
      <style:text-properties fo:color="#ffffff" style:text-line-through-style="solid" style:text-line-through-width="bold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number text:level="1" style:num-suffix=")" style:num-format="1">
        <style:list-level-properties text:space-before="0.73cm" text:min-label-width="0.47cm"/>
        <style:text-properties fo:color="#454c51" fo:font-size="100%"/>
      </text:list-level-style-number>
      <text:list-level-style-number text:level="2" style:num-suffix=")" style:num-format="1">
        <style:list-level-properties text:space-before="1.905cm" text:min-label-width="0.483cm"/>
        <style:text-properties fo:color="#454c51" fo:font-size="100%"/>
      </text:list-level-style-number>
      <text:list-level-style-number text:level="3" style:num-suffix=")" style:num-format="1">
        <style:list-level-properties text:space-before="3.13cm" text:min-label-width="0.47cm"/>
        <style:text-properties fo:color="#454c51" fo:font-size="100%"/>
      </text:list-level-style-number>
      <text:list-level-style-number text:level="4" style:num-suffix=")" style:num-format="1">
        <style:list-level-properties text:space-before="4.33cm" text:min-label-width="0.47cm"/>
        <style:text-properties fo:color="#454c51" fo:font-size="100%"/>
      </text:list-level-style-number>
      <text:list-level-style-number text:level="5" style:num-suffix=")" style:num-format="1">
        <style:list-level-properties text:space-before="5.498cm" text:min-label-width="0.483cm"/>
        <style:text-properties fo:color="#454c51" fo:font-size="100%"/>
      </text:list-level-style-number>
      <text:list-level-style-number text:level="6" style:num-suffix=")" style:num-format="1">
        <style:list-level-properties text:space-before="6.706cm" text:min-label-width="0.483cm"/>
        <style:text-properties fo:color="#454c51" fo:font-size="100%"/>
      </text:list-level-style-number>
      <text:list-level-style-number text:level="7" style:num-suffix=")" style:num-format="1">
        <style:list-level-properties text:space-before="7.899cm" text:min-label-width="0.483cm"/>
        <style:text-properties fo:color="#454c51" fo:font-size="100%"/>
      </text:list-level-style-number>
      <text:list-level-style-number text:level="8" style:num-suffix=")" style:num-format="1">
        <style:list-level-properties text:space-before="9.119cm" text:min-label-width="0.483cm"/>
        <style:text-properties fo:color="#454c51" fo:font-size="100%"/>
      </text:list-level-style-number>
      <text:list-level-style-number text:level="9" style:num-suffix=")" style:num-format="1">
        <style:list-level-properties text:space-before="10.312cm" text:min-label-width="0.483cm"/>
        <style:text-properties fo:color="#454c51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54c51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2.623cm" svg:x="2.286cm" svg:y="8.198cm" presentation:class="title" presentation:user-transformed="true">
          <draw:text-box>
            <text:p text:style-name="P1"><text:span text:style-name="T1">Symbiotic </text:span><text:span text:style-name="T2"><text:line-break/></text:span><text:span text:style-name="T3">Synergy of Instrumentation, Slicing, and Symbolic Execution</text:span></text:p>
          </draw:text-box>
        </draw:frame>
        <draw:frame presentation:style-name="pr2" draw:text-style-name="P3" draw:layer="layout" svg:width="10.566cm" svg:height="3.966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ček, Marek Trtík</text:span></text:p>
            <text:p text:style-name="P3"><text:span text:style-name="T6">Masaryk University</text:span></text:p>
            <text:p text:style-name="P3"><text:span text:style-name="T6">Brno, Czech Republic</text:span></text:p>
            <text:p text:style-name="P3"><text:span text:style-name="T6"/></text:p>
            <text:p text:style-name="P3"><text:span text:style-name="T6">TACAS 2013 – SV-CO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esentation Outline</text:p>
          </draw:text-box>
        </draw:frame>
        <draw:frame presentation:style-name="pr5" draw:text-style-name="P4" draw:layer="layout" svg:width="20.93cm" svg:height="12.573cm" svg:x="2.115cm" svg:y="4.039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7">Result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Overview of Symbiotic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Steps</text:p>
              </text:list-item>
            </text:list>
            <text:list text:style-name="L3">
              <text:list-item>
                <text:list>
                  <text:list-item>
                    <text:p><text:s/>Instrumentation</text:p>
                  </text:list-item>
                  <text:list-item>
                    <text:p><text:s/>Slicing</text:p>
                  </text:list-item>
                  <text:list-item>
                    <text:p><text:s/>Symbolic exec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tep 1: Instrumentat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Primary task: insert <text:span text:style-name="T8">assert</text:span>'s at ERROR labels</text:p>
                <text:list>
                  <text:list-item>
                    <text:p>Done by simple scripting</text:p>
                  </text:list-item>
                  <text:list-item>
                    <text:p>On C level</text:p>
                  </text:list-item>
                </text:list>
              </text:list-item>
              <text:list-item>
                <text:p>But: it also glues all together</text:p>
                <text:list>
                  <text:list-item>
                    <text:p>Provides implementation for <text:span text:style-name="T8">__VERIFIER_*</text:span></text:p>
                  </text:list-item>
                  <text:list-item>
                    <text:p>Some match&amp;replace to fix build errors</text:p>
                    <text:list>
                      <text:list-item>
                        <text:p>Remove proprietary <text:span text:style-name="T8">assert</text:span> and<text:span text:style-name="T8"> __builtin_*</text:span> definitions, etc.</text:p>
                      </text:list-item>
                    </text:list>
                  </text:list-item>
                </text:list>
              </text:list-item>
              <text:list-item>
                <text:p>Final step: compile to LLVM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draw:style-name="gr2" draw:text-style-name="P7" draw:layer="layout" svg:width="7.741cm" svg:height="5.291cm" svg:x="8.829cm" svg:y="12.32cm">
          <draw:text-box>
            <text:p text:style-name="P6"><text:span text:style-name="T9">void</text:span><text:span text:style-name="T10"> fun(</text:span><text:span text:style-name="T9">int</text:span><text:span text:style-name="T10"> x) {</text:span></text:p>
            <text:p text:style-name="P6"><text:span text:style-name="T11"><text:s text:c="2"/></text:span><text:span text:style-name="T12">if</text:span><text:span text:style-name="T11"> </text:span><text:span text:style-name="T10">(x)</text:span></text:p>
            <text:p text:style-name="P6"><text:span text:style-name="T10"><text:s text:c="4"/></text:span><text:span text:style-name="T10">irrelevant();</text:span></text:p>
            <text:p text:style-name="P6"><text:span text:style-name="T13"><text:s text:c="2"/></text:span><text:span text:style-name="T14">stuff();</text:span></text:p>
            <text:p text:style-name="P6"><text:span text:style-name="T11"><text:s text:c="2"/></text:span><text:span text:style-name="T12">if</text:span><text:span text:style-name="T11"> </text:span><text:span text:style-name="T10">(x)</text:span></text:p>
            <text:p text:style-name="P6"><text:span text:style-name="T10"><text:s text:c="5"/></text:span><text:span text:style-name="T15">assert(false);</text:span></text:p>
            <text:p text:style-name="P6"><text:span text:style-name="T10">}</text:span></text:p>
          </draw:text-box>
        </draw:frame>
        <draw:frame draw:style-name="gr2" draw:text-style-name="P7" xml:id="id1" draw:id="id1" draw:layer="layout" svg:width="7.741cm" svg:height="5.291cm" svg:x="8.829cm" svg:y="12.321cm">
          <draw:text-box>
            <text:p text:style-name="P6"><text:span text:style-name="T9">void</text:span><text:span text:style-name="T11"> </text:span><text:span text:style-name="T10">fun(</text:span><text:span text:style-name="T9">int</text:span><text:span text:style-name="T11"> </text:span><text:span text:style-name="T10">x) {</text:span></text:p>
            <text:p text:style-name="P6"><text:span text:style-name="T11"><text:s text:c="2"/></text:span><text:span text:style-name="T16">if</text:span><text:span text:style-name="T17"> </text:span><text:span text:style-name="T18">(x)</text:span></text:p>
            <text:p text:style-name="P6"><text:span text:style-name="T14"><text:s text:c="4"/></text:span><text:span text:style-name="T18">irrelevant();</text:span></text:p>
            <text:p text:style-name="P6"><text:span text:style-name="T17"><text:s text:c="2"/></text:span><text:span text:style-name="T18">stuff();</text:span></text:p>
            <text:p text:style-name="P6"><text:span text:style-name="T11"><text:s text:c="2"/></text:span><text:span text:style-name="T12">if</text:span><text:span text:style-name="T11"> </text:span><text:span text:style-name="T10">(x)</text:span></text:p>
            <text:p text:style-name="P6"><text:span text:style-name="T10"><text:s text:c="5"/></text:span><text:span text:style-name="T15">assert(false);</text:span></text:p>
            <text:p text:style-name="P6"><text:span text:style-name="T10">}</text:span></text:p>
          </draw:text-box>
        </draw:frame>
        <draw:frame presentation:style-name="pr7" draw:layer="layout" svg:width="20.93cm" svg:height="2.743cm" svg:x="2.286cm" svg:y="0.711cm" presentation:class="title">
          <draw:text-box>
            <text:p>Step 2: Slicing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Weiser in 1970s</text:p>
              </text:list-item>
              <text:list-item>
                <text:p>Removes irrelevant code</text:p>
              </text:list-item>
              <text:list-item>
                <text:p>The produced code behaves the same with respect to instrumented <text:span text:style-name="T8">assert</text:span>'s (slicing criteria)</text:p>
              </text:list-item>
              <text:list-item>
                <text:p>Input: LLVM</text:p>
              </text:list-item>
              <text:list-item>
                <text:p>Produces: sliced LLV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tep 3: Symbolic Execution</text:p>
          </draw:text-box>
        </draw:frame>
        <draw:frame presentation:style-name="pr8" draw:layer="layout" svg:width="20.93cm" svg:height="12.573cm" svg:x="2.257cm" svg:y="4.039cm" presentation:class="outline" presentation:user-transformed="true">
          <draw:text-box>
            <text:list text:style-name="L2">
              <text:list-item>
                <text:p>King in 1970s</text:p>
              </text:list-item>
              <text:list-item>
                <text:p>Exact</text:p>
                <text:list>
                  <text:list-item>
                    <text:p>No false-positives in general</text:p>
                  </text:list-item>
                </text:list>
              </text:list-item>
              <text:list-item>
                <text:p>Slow</text:p>
                <text:list>
                  <text:list-item>
                    <text:p>STP solver consumes time</text:p>
                  </text:list-item>
                </text:list>
              </text:list-item>
              <text:list-item>
                <text:p>Tool used: Klee</text:p>
                <text:list>
                  <text:list-item>
                    <text:p>On LL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eak" presentation:presentation-page-layout-name="AL2T1">
        <office:forms form:automatic-focus="false" form:apply-design-mode="false"/>
        <draw:frame presentation:style-name="pr10" draw:text-style-name="P9" draw:layer="layout" svg:width="20.884cm" svg:height="3.18cm" svg:x="2.286cm" svg:y="7.62cm" presentation:class="title">
          <draw:text-box>
            <text:p text:style-name="P8"><text:span text:style-name="T19">Results</text:span></text:p>
          </draw:text-box>
        </draw:frame>
        <draw:frame presentation:style-name="pr11" draw:layer="layout" svg:width="13.259cm" svg:height="11.049cm" svg:x="0cm" svg:y="19.74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Results</text:p>
          </draw:text-box>
        </draw:frame>
        <draw:frame presentation:style-name="pr13" draw:layer="layout" svg:width="20.93cm" svg:height="11.049cm" svg:x="2.286cm" svg:y="4.039cm" presentation:class="outline" presentation:user-transformed="true">
          <draw:text-box>
            <text:list text:style-name="L2">
              <text:list-item>
                <text:p>Not so encouraging</text:p>
                <text:list>
                  <text:list-item>
                    <text:p>Severe bugs in implementatio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Conclusion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Combination of three techniques: Instrumentation, Slicing and Symbolic Execution</text:p>
                <text:list>
                  <text:list-item>
                    <text:p>Instrumentation provides us with slicing criteria</text:p>
                  </text:list-item>
                  <text:list-item>
                    <text:p>Slicing improves performance of Symbolic Execution</text:p>
                  </text:list-item>
                  <text:list-item>
                    <text:p>Symbolic Execution is still a bottleneck</text:p>
                  </text:list-item>
                </text:list>
              </text:list-item>
              <text:list-item>
                <text:p xml:id="id2" text:id="id2">See you at the next year competition</text:p>
                <text:list>
                  <text:list-item>
                    <text:p>Our current overall resu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all_20_to_20_Action" presentation:presentation-page-layout-name="AL3T19">
        <office:forms form:automatic-focus="false" form:apply-design-mode="false"/>
        <draw:custom-shape draw:name="TextBox 1" draw:style-name="gr3" draw:text-style-name="P11" draw:layer="layout" svg:width="18.188cm" svg:height="4.502cm" svg:x="4.386cm" svg:y="3.616cm">
          <text:p text:style-name="P10"><text:span text:style-name="T20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4cm" svg:height="1.396cm" svg:x="3.36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72cm" svg:height="1.396cm" svg:x="15.21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28cm" svg:height="1.396cm" svg:x="3.47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98cm" svg:height="1.396cm" svg:x="15.855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07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</meta:creation-date>
    <dc:date>2013-03-16T22:49:54</dc:date>
    <meta:editing-duration>P2DT13H50M56S</meta:editing-duration>
    <meta:editing-cycles>187</meta:editing-cycles>
    <meta:generator>LibreOffice/3.6$Linux_X86_64 LibreOffice_project/360m1$Build-304</meta:generator>
    <dc:title>SUSE Template v17: 8/12/11</dc:title>
    <meta:print-date>2012-10-27T00:28:51</meta:print-date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