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26000000437D0CAB56.eps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fo:min-height="2.539cm" fo:min-width="5.4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4cm"/>
    </style:style>
    <style:style style:name="pr1" style:family="presentation" style:parent-style-name="Title-title">
      <style:graphic-properties draw:auto-grow-height="true" fo:min-height="2.623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draw:auto-grow-height="true" fo:min-height="12.572cm" fo:min-width="16.771cm"/>
    </style:style>
    <style:style style:name="pr4" style:family="presentation" style:parent-style-name="No-Logo_20_Content-title">
      <style:graphic-properties fo:min-height="2.743cm" fo:min-width="20.43cm"/>
    </style:style>
    <style:style style:name="pr5" style:family="presentation" style:parent-style-name="No-Logo_20_Content-notes">
      <style:graphic-properties draw:fill-color="#ffffff" fo:min-height="12.572cm" fo:min-width="16.771cm"/>
    </style:style>
    <style:style style:name="pr6" style:family="presentation" style:parent-style-name="No-Logo_20_Content-outline1">
      <style:graphic-properties fo:min-height="12.323cm" fo:min-width="20.4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language="en" fo:country="GB"/>
    </style:style>
    <style:style style:name="P3" style:family="paragraph">
      <style:paragraph-properties fo:margin-top="0cm" fo:margin-bottom="0.152cm" fo:text-align="star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color="#ffff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font-size="20pt"/>
    </style:style>
    <style:style style:name="P9" style:family="paragraph">
      <style:text-properties fo:font-size="88pt" style:font-size-asian="88pt" style:font-size-complex="88pt"/>
    </style:style>
    <style:style style:name="T1" style:family="text">
      <style:text-properties fo:font-size="40pt" fo:language="en" fo:country="GB" style:font-size-asian="40pt" style:font-size-complex="40pt"/>
    </style:style>
    <style:style style:name="T2" style:family="text">
      <style:text-properties fo:language="en" fo:country="GB"/>
    </style:style>
    <style:style style:name="T3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23ff23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8" style:family="text">
      <style:text-properties fo:color="#ffff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9" style:family="text">
      <style:text-properties fo:color="#ffff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color="#ffff00" style:text-line-through-style="none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" style:family="text">
      <style:text-properties fo:color="#ffffff" style:text-line-through-style="none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3" style:family="text">
      <style:text-properties fo:color="#ffff00" style:text-line-through-style="solid" style:text-line-through-width="bold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4" style:family="text">
      <style:text-properties fo:color="#ffffff" style:text-line-through-style="solid" style:text-line-through-width="bold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5" style:family="text">
      <style:text-properties fo:font-size="88pt" style:font-size-asian="88pt" style:font-size-complex="88pt"/>
    </style:style>
    <style:style style:name="T16" style:family="text">
      <style:text-properties fo:font-family="'LM Mono 12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1.558cm" svg:height="2.623cm" svg:x="2.286cm" svg:y="8.198cm" presentation:class="title" presentation:user-transformed="true">
          <draw:text-box>
            <text:p text:style-name="P1"><text:span text:style-name="T1">Symbiotic </text:span><text:span text:style-name="T2"><text:line-break/></text:span><text:span text:style-name="T3">Synergy of Instrumentation, Slicing, and Symbolic Execution</text:span></text:p>
          </draw:text-box>
        </draw:frame>
        <draw:frame presentation:style-name="pr2" draw:text-style-name="P3" draw:layer="layout" svg:width="10.566cm" svg:height="3.966cm" svg:x="2.261cm" svg:y="13.081cm" presentation:class="subtitle" presentation:user-transformed="true">
          <draw:text-box>
            <text:p text:style-name="P3"><text:span text:style-name="T4">Jiri Slaby</text:span><text:span text:style-name="T5">, </text:span><text:span text:style-name="T6">Jan Strejček, Marek Trtík</text:span></text:p>
            <text:p text:style-name="P3"><text:span text:style-name="T6">Masaryk University</text:span></text:p>
            <text:p text:style-name="P3"><text:span text:style-name="T6">Brno, Czech Republic</text:span></text:p>
            <text:p text:style-name="P3"><text:span text:style-name="T6"/></text:p>
            <text:p text:style-name="P3"><text:span text:style-name="T6">TACAS 2013 – SV-COM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Overview of Symbiotic</text:p>
          </draw:text-box>
        </draw:frame>
        <draw:frame draw:style-name="gr2" draw:text-style-name="P4" draw:layer="layout" svg:width="20.59cm" svg:height="4.691cm" svg:x="3.012cm" svg:y="12.476cm">
          <draw:image xlink:href="Pictures/2000000200000126000000437D0CAB56.eps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Overview of Symbiotic</text:p>
          </draw:text-box>
        </draw:frame>
        <draw:frame draw:style-name="gr2" draw:text-style-name="P4" draw:layer="layout" svg:width="20.59cm" svg:height="4.691cm" svg:x="3.012cm" svg:y="12.476cm">
          <draw:image xlink:href="Pictures/2000000200000126000000437D0CAB56.eps" xlink:type="simple" xlink:show="embed" xlink:actuate="onLoad">
            <text:p/>
          </draw:image>
        </draw:frame>
        <draw:custom-shape draw:style-name="gr3" draw:text-style-name="P4" draw:layer="layout" svg:width="5.679cm" svg:height="2.399cm" svg:x="6.104cm" svg:y="12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" draw:text-style-name="P6" draw:layer="layout" svg:width="8.249cm" svg:height="6.011cm" svg:x="3.026cm" svg:y="4.538cm">
            <draw:text-box>
              <text:p text:style-name="P5"><text:span text:style-name="T7">void</text:span><text:span text:style-name="T8"> fun(</text:span><text:span text:style-name="T7">int</text:span><text:span text:style-name="T8"> x) {</text:span></text:p>
              <text:p text:style-name="P5"><text:span text:style-name="T8"><text:tab/></text:span><text:span text:style-name="T9">while</text:span><text:span text:style-name="T8"> (compute())</text:span></text:p>
              <text:p text:style-name="P5"><text:span text:style-name="T8"><text:tab/></text:span><text:span text:style-name="T8"><text:tab/></text:span><text:span text:style-name="T8">;</text:span></text:p>
              <text:p text:style-name="P5"><text:span text:style-name="T8"><text:tab/></text:span><text:span text:style-name="T9">if</text:span><text:span text:style-name="T8"> (x == 2) {</text:span></text:p>
              <text:p text:style-name="P5"><text:span text:style-name="T8">ERROR:</text:span></text:p>
              <text:p text:style-name="P5"><text:span text:style-name="T8"><text:s text:c="6"/></text:span><text:span text:style-name="T9">goto</text:span><text:span text:style-name="T8"> ERROR;</text:span></text:p>
              <text:p text:style-name="P5"><text:span text:style-name="T8"><text:s text:c="3"/></text:span><text:span text:style-name="T8">}</text:span></text:p>
              <text:p text:style-name="P5"><text:span text:style-name="T8">}</text:span></text:p>
            </draw:text-box>
          </draw:frame>
          <draw:frame draw:style-name="gr5" draw:text-style-name="P7" draw:layer="layout" svg:width="1.92cm" svg:height="2.143cm" svg:x="11.724cm" svg:y="6.265cm">
            <draw:text-box draw:corner-radius="2.599cm">
              <text:p><text:span text:style-name="T10">⇒</text:span></text:p>
            </draw:text-box>
          </draw:frame>
          <draw:frame draw:style-name="gr4" draw:text-style-name="P6" draw:layer="layout" svg:width="8.249cm" svg:height="6.011cm" svg:x="14.126cm" svg:y="4.539cm">
            <draw:text-box>
              <text:p text:style-name="P5"><text:span text:style-name="T7">void</text:span><text:span text:style-name="T8"> fun(</text:span><text:span text:style-name="T7">int</text:span><text:span text:style-name="T8"> x) {</text:span></text:p>
              <text:p text:style-name="P5"><text:span text:style-name="T8"><text:tab/></text:span><text:span text:style-name="T11">while</text:span><text:span text:style-name="T12"> (compute())</text:span></text:p>
              <text:p text:style-name="P5"><text:span text:style-name="T12"><text:tab/></text:span><text:span text:style-name="T12"><text:tab/></text:span><text:span text:style-name="T12">;</text:span></text:p>
              <text:p text:style-name="P5"><text:span text:style-name="T8"><text:tab/></text:span><text:span text:style-name="T9">if</text:span><text:span text:style-name="T8"> (x == 2) {</text:span></text:p>
              <text:p text:style-name="P5"><text:span text:style-name="T8">ERROR:</text:span><text:span text:style-name="T8"><text:tab/></text:span><text:span text:style-name="T8">assert(0);</text:span></text:p>
              <text:p text:style-name="P5"><text:span text:style-name="T8"><text:s text:c="6"/></text:span><text:span text:style-name="T9">goto</text:span><text:span text:style-name="T8"> ERROR;</text:span></text:p>
              <text:p text:style-name="P5"><text:span text:style-name="T8"><text:s text:c="3"/></text:span><text:span text:style-name="T8">}</text:span></text:p>
              <text:p text:style-name="P5"><text:span text:style-name="T8">}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Overview of Symbiotic</text:p>
          </draw:text-box>
        </draw:frame>
        <draw:frame draw:style-name="gr2" draw:text-style-name="P4" draw:layer="layout" svg:width="20.59cm" svg:height="4.691cm" svg:x="3.012cm" svg:y="12.476cm">
          <draw:image xlink:href="Pictures/2000000200000126000000437D0CAB56.eps" xlink:type="simple" xlink:show="embed" xlink:actuate="onLoad">
            <text:p/>
          </draw:image>
        </draw:frame>
        <draw:custom-shape draw:style-name="gr3" draw:text-style-name="P4" draw:layer="layout" svg:width="2.716cm" svg:height="1.94cm" svg:x="14.5cm" svg:y="1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Overview of Symbiotic</text:p>
          </draw:text-box>
        </draw:frame>
        <draw:frame draw:style-name="gr2" draw:text-style-name="P4" draw:layer="layout" svg:width="20.59cm" svg:height="4.691cm" svg:x="3.012cm" svg:y="12.476cm">
          <draw:image xlink:href="Pictures/2000000200000126000000437D0CAB56.eps" xlink:type="simple" xlink:show="embed" xlink:actuate="onLoad">
            <text:p/>
          </draw:image>
        </draw:frame>
        <draw:custom-shape draw:style-name="gr3" draw:text-style-name="P4" draw:layer="layout" svg:width="2.611cm" svg:height="1.905cm" svg:x="20.144cm" svg:y="12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" draw:text-style-name="P6" draw:layer="layout" svg:width="8.249cm" svg:height="6.011cm" svg:x="3.025cm" svg:y="4.638cm">
            <draw:text-box>
              <text:p text:style-name="P5"><text:span text:style-name="T7">void</text:span><text:span text:style-name="T8"> fun(</text:span><text:span text:style-name="T7">int</text:span><text:span text:style-name="T8"> x) {</text:span></text:p>
              <text:p text:style-name="P5"><text:span text:style-name="T8"><text:tab/></text:span><text:span text:style-name="T9">while</text:span><text:span text:style-name="T8"> (compute())</text:span></text:p>
              <text:p text:style-name="P5"><text:span text:style-name="T8"><text:tab/></text:span><text:span text:style-name="T8"><text:tab/></text:span><text:span text:style-name="T8">;</text:span></text:p>
              <text:p text:style-name="P5"><text:span text:style-name="T8"><text:tab/></text:span><text:span text:style-name="T9">if</text:span><text:span text:style-name="T8"> (x == 2) {</text:span></text:p>
              <text:p text:style-name="P5"><text:span text:style-name="T8">ERROR: assert(0);</text:span></text:p>
              <text:p text:style-name="P5"><text:span text:style-name="T8"><text:s text:c="6"/></text:span><text:span text:style-name="T9">goto</text:span><text:span text:style-name="T8"> ERROR;</text:span></text:p>
              <text:p text:style-name="P5"><text:span text:style-name="T8"><text:s text:c="3"/></text:span><text:span text:style-name="T8">}</text:span></text:p>
              <text:p text:style-name="P5"><text:span text:style-name="T8">}</text:span></text:p>
            </draw:text-box>
          </draw:frame>
          <draw:frame draw:style-name="gr5" draw:text-style-name="P7" draw:layer="layout" svg:width="1.92cm" svg:height="2.143cm" svg:x="11.723cm" svg:y="6.465cm">
            <draw:text-box draw:corner-radius="2.599cm">
              <text:p><text:span text:style-name="T10">⇒</text:span></text:p>
            </draw:text-box>
          </draw:frame>
          <draw:frame draw:style-name="gr4" draw:text-style-name="P6" draw:layer="layout" svg:width="8.249cm" svg:height="6.011cm" svg:x="14.125cm" svg:y="4.639cm">
            <draw:text-box>
              <text:p text:style-name="P5"><text:span text:style-name="T7">void</text:span><text:span text:style-name="T8"> fun(</text:span><text:span text:style-name="T7">int</text:span><text:span text:style-name="T8"> x) {</text:span></text:p>
              <text:p text:style-name="P5"><text:span text:style-name="T8"><text:tab/></text:span><text:span text:style-name="T13">while</text:span><text:span text:style-name="T14"> (compute())</text:span></text:p>
              <text:p text:style-name="P5"><text:span text:style-name="T8"><text:tab/></text:span><text:span text:style-name="T8"><text:tab/></text:span><text:span text:style-name="T14">;</text:span></text:p>
              <text:p text:style-name="P5"><text:span text:style-name="T8"><text:tab/></text:span><text:span text:style-name="T9">if</text:span><text:span text:style-name="T8"> (x == 2) {</text:span></text:p>
              <text:p text:style-name="P5"><text:span text:style-name="T8">ERROR:</text:span><text:span text:style-name="T8"><text:tab/></text:span><text:span text:style-name="T8">assert(0);</text:span></text:p>
              <text:p text:style-name="P5"><text:span text:style-name="T8"><text:s text:c="6"/></text:span><text:span text:style-name="T9">goto</text:span><text:span text:style-name="T8"> ERROR;</text:span></text:p>
              <text:p text:style-name="P5"><text:span text:style-name="T8"><text:s text:c="3"/></text:span><text:span text:style-name="T8">}</text:span></text:p>
              <text:p text:style-name="P5"><text:span text:style-name="T8">}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Overview of Symbiotic</text:p>
          </draw:text-box>
        </draw:frame>
        <draw:frame draw:style-name="gr2" draw:text-style-name="P4" draw:layer="layout" svg:width="20.59cm" svg:height="4.691cm" svg:x="3.012cm" svg:y="12.476cm">
          <draw:image xlink:href="Pictures/2000000200000126000000437D0CAB56.eps" xlink:type="simple" xlink:show="embed" xlink:actuate="onLoad">
            <text:p/>
          </draw:image>
        </draw:frame>
        <draw:custom-shape draw:style-name="gr3" draw:text-style-name="P4" draw:layer="layout" svg:width="2.681cm" svg:height="2.046cm" svg:x="20.109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Overview of Symbiotic</text:p>
          </draw:text-box>
        </draw:frame>
        <draw:frame draw:style-name="gr2" draw:text-style-name="P4" draw:layer="layout" svg:width="20.59cm" svg:height="4.691cm" svg:x="3.012cm" svg:y="12.476cm">
          <draw:image xlink:href="Pictures/2000000200000126000000437D0CAB56.eps" xlink:type="simple" xlink:show="embed" xlink:actuate="onLoad">
            <text:p/>
          </draw:image>
        </draw:frame>
        <draw:custom-shape draw:style-name="gr3" draw:text-style-name="P4" draw:layer="layout" svg:width="2.54cm" svg:height="2.223cm" svg:x="12.947cm" svg:y="15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Properties</text:p>
          </draw:text-box>
        </draw:frame>
        <draw:frame presentation:style-name="pr6" draw:layer="layout" svg:width="20.93cm" svg:height="12.573cm" svg:x="2.286cm" svg:y="4.039cm" presentation:class="outline">
          <draw:text-box>
            <text:list text:style-name="L2">
              <text:list-item>
                <text:p>In theory</text:p>
                <text:list>
                  <text:list-item>
                    <text:p>Computationally expensive due to symbolic execution</text:p>
                  </text:list-item>
                  <text:list-item>
                    <text:p>It gives only correct answers</text:p>
                  </text:list-item>
                </text:list>
              </text:list-item>
              <text:list-item>
                <text:p>In practice (version for SV-COMP 2013)</text:p>
                <text:list>
                  <text:list-item>
                    <text:p>Slicing substantially improves tractability</text:p>
                  </text:list-item>
                  <text:list-item>
                    <text:p>Gives some incorrect results (bugs in implement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Properties</text:p>
          </draw:text-box>
        </draw:frame>
        <draw:frame presentation:style-name="pr6" draw:layer="layout" svg:width="20.93cm" svg:height="12.573cm" svg:x="2.286cm" svg:y="4.039cm" presentation:class="outline">
          <draw:text-box>
            <text:list text:style-name="L2">
              <text:list-item>
                <text:p>In theory</text:p>
                <text:list>
                  <text:list-item>
                    <text:p>Computationally expensive due to symbolic execution</text:p>
                  </text:list-item>
                  <text:list-item>
                    <text:p>It gives only correct answers</text:p>
                  </text:list-item>
                </text:list>
              </text:list-item>
              <text:list-item>
                <text:p>In practice (version for SV-COMP 2013)</text:p>
                <text:list>
                  <text:list-item>
                    <text:p>Slicing substantially improves tractability</text:p>
                  </text:list-item>
                  <text:list-item>
                    <text:p>Gives some incorrect results (bugs in implementation)</text:p>
                  </text:list-item>
                </text:list>
              </text:list-item>
              <text:list-item>
                <text:p>In practice (version for SV-COMP 2014)</text:p>
                <text:list>
                  <text:list-item>
                    <text:p>Even faster (implementation improvements) </text:p>
                  </text:list-item>
                  <text:list-item>
                    <text:p>Only correct results (bugs fixed)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6.562cm" svg:height="4.974cm" svg:x="17.639cm" svg:y="11.571cm">
          <draw:text-box>
            <text:list text:style-name="L1">
              <text:list-header>
                <text:p><text:span text:style-name="T15">☺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Step 1: Instrumentation</text:p>
          </draw:text-box>
        </draw:frame>
        <draw:frame presentation:style-name="pr6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Primary task: insert <text:span text:style-name="T16">assert</text:span>'s at <text:span text:style-name="T16">ERROR</text:span> labels</text:p>
              </text:list-item>
              <text:list-item>
                <text:p>But: it also glues everything together</text:p>
                <text:list>
                  <text:list-item>
                    <text:p>Provides implementation for <text:span text:style-name="T16">__VERIFIER_*</text:span></text:p>
                  </text:list-item>
                  <text:list-item>
                    <text:p>Some match&amp;replace to fix build errors</text:p>
                    <text:list>
                      <text:list-item>
                        <text:p>Remove proprietary <text:span text:style-name="T16">assert</text:span> and<text:span text:style-name="T16"> __builtin_*</text:span> definitions, etc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>
          <draw:text-box>
            <text:p>Step 3: Slicing</text:p>
          </draw:text-box>
        </draw:frame>
        <draw:frame presentation:style-name="pr6" draw:layer="layout" svg:width="20.93cm" svg:height="12.573cm" svg:x="2.286cm" svg:y="4.039cm" presentation:class="outline">
          <draw:text-box>
            <text:list text:style-name="L2">
              <text:list-item>
                <text:p>Weiser in 1970s</text:p>
              </text:list-item>
              <text:list-item>
                <text:p>Removes irrelevant cod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Step 4: Symbolic Execution</text:p>
          </draw:text-box>
        </draw:frame>
        <draw:frame presentation:style-name="pr6" draw:layer="layout" svg:width="20.93cm" svg:height="12.573cm" svg:x="2.257cm" svg:y="4.039cm" presentation:class="outline" presentation:user-transformed="true">
          <draw:text-box>
            <text:list text:style-name="L2">
              <text:list-item>
                <text:p>King in 1970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367cm" svg:y="0.751cm" presentation:class="title" presentation:user-transformed="true">
          <draw:text-box>
            <text:p>Step 5: Filter</text:p>
          </draw:text-box>
        </draw:frame>
        <draw:frame presentation:style-name="pr6" draw:layer="layout" svg:width="20.93cm" svg:height="12.573cm" svg:x="2.257cm" svg:y="4.039cm" presentation:class="outline" presentation:user-transformed="true">
          <draw:text-box>
            <text:list text:style-name="L2">
              <text:list-item>
                <text:p>Shell script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51931f" draw:end-color="#77bd2d" draw:start-intensity="100%" draw:end-intensity="100%" draw:angle="18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3" draw:display-name="Gradient 13" draw:style="linear" draw:start-color="#77bd2d" draw:end-color="#51931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000000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1cm" draw:shadow-offset-y="0.3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ymbol0_5f_c" style:display-name="symbol0_c" style:family="graphic">
      <style:paragraph-properties style:text-autospace="none"/>
      <style:text-properties fo:color="#339933" fo:font-style="normal" fo:font-weight="normal" style:font-style-asian="normal" style:font-weight-asian="normal" style:font-style-complex="normal" style:font-weight-complex="normal"/>
    </style:style>
    <style:style style:name="keyword3_5f_c" style:display-name="keyword3_c" style:family="graphic">
      <style:paragraph-properties style:text-autospace="none"/>
      <style:text-properties fo:color="#993333" fo:font-style="normal" fo:font-weight="normal" style:font-style-asian="normal" style:font-weight-asian="normal" style:font-style-complex="normal" style:font-weight-complex="normal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Znaky_20_pro_20_vysvětlivky" style:display-name="Znaky pro vysvětlivky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Obsah_20_seznamu" style:display-name="Obsah seznamu" style:family="graphic">
      <style:paragraph-properties fo:margin-left="1.764cm" fo:margin-right="0cm" fo:text-indent="0cm" style:text-autospace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Logo_20_Content-background" style:display-name="Logo Content-background" style:family="presentation">
      <style:graphic-properties draw:stroke="none" draw:fill="none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shrink-to-fit">
        <text:list-style style:name="Logo_20_Content-outline1" style:display-name="Logo Content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Logo_20_Content-outline3" style:display-name="Logo Content-outline3" style:family="presentation" style:parent-style-name="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Logo_20_Content-outline4" style:display-name="Logo Content-outline4" style:family="presentation" style:parent-style-name="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Logo_20_Content-outline5" style:display-name="Logo Content-outline5" style:family="presentation" style:parent-style-name="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6" style:display-name="Logo Content-outline6" style:family="presentation" style:parent-style-name="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7" style:display-name="Logo Content-outline7" style:family="presentation" style:parent-style-name="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8" style:display-name="Logo Content-outline8" style:family="presentation" style:parent-style-name="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gradient" draw:fill-gradient-name="Gradient_20_13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none" draw:textarea-vertical-align="top" draw:auto-grow-height="true" fo:min-height="1.281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6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4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53cm" svg:height="1.396cm" svg:x="3.359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368cm" svg:height="1.396cm" svg:x="15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432cm" svg:height="1.396cm" svg:x="3.469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102cm" svg:height="1.396cm" svg:x="15.853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1.049cm" svg:x="2.261cm" svg:y="13.081cm" presentation:class="outline" presentation:placeholder="true">
        <draw:text-box/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číslo&gt;</text:page-number></text:span></text:p>
          </draw:text-box>
        </draw:frame>
      </presentation:notes>
    </style:master-page>
    <style:master-page style:name="No-Logo_20_Content" style:display-name="No-Logo Content" style:page-layout-name="PM1" draw:style-name="Mdp1"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1cm" svg:y1="18.123cm" svg:x2="2.291cm" svg:y2="19.088cm">
        <text:p/>
      </draw:line>
      <draw:line draw:name="Straight Connector 11" draw:style-name="Mgr6" draw:text-style-name="MP3" draw:layer="backgroundobjects" svg:x1="2.265cm" svg:y1="18.123cm" svg:x2="2.265cm" svg:y2="19.088cm">
        <text:p/>
      </draw:line>
      <draw:custom-shape draw:name="Text Box 4" draw:style-name="Mgr7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custom-shape draw:name="Text Box 5" draw:style-name="Mgr8" draw:text-style-name="MP5" draw:layer="backgroundobjects" svg:width="0.801cm" svg:height="0.762cm" svg:x="1.155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1">
      <draw:frame presentation:style-name="Logo_20_Content-title" draw:layer="backgroundobjects" svg:width="20.93cm" svg:height="2.743cm" svg:x="2.286cm" svg:y="0.711cm" presentation:class="title" presentation:placeholder="true">
        <draw:text-box/>
      </draw:frame>
      <draw:frame presentation:style-name="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2cm" svg:y1="18.124cm" svg:x2="2.292cm" svg:y2="19.089cm">
        <text:p/>
      </draw:line>
      <draw:line draw:name="Straight Connector 11" draw:style-name="Mgr6" draw:text-style-name="MP3" draw:layer="backgroundobjects" svg:x1="2.266cm" svg:y1="18.124cm" svg:x2="2.266cm" svg:y2="19.089cm">
        <text:p/>
      </draw:line>
      <draw:custom-shape draw:name="Text Box 5" draw:style-name="Mgr8" draw:text-style-name="MP5" draw:layer="backgroundobjects" svg:width="0.801cm" svg:height="0.762cm" svg:x="1.156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Break" style:page-layout-name="PM1" draw:style-name="Mdp1">
      <draw:custom-shape draw:name="Rectangle 4" draw:style-name="Mgr3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Break-title" draw:layer="backgroundobjects" svg:width="20.884cm" svg:height="3.18cm" svg:x="2.286cm" svg:y="7.62cm" presentation:class="title" presentation:placeholder="true">
        <draw:text-box/>
      </draw:frame>
      <draw:frame presentation:style-name="Break-outline1" draw:layer="backgroundobjects" svg:width="13.259cm" svg:height="11.049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0.001cm" svg:height="0.001cm" svg:x="0cm" svg:y="2.123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1"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13.295cm" svg:x="0cm" svg:y="19.316cm" presentation:class="outline" presentation:placeholder="true">
        <draw:text-box/>
      </draw:frame>
      <draw:custom-shape draw:name="Rectangle 9" draw:style-name="Mgr9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custom-shape draw:name="Right Triangle 10" draw:style-name="Mgr9" draw:text-style-name="MP3" draw:layer="backgroundobjects" svg:width="1.683cm" svg:height="1.833cm" svg:x="4.675cm" svg:y="9.503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0" draw:text-style-name="MP7" draw:layer="backgroundobjects" svg:width="17.492cm" svg:height="1.673cm" svg:x="3.065cm" svg:y="12.377cm">
        <text:p text:style-name="MP6"><text:span text:style-name="MT4">Thank you for your attention</text:span></text:p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3cm" svg:y1="18.125cm" svg:x2="2.293cm" svg:y2="19.09cm">
        <text:p/>
      </draw:line>
      <draw:line draw:name="Straight Connector 11" draw:style-name="Mgr6" draw:text-style-name="MP3" draw:layer="backgroundobjects" svg:x1="2.267cm" svg:y1="18.125cm" svg:x2="2.267cm" svg:y2="19.09cm">
        <text:p/>
      </draw:line>
      <draw:custom-shape draw:name="Text Box 5" draw:style-name="Mgr8" draw:text-style-name="MP5" draw:layer="backgroundobjects" svg:width="0.801cm" svg:height="0.762cm" svg:x="1.157cm" svg:y="18.234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15T11:39:04.07</meta:creation-date>
    <dc:date>2013-03-21T09:43:47</dc:date>
    <meta:editing-duration>P3DT21H9M56S</meta:editing-duration>
    <meta:editing-cycles>208</meta:editing-cycles>
    <meta:generator>LibreOffice/3.6$Linux_X86_64 LibreOffice_project/360m1$Build-304</meta:generator>
    <dc:title>Symbiotic at SV-COMP 2013</dc:title>
    <meta:print-date>2012-10-27T00:28:51</meta:print-date>
    <meta:document-statistic meta:object-count="134"/>
    <meta:user-defined meta:name="Info 1"/>
    <meta:user-defined meta:name="Info 2"/>
    <meta:user-defined meta:name="Info 3"/>
    <meta:user-defined meta:name="Info 4"/>
  </office:meta>
</office:document-meta>
</file>