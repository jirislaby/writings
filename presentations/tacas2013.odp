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26000000437D0CAB56.eps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0000" fo:min-height="2.539cm" fo:min-width="5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fo:min-height="2.743cm" fo:min-width="20.43cm"/>
    </style:style>
    <style:style style:name="pr5" style:family="presentation" style:parent-style-name="No-Logo_20_Content-outline1">
      <style:graphic-properties fo:min-height="12.323cm" fo:min-width="20.43cm"/>
    </style:style>
    <style:style style:name="pr6" style:family="presentation" style:parent-style-name="No-Logo_20_Content-notes">
      <style:graphic-properties draw:fill-color="#ffffff" fo:min-height="12.572cm" fo:min-width="16.771cm"/>
    </style:style>
    <style:style style:name="pr7" style:family="presentation" style:parent-style-name="No-Logo_20_Content-outline1">
      <style:graphic-properties fo:min-height="10.799cm" fo:min-width="20.43cm"/>
    </style:style>
    <style:style style:name="pr8" style:family="presentation" style:parent-style-name="Call_20_to_20_Action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48pt"/>
    </style:style>
    <style:style style:name="P10" style:family="paragraph">
      <style:paragraph-properties style:text-autospace="none"/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11" style:family="paragraph">
      <style:paragraph-properties fo:margin-top="0cm" fo:margin-bottom="0cm" fo:line-height="93%" fo:text-align="start"/>
    </style:style>
    <style:style style:name="P12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family="'LM Mono 12'" style:font-pitch="fixed"/>
    </style:style>
    <style:style style:name="T8" style:family="text">
      <style:text-properties fo:font-family="'LM Mono 12'" style:font-pitch="fixed"/>
    </style:style>
    <style:style style:name="T9" style:family="text">
      <style:text-properties fo:color="#00ff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0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1" style:family="text">
      <style:text-properties fo:color="#ff3366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3" style:family="text">
      <style:text-properties fo:color="#ff3366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4" style:family="text">
      <style:text-properties style:text-line-through-style="non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5" style:family="text">
      <style:text-properties fo:color="#00ff00" style:text-line-through-style="non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6" style:family="text">
      <style:text-properties fo:color="#ffffff" style:text-line-through-style="non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color="#23ff23"/>
    </style:style>
    <style:style style:name="T19" style:family="text">
      <style:text-properties fo:color="#ffffff"/>
    </style:style>
    <style:style style:name="T20" style:family="text">
      <style:text-properties fo:color="#ff3366"/>
    </style:style>
    <style:style style:name="T21" style:family="text">
      <style:text-properties fo:color="#23ff23" style:text-line-through-style="solid" style:text-line-through-width="bold"/>
    </style:style>
    <style:style style:name="T22" style:family="text">
      <style:text-properties fo:color="#ffffff" style:text-line-through-style="solid" style:text-line-through-width="bold"/>
    </style:style>
    <style:style style:name="T23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number text:level="1" style:num-suffix=")" style:num-format="1">
        <style:list-level-properties text:space-before="0.73cm" text:min-label-width="0.47cm"/>
        <style:text-properties fo:color="#454c51" fo:font-size="100%"/>
      </text:list-level-style-number>
      <text:list-level-style-number text:level="2" style:num-suffix=")" style:num-format="1">
        <style:list-level-properties text:space-before="1.905cm" text:min-label-width="0.483cm"/>
        <style:text-properties fo:color="#454c51" fo:font-size="100%"/>
      </text:list-level-style-number>
      <text:list-level-style-number text:level="3" style:num-suffix=")" style:num-format="1">
        <style:list-level-properties text:space-before="3.13cm" text:min-label-width="0.47cm"/>
        <style:text-properties fo:color="#454c51" fo:font-size="100%"/>
      </text:list-level-style-number>
      <text:list-level-style-number text:level="4" style:num-suffix=")" style:num-format="1">
        <style:list-level-properties text:space-before="4.33cm" text:min-label-width="0.47cm"/>
        <style:text-properties fo:color="#454c51" fo:font-size="100%"/>
      </text:list-level-style-number>
      <text:list-level-style-number text:level="5" style:num-suffix=")" style:num-format="1">
        <style:list-level-properties text:space-before="5.498cm" text:min-label-width="0.483cm"/>
        <style:text-properties fo:color="#454c51" fo:font-size="100%"/>
      </text:list-level-style-number>
      <text:list-level-style-number text:level="6" style:num-suffix=")" style:num-format="1">
        <style:list-level-properties text:space-before="6.706cm" text:min-label-width="0.483cm"/>
        <style:text-properties fo:color="#454c51" fo:font-size="100%"/>
      </text:list-level-style-number>
      <text:list-level-style-number text:level="7" style:num-suffix=")" style:num-format="1">
        <style:list-level-properties text:space-before="7.899cm" text:min-label-width="0.483cm"/>
        <style:text-properties fo:color="#454c51" fo:font-size="100%"/>
      </text:list-level-style-number>
      <text:list-level-style-number text:level="8" style:num-suffix=")" style:num-format="1">
        <style:list-level-properties text:space-before="9.119cm" text:min-label-width="0.483cm"/>
        <style:text-properties fo:color="#454c51" fo:font-size="100%"/>
      </text:list-level-style-number>
      <text:list-level-style-number text:level="9" style:num-suffix=")" style:num-format="1">
        <style:list-level-properties text:space-before="10.312cm" text:min-label-width="0.483cm"/>
        <style:text-properties fo:color="#454c51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54c51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2.623cm" svg:x="2.286cm" svg:y="8.198cm" presentation:class="title" presentation:user-transformed="true">
          <draw:text-box>
            <text:p text:style-name="P1"><text:span text:style-name="T1">Symbiotic </text:span><text:span text:style-name="T2"><text:line-break/></text:span><text:span text:style-name="T3">Synergy of Instrumentation, Slicing, and Symbolic Execution</text:span></text:p>
          </draw:text-box>
        </draw:frame>
        <draw:frame presentation:style-name="pr2" draw:text-style-name="P3" draw:layer="layout" svg:width="10.566cm" svg:height="3.966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ček, Marek Trtík</text:span></text:p>
            <text:p text:style-name="P3"><text:span text:style-name="T6">Masaryk University</text:span></text:p>
            <text:p text:style-name="P3"><text:span text:style-name="T6">Brno, Czech Republic</text:span></text:p>
            <text:p text:style-name="P3"><text:span text:style-name="T6"/></text:p>
            <text:p text:style-name="P3"><text:span text:style-name="T6">TACAS 2013 – SV-CO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ymbiotic – Motivation</text:p>
          </draw:text-box>
        </draw:frame>
        <draw:frame presentation:style-name="pr5" draw:layer="layout" svg:width="20.93cm" svg:height="12.573cm" svg:x="2.286cm" svg:y="4.039cm" presentation:class="outline">
          <draw:text-box>
            <text:list text:style-name="L2">
              <text:list-item>
                <text:p>Try symbolic execution on the competition</text:p>
                <text:list>
                  <text:list-item>
                    <text:p>How it stands among other techniques</text:p>
                  </text:list-item>
                  <text:list-item>
                    <text:p>Is the current hardware powerful enough for SE?</text:p>
                  </text:list-item>
                </text:list>
              </text:list-item>
              <text:list-item>
                <text:p>It should give only correct answers</text:p>
                <text:list>
                  <text:list-item>
                    <text:p>No false-positives</text:p>
                  </text:list-item>
                  <text:list-item>
                    <text:p>No false-negatives (in our case: almos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Overview of Symbiotic</text:p>
          </draw:text-box>
        </draw:frame>
        <draw:frame presentation:style-name="pr5" draw:layer="layout" svg:width="20.93cm" svg:height="12.573cm" svg:x="2.286cm" svg:y="4.039cm" presentation:class="outline">
          <draw:text-box>
            <text:list text:style-name="L2">
              <text:list-item>
                <text:p>Substeps</text:p>
              </text:list-item>
            </text:list>
            <text:list text:style-name="L3">
              <text:list-item>
                <text:list>
                  <text:list-item>
                    <text:p><text:s/>Instrumentation – what to check</text:p>
                  </text:list-item>
                  <text:list-item>
                    <text:p><text:s/>Compilation</text:p>
                  </text:list-item>
                  <text:list-item>
                    <text:p><text:s/>Slicing – faster execution</text:p>
                  </text:list-item>
                  <text:list-item>
                    <text:p><text:s/>Symbolic execution – precise results</text:p>
                  </text:list-item>
                  <text:list-item>
                    <text:p><text:s/>Filter – demanded outpu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.59cm" svg:height="4.691cm" svg:x="3.012cm" svg:y="12.276cm">
          <draw:image xlink:href="Pictures/2000000200000126000000437D0CAB56.eps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tep 1: Instrumentation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Primary task: insert <text:span text:style-name="T7">assert</text:span>'s at <text:span text:style-name="T8">ERROR</text:span> labels</text:p>
                <text:list>
                  <text:list-item>
                    <text:p>Done by simple scripting</text:p>
                  </text:list-item>
                  <text:list-item>
                    <text:p>On the C level</text:p>
                  </text:list-item>
                </text:list>
              </text:list-item>
              <text:list-item>
                <text:p>But: it also glues everything together</text:p>
                <text:list>
                  <text:list-item>
                    <text:p>Provides implementation for <text:span text:style-name="T7">__VERIFIER_*</text:span></text:p>
                  </text:list-item>
                  <text:list-item>
                    <text:p>Some match&amp;replace to fix build errors</text:p>
                    <text:list>
                      <text:list-item>
                        <text:p>Remove proprietary <text:span text:style-name="T7">assert</text:span> and<text:span text:style-name="T7"> __builtin_*</text:span> definitions, etc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3" draw:text-style-name="P7" draw:layer="layout" svg:width="6.979cm" svg:height="3.131cm" svg:x="14.71cm" svg:y="13.621cm">
          <draw:text-box>
            <text:p text:style-name="P6"><text:span text:style-name="T9">void</text:span><text:span text:style-name="T10"> error(</text:span><text:span text:style-name="T10">) {</text:span></text:p>
            <text:p text:style-name="P6"><text:span text:style-name="T11">ERROR: </text:span><text:span text:style-name="T12">assert(</text:span><text:span text:style-name="T13">0</text:span><text:span text:style-name="T12">);</text:span></text:p>
            <text:p text:style-name="P6"><text:span text:style-name="T14"><text:s text:c="2"/></text:span><text:span text:style-name="T15">goto</text:span><text:span text:style-name="T16"> ERROR;</text:span></text:p>
            <text:p text:style-name="P6"><text:span text:style-name="T10">}</text:span></text:p>
          </draw:text-box>
        </draw:frame>
        <draw:frame draw:style-name="gr3" draw:text-style-name="P7" draw:layer="layout" svg:width="6.979cm" svg:height="3.131cm" svg:x="3.712cm" svg:y="13.622cm">
          <draw:text-box>
            <text:p text:style-name="P6"><text:span text:style-name="T9">void</text:span><text:span text:style-name="T10"> error(</text:span><text:span text:style-name="T10">) {</text:span></text:p>
            <text:p text:style-name="P6"><text:span text:style-name="T11">ERROR: <text:s text:c="10"/></text:span></text:p>
            <text:p text:style-name="P6"><text:span text:style-name="T14"><text:s text:c="2"/></text:span><text:span text:style-name="T15">goto</text:span><text:span text:style-name="T16"> ERROR;</text:span></text:p>
            <text:p text:style-name="P6"><text:span text:style-name="T10">}</text:span></text:p>
          </draw:text-box>
        </draw:frame>
        <draw:frame draw:style-name="gr4" draw:text-style-name="P8" draw:layer="layout" svg:width="1.92cm" svg:height="2.143cm" svg:x="11.689cm" svg:y="14.073cm">
          <draw:text-box draw:corner-radius="2.599cm">
            <text:p><text:span text:style-name="T17">⇒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Step 2: Compilation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Clang 3.1</text:p>
              </text:list-item>
              <text:list-item>
                <text:p>Input: C</text:p>
              </text:list-item>
              <text:list-item>
                <text:p>Produces: LLVM</text:p>
              </text:list-item>
            </text:list>
          </draw:text-box>
        </draw:frame>
        <draw:frame draw:style-name="gr4" draw:text-style-name="P8" draw:layer="layout" svg:width="1.92cm" svg:height="2.143cm" svg:x="10.122cm" svg:y="11.974cm">
          <draw:text-box draw:corner-radius="2.599cm">
            <text:p text:style-name="P9"><text:span text:style-name="T17">⇒</text:span></text:p>
          </draw:text-box>
        </draw:frame>
        <draw:frame draw:style-name="gr3" draw:text-style-name="P7" draw:layer="layout" svg:width="6.979cm" svg:height="3.131cm" svg:x="2.395cm" svg:y="11.505cm">
          <draw:text-box>
            <text:p text:style-name="P6"><text:span text:style-name="T9">void</text:span><text:span text:style-name="T10"> error(</text:span><text:span text:style-name="T10">) {</text:span></text:p>
            <text:p text:style-name="P6"><text:span text:style-name="T11">ERROR: </text:span><text:span text:style-name="T12">assert(</text:span><text:span text:style-name="T13">0</text:span><text:span text:style-name="T12">);</text:span></text:p>
            <text:p text:style-name="P6"><text:span text:style-name="T14"><text:s text:c="2"/></text:span><text:span text:style-name="T15">goto</text:span><text:span text:style-name="T16"> ERROR;</text:span></text:p>
            <text:p text:style-name="P6"><text:span text:style-name="T10">}</text:span></text:p>
          </draw:text-box>
        </draw:frame>
        <draw:frame draw:style-name="gr3" draw:text-style-name="P10" draw:layer="layout" svg:width="10.408cm" svg:height="6.011cm" svg:x="12.598cm" svg:y="10.006cm">
          <draw:text-box>
            <text:p text:style-name="P7"><text:span text:style-name="T18">define</text:span><text:span text:style-name="T19"> void @error() {</text:span></text:p>
            <text:p text:style-name="P7"><text:span text:style-name="T20">entry:</text:span></text:p>
            <text:p text:style-name="P7"><text:span text:style-name="T18"><text:s text:c="2"/></text:span><text:span text:style-name="T18">br</text:span><text:span text:style-name="T19"> label %ERROR</text:span></text:p>
            <text:p text:style-name="P7"><text:span text:style-name="T19"/></text:p>
            <text:p text:style-name="P7"><text:span text:style-name="T20">ERROR:</text:span></text:p>
            <text:p text:style-name="P7"><text:span text:style-name="T19"><text:s text:c="2"/></text:span><text:span text:style-name="T18">call</text:span><text:span text:style-name="T19"> void @assert(i32 0)</text:span></text:p>
            <text:p text:style-name="P7"><text:span text:style-name="T19"><text:s text:c="2"/></text:span><text:span text:style-name="T18">br</text:span><text:span text:style-name="T19"> label %ERROR</text:span></text:p>
            <text:p text:style-name="P7"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Step 3: Slicing</text:p>
          </draw:text-box>
        </draw:frame>
        <draw:frame presentation:style-name="pr5" draw:layer="layout" svg:width="20.93cm" svg:height="12.573cm" svg:x="2.286cm" svg:y="4.039cm" presentation:class="outline">
          <draw:text-box>
            <text:list text:style-name="L2">
              <text:list-item>
                <text:p>Weiser in 1970s</text:p>
              </text:list-item>
              <text:list-item>
                <text:p>Removes irrelevant code</text:p>
                <text:list>
                  <text:list-item>
                    <text:p>The produced code behaves the same with respect to instrumented <text:span text:style-name="T7">assert</text:span>'s (slicing criteria)</text:p>
                  </text:list-item>
                </text:list>
              </text:list-item>
              <text:list-item>
                <text:p>Input: LLVM</text:p>
              </text:list-item>
              <text:list-item>
                <text:p>Produces: sliced LLVM</text:p>
              </text:list-item>
            </text:list>
          </draw:text-box>
        </draw:frame>
        <draw:frame draw:style-name="gr4" draw:text-style-name="P8" draw:layer="layout" svg:width="1.92cm" svg:height="2.143cm" svg:x="11.689cm" svg:y="14.074cm">
          <draw:text-box draw:corner-radius="2.599cm">
            <text:p><text:span text:style-name="T17">⇒</text:span></text:p>
          </draw:text-box>
        </draw:frame>
        <draw:frame draw:style-name="gr3" draw:text-style-name="P10" draw:layer="layout" svg:width="10.408cm" svg:height="6.011cm" svg:x="1.055cm" svg:y="11.694cm">
          <draw:text-box>
            <text:p text:style-name="P7"><text:span text:style-name="T18">define</text:span><text:span text:style-name="T19"> void @error() {</text:span></text:p>
            <text:p text:style-name="P7"><text:span text:style-name="T20">entry:</text:span></text:p>
            <text:p text:style-name="P7"><text:span text:style-name="T18"><text:s text:c="2"/></text:span><text:span text:style-name="T18">br</text:span><text:span text:style-name="T19"> label %ERROR</text:span></text:p>
            <text:p text:style-name="P7"><text:span text:style-name="T19"/></text:p>
            <text:p text:style-name="P7"><text:span text:style-name="T20">ERROR:</text:span></text:p>
            <text:p text:style-name="P7"><text:span text:style-name="T19"><text:s text:c="2"/></text:span><text:span text:style-name="T18">call</text:span><text:span text:style-name="T19"> void @assert(i32 0)</text:span></text:p>
            <text:p text:style-name="P7"><text:span text:style-name="T19"><text:s text:c="2"/></text:span><text:span text:style-name="T18">br</text:span><text:span text:style-name="T19"> label %ERROR</text:span></text:p>
            <text:p text:style-name="P7"><text:span text:style-name="T19">}</text:span></text:p>
          </draw:text-box>
        </draw:frame>
        <draw:frame draw:style-name="gr3" draw:text-style-name="P10" draw:layer="layout" svg:width="10.408cm" svg:height="6.011cm" svg:x="14.055cm" svg:y="11.695cm">
          <draw:text-box>
            <text:p text:style-name="P7"><text:span text:style-name="T18">define</text:span><text:span text:style-name="T19"> void @error() {</text:span></text:p>
            <text:p text:style-name="P7"><text:span text:style-name="T20">entry:</text:span></text:p>
            <text:p text:style-name="P7"><text:span text:style-name="T18"><text:s text:c="2"/></text:span><text:span text:style-name="T18">br</text:span><text:span text:style-name="T19"> label %ERROR</text:span></text:p>
            <text:p text:style-name="P7"><text:span text:style-name="T19"/></text:p>
            <text:p text:style-name="P7"><text:span text:style-name="T20">ERROR:</text:span></text:p>
            <text:p text:style-name="P7"><text:span text:style-name="T19"><text:s text:c="2"/></text:span><text:span text:style-name="T18">call</text:span><text:span text:style-name="T19"> void @assert(i32 0)</text:span></text:p>
            <text:p text:style-name="P7"><text:span text:style-name="T19"><text:s text:c="2"/></text:span><text:span text:style-name="T21">br</text:span><text:span text:style-name="T22"> label %ERROR</text:span></text:p>
            <text:p text:style-name="P7"><text:span text:style-name="T19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tep 4: Symbolic Execution</text:p>
          </draw:text-box>
        </draw:frame>
        <draw:frame presentation:style-name="pr5" draw:layer="layout" svg:width="20.93cm" svg:height="12.573cm" svg:x="2.257cm" svg:y="4.039cm" presentation:class="outline" presentation:user-transformed="true">
          <draw:text-box>
            <text:list text:style-name="L2">
              <text:list-item>
                <text:p>King in 1970s</text:p>
              </text:list-item>
              <text:list-item>
                <text:p>Exact</text:p>
                <text:list>
                  <text:list-item>
                    <text:p>No false-positives in general</text:p>
                  </text:list-item>
                </text:list>
              </text:list-item>
              <text:list-item>
                <text:p>Slow</text:p>
                <text:list>
                  <text:list-item>
                    <text:p>SMT solver consumes time</text:p>
                  </text:list-item>
                </text:list>
              </text:list-item>
              <text:list-item>
                <text:p>Tool used: Klee</text:p>
                <text:list>
                  <text:list-item>
                    <text:p>On LLVM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.92cm" svg:height="2.143cm" svg:x="12.689cm" svg:y="14.074cm">
          <draw:text-box draw:corner-radius="2.599cm">
            <text:p><text:span text:style-name="T17">⇒</text:span></text:p>
          </draw:text-box>
        </draw:frame>
        <draw:frame draw:style-name="gr3" draw:text-style-name="P10" draw:layer="layout" svg:width="10.408cm" svg:height="5.291cm" svg:x="2.055cm" svg:y="12.695cm">
          <draw:text-box>
            <text:p text:style-name="P7"><text:span text:style-name="T18">define</text:span><text:span text:style-name="T19"> void @error() {</text:span></text:p>
            <text:p text:style-name="P7"><text:span text:style-name="T20">entry:</text:span></text:p>
            <text:p text:style-name="P7"><text:span text:style-name="T18"><text:s text:c="2"/></text:span><text:span text:style-name="T18">br</text:span><text:span text:style-name="T19"> label %ERROR</text:span></text:p>
            <text:p text:style-name="P7"><text:span text:style-name="T19"/></text:p>
            <text:p text:style-name="P7"><text:span text:style-name="T20">ERROR:</text:span></text:p>
            <text:p text:style-name="P7"><text:span text:style-name="T19"><text:s text:c="2"/></text:span><text:span text:style-name="T18">call</text:span><text:span text:style-name="T19"> void @assert(i32 0)</text:span></text:p>
            <text:p text:style-name="P7"><text:span text:style-name="T19">}</text:span></text:p>
          </draw:text-box>
        </draw:frame>
        <draw:frame draw:style-name="gr5" draw:text-style-name="P5" draw:layer="layout" svg:width="8.182cm" svg:height="3.806cm" svg:x="14.816cm" svg:y="13.148cm">
          <draw:text-box>
            <text:p text:style-name="P5">ASSERTION FOUND at …</text:p>
            <text:p text:style-name="P5">or</text:p>
            <text:p text:style-name="P5">FINISHED</text:p>
            <text:p text:style-name="P5">or</text:p>
            <text:p text:style-name="P5">CRASH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367cm" svg:y="0.751cm" presentation:class="title" presentation:user-transformed="true">
          <draw:text-box>
            <text:p>Step 5: Filter</text:p>
          </draw:text-box>
        </draw:frame>
        <draw:frame presentation:style-name="pr5" draw:layer="layout" svg:width="20.93cm" svg:height="12.573cm" svg:x="2.257cm" svg:y="4.039cm" presentation:class="outline" presentation:user-transformed="true">
          <draw:text-box>
            <text:list text:style-name="L2">
              <text:list-item>
                <text:p>Shell scripts</text:p>
              </text:list-item>
              <text:list-item>
                <text:p>Input: Klee logs</text:p>
              </text:list-item>
              <text:list-item>
                <text:p>Produces: SAFE/UNSAFE/UNKNOWN</text:p>
              </text:list-item>
            </text:list>
          </draw:text-box>
        </draw:frame>
        <draw:frame draw:style-name="gr5" draw:text-style-name="P5" draw:layer="layout" svg:width="8.182cm" svg:height="3.806cm" svg:x="3.034cm" svg:y="12.944cm">
          <draw:text-box>
            <text:p text:style-name="P5">ASSERTION FOUND at …</text:p>
            <text:p text:style-name="P5">or</text:p>
            <text:p text:style-name="P5">FINISHED</text:p>
            <text:p text:style-name="P5">or</text:p>
            <text:p text:style-name="P5">CRASH</text:p>
          </draw:text-box>
        </draw:frame>
        <draw:frame draw:style-name="gr4" draw:text-style-name="P8" draw:layer="layout" svg:width="1.92cm" svg:height="2.143cm" svg:x="12.69cm" svg:y="14.074cm">
          <draw:text-box draw:corner-radius="2.599cm">
            <text:p><text:span text:style-name="T17">⇒</text:span></text:p>
          </draw:text-box>
        </draw:frame>
        <draw:frame draw:style-name="gr5" draw:text-style-name="P5" draw:layer="layout" svg:width="8.182cm" svg:height="3.806cm" svg:x="14.817cm" svg:y="13.148cm">
          <draw:text-box>
            <text:p text:style-name="P5">UNSAFE</text:p>
            <text:p text:style-name="P5">or</text:p>
            <text:p text:style-name="P5">SAFE</text:p>
            <text:p text:style-name="P5">or</text:p>
            <text:p text:style-name="P5">UNKNOW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Results</text:p>
          </draw:text-box>
        </draw:frame>
        <draw:frame presentation:style-name="pr7" draw:layer="layout" svg:width="20.93cm" svg:height="12.813cm" svg:x="2.286cm" svg:y="4.039cm" presentation:class="outline" presentation:user-transformed="true">
          <draw:text-box>
            <text:list text:style-name="L2">
              <text:list-item>
                <text:p>Not so encouraging</text:p>
                <text:list>
                  <text:list-item>
                    <text:p>First real use of the tool</text:p>
                  </text:list-item>
                  <text:list-item>
                    <text:p>Severe bugs in implementation</text:p>
                  </text:list-item>
                  <text:list-item>
                    <text:p>So in benchmarks (patches posted)</text:p>
                  </text:list-item>
                  <text:list-item>
                    <text:p>Benchmarks are not real code in many cases</text:p>
                  </text:list-item>
                </text:list>
              </text:list-item>
              <text:list-item>
                <text:p>Improved it a lot since then</text:p>
                <text:list>
                  <text:list-item>
                    <text:p>Previous negative score: XXX</text:p>
                  </text:list-item>
                  <text:list-item>
                    <text:p>Current negative score: YYY</text:p>
                  </text:list-item>
                  <text:list-item>
                    <text:p>Future work: improve to be better</text:p>
                  </text:list-item>
                  <text:list-item>
                    <text:p>See you at the next year competition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all_20_to_20_Action" presentation:presentation-page-layout-name="AL3T19">
        <office:forms form:automatic-focus="false" form:apply-design-mode="false"/>
        <draw:custom-shape draw:name="TextBox 1" draw:style-name="gr6" draw:text-style-name="P12" draw:layer="layout" svg:width="18.188cm" svg:height="4.502cm" svg:x="4.386cm" svg:y="3.616cm">
          <text:p text:style-name="P11"><text:span text:style-name="T23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53cm" svg:height="1.396cm" svg:x="3.359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68cm" svg:height="1.396cm" svg:x="15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32cm" svg:height="1.396cm" svg:x="3.469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102cm" svg:height="1.396cm" svg:x="15.853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05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</meta:creation-date>
    <dc:date>2013-03-20T15:09:05</dc:date>
    <meta:editing-duration>P3DT12H8S</meta:editing-duration>
    <meta:editing-cycles>197</meta:editing-cycles>
    <meta:generator>LibreOffice/3.6$Linux_X86_64 LibreOffice_project/360m1$Build-304</meta:generator>
    <dc:title>Symbiotic at SV-COMP 2013</dc:title>
    <meta:print-date>2012-10-27T00:28:51</meta:print-date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