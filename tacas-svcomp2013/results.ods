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featurechecks</text:p>
          </table:table-cell>
          <table:table-cell office:value-type="string">
            <text:p>systemc</text:p>
          </table:table-cell>
          <table:table-cell office:value-type="string">
            <text:p>devicedrivers64</text:p>
          </table:table-cell>
          <table:table-cell office:value-type="string">
            <text:p>Controlflowinteger-memprecise</text:p>
          </table:table-cell>
          <table:table-cell office:value-type="string">
            <text:p>sum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1237">
            <text:p>1237</text:p>
          </table:table-cell>
          <table:table-cell office:value-type="float" office:value="48">
            <text:p>48</text:p>
          </table:table-cell>
          <table:table-cell table:formula="of:=SUM([.B2:.E2])" office:value-type="float" office:value="1465">
            <text:p>1465</text:p>
          </table:table-cell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table:formula="of:=SUM([.B3:.E3])" office:value-type="float" office:value="329">
            <text:p>329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SUM([.B4:.E4])" office:value-type="float" office:value="127">
            <text:p>127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imeout</text:p>
          </table:table-cell>
          <table:table-cell table:formula="of:=[.B2]-[.B3]-[.B4]" office:value-type="float" office:value="20">
            <text:p>20</text:p>
          </table:table-cell>
          <table:table-cell table:formula="of:=[.C2]-[.C3]-[.C4]" office:value-type="float" office:value="62">
            <text:p>62</text:p>
          </table:table-cell>
          <table:table-cell table:formula="of:=[.D2]-[.D3]-[.D4]" office:value-type="float" office:value="897">
            <text:p>897</text:p>
          </table:table-cell>
          <table:table-cell table:formula="of:=[.E2]-[.E3]-[.E4]" office:value-type="float" office:value="30">
            <text:p>30</text:p>
          </table:table-cell>
          <table:table-cell table:formula="of:=[.F2]-[.F3]-[.F4]" office:value-type="float" office:value="1009">
            <text:p>1009</text:p>
          </table:table-cell>
        </table:table-row>
        <table:table-row table:style-name="ro1">
          <table:table-cell office:value-type="string">
            <text:p>good result (%)</text:p>
          </table:table-cell>
          <table:table-cell table:formula="of:=100*[.B3]/[.B2]" office:value-type="float" office:value="68.6440677966102">
            <text:p>68,6440677966</text:p>
          </table:table-cell>
          <table:table-cell table:formula="of:=100*[.C3]/[.C2]" office:value-type="float" office:value="0">
            <text:p>0</text:p>
          </table:table-cell>
          <table:table-cell table:formula="of:=100*[.D3]/[.D2]" office:value-type="float" office:value="18.5933710590137">
            <text:p>18,593371059</text:p>
          </table:table-cell>
          <table:table-cell table:formula="of:=100*[.E3]/[.E2]" office:value-type="float" office:value="37.5">
            <text:p>37,5</text:p>
          </table:table-cell>
          <table:table-cell table:formula="of:=100*[.F3]/[.F2]" office:value-type="float" office:value="22.457337883959">
            <text:p>22,45733788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c jsem tohle optnul?</text:p>
          </table:table-cell>
          <table:table-cell table:number-columns-repeated="3"/>
        </table:table-row>
        <table:table-row table:style-name="ro2" table:number-rows-repeated="104856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1-09T00:26:40</meta:creation-date>
    <dc:date>2013-01-09T00:39:58</dc:date>
    <meta:editing-duration>P0D</meta:editing-duration>
    <meta:editing-cycles>1</meta:editing-cycles>
    <meta:document-statistic meta:table-count="1" meta:cell-count="33" meta:object-count="0"/>
    <meta:generator>LibreOffice/3.6$Linux_X86_64 LibreOffice_project/360m1$Build-304</meta:generator>
  </office:meta>
</office:document-meta>
</file>