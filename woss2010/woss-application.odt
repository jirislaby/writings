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4E000001C412E44B3A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top="0.801cm" fo:margin-bottom="1cm"/>
      <style:text-properties fo:language="en" fo:country="US"/>
    </style:style>
    <style:style style:name="P4" style:family="paragraph" style:parent-style-name="Standard">
      <style:paragraph-properties fo:margin-top="0cm" fo:margin-bottom="0cm"/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paragraph-properties fo:margin-top="0cm" fo:margin-bottom="0cm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margin-top="1cm" fo:margin-bottom="0cm"/>
      <style:text-properties fo:language="en" fo:country="US" fo:font-weight="bold" style:font-weight-asian="bold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left="0cm" fo:margin-right="0cm" fo:margin-top="0cm" fo:margin-bottom="0.3cm" fo:line-height="100%" fo:text-indent="0.503cm" style:auto-text-indent="false"/>
    </style:style>
    <style:style style:name="P9" style:family="paragraph" style:parent-style-name="Standard">
      <style:paragraph-properties fo:margin-top="0.4cm" fo:margin-bottom="0.499cm"/>
      <style:text-properties fo:language="en" fo:country="US" officeooo:paragraph-rsid="0000f361"/>
    </style:style>
    <style:style style:name="P10" style:family="paragraph" style:parent-style-name="Footer">
      <style:text-properties fo:font-size="11pt" fo:language="en" fo:country="US" style:font-size-asian="12pt" style:font-size-complex="12pt"/>
    </style:style>
    <style:style style:name="P11" style:family="paragraph" style:parent-style-name="Footer">
      <style:paragraph-properties fo:margin-left="0cm" fo:margin-right="-0.347cm" fo:text-indent="0cm" style:auto-text-indent="false">
        <style:tab-stops>
          <style:tab-stop style:position="12.397cm" style:type="center"/>
        </style:tab-stops>
      </style:paragraph-properties>
      <style:text-properties fo:font-size="11pt" fo:language="en" fo:country="US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f361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0f361" style:font-weight-asian="normal" style:font-weight-complex="normal"/>
    </style:style>
    <style:style style:name="T5" style:family="text">
      <style:text-properties fo:language="en" fo:country="US" fo:font-weight="normal" officeooo:rsid="00011e0b" style:font-weight-asian="normal" style:font-weight-complex="normal"/>
    </style:style>
    <style:style style:name="T6" style:family="text">
      <style:text-properties officeooo:rsid="00011e0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date style:data-style-name="N76" text:date-value="2010-08-23T15:52:20.99">August 23, 2010</text:date></text:p>
      <text:p text:style-name="P2"><text:text-input text:description="Recipients names">SPRERS management team
(in attention to project coordinator)

West University of Timisoara
Dept. of Computer Science
Bd. V. Parvan 4, 300223 Timisoara, Romania </text:text-input></text:p>
      <text:p text:style-name="P2"/>
      <text:p text:style-name="P9"><text:span text:style-name="T1"><text:text-input text:description="Subject">Application for complete expense coverage</text:text-input></text:span></text:p>
      <text:p text:style-name="P9"><text:text-input text:description="Dear Recipient">Dear team,</text:text-input></text:p>
      <text:section text:style-name="Sect1" text:name="main body">
        <text:p text:style-name="P8"><text:span text:style-name="T3"><text:text-input text:description="Body of letter">I kindly ask you to cover my expenses bound to the WoSS conference as an part of the SPRERS event.</text:text-input></text:span><text:span text:style-name="T3"> </text:span><text:span text:style-name="T4">I'm a co-author of a paper called “</text:span><text:span text:style-name="T2">Web-based Service for Collaborative Organization of Academic Events – Case Study of ”TakePlace”</text:span><text:span text:style-name="T4">” which was accepted on the WoSS workshop. </text:span><text:span text:style-name="T5">Thank you in advance.</text:span></text:p>
      </text:section>
      <text:p text:style-name="P4"><text:drop-down text:name="salutation"><text:label text:value="Kind regards,"/><text:label text:value="Yours sincerely,"/><text:label text:current-selected="true" text:value="Yours faithfully,"/><text:label text:value="Regards,"/>Yours faithfully,</text:drop-down></text:p>
      <text:p text:style-name="P6"><text:text-input text:description="Your name">Jiri Slaby</text:text-input></text:p>
      <text:p text:style-name="P5"><text:text-input text:description="Your job title">PhD researcher</text:text-input></text:p>
      <text:p text:style-name="P5"><text:text-input text:description="Your department">Faculty of Informatics, Masaryk University, Brno, Czech Republic</text:text-input></text:p>
      <text:p text:style-name="P10"><draw:frame draw:style-name="fr1" draw:name="obrázky1" text:anchor-type="paragraph" svg:x="11.081cm" svg:y="5.92cm" svg:width="2.445cm" svg:height="1.307cm" draw:z-index="0"><draw:image xlink:href="Pictures/100000000000034E000001C412E44B3A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"><text:tab/>_________________</text:span></text:p>
      <text:p text:style-name="P11"><text:span text:style-name="T6"><text:tab/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Tahoma1" svg:font-family="Tahoma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N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mbri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size="12pt"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otherpgs"/>
    <style:master-page style:name="otherpgs" style:page-layout-name="Mpm2">
      <style:header>
        <text:p text:style-name="Header"/>
      </style:header>
      <style:footer>
        <text:p text:style-name="MP1">Page 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5:38:24</meta:creation-date>
    <meta:editing-duration>PT00H13M58S</meta:editing-duration>
    <meta:editing-cycles>4</meta:editing-cycles>
    <meta:generator>OpenOffice.org/3.2$Unix OpenOffice.org_project/320m19$Build-9505</meta:generator>
    <dc:description>user | hambell
created | 11/2009
template | electronic letter
designed for | OpenOffice.org</dc:description>
    <meta:keyword>letter</meta:keyword>
    <meta:keyword>ooo</meta:keyword>
    <meta:keyword>template</meta:keyword>
    <dc:title>Electronic letter template</dc:title>
    <dc:subject>letter template</dc:subject>
    <dc:date>2010-08-23T15:52:21</dc:date>
    <meta:document-statistic meta:table-count="0" meta:image-count="1" meta:object-count="0" meta:page-count="1" meta:paragraph-count="12" meta:word-count="97" meta:character-count="605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